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0000003F4FC6F812F.png" manifest:media-type="image/png"/>
  <manifest:file-entry manifest:full-path="Pictures/100000010000077D0000038016F93D3D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6" style:family="table">
      <style:table-properties style:width="17.806cm" table:align="margins"/>
    </style:style>
    <style:style style:name="Tabla6.A" style:family="table-column">
      <style:table-column-properties style:column-width="0.889cm" style:rel-column-width="3271*"/>
    </style:style>
    <style:style style:name="Tabla6.B" style:family="table-column">
      <style:table-column-properties style:column-width="3.011cm" style:rel-column-width="11081*"/>
    </style:style>
    <style:style style:name="Tabla6.C" style:family="table-column">
      <style:table-column-properties style:column-width="7.295cm" style:rel-column-width="26850*"/>
    </style:style>
    <style:style style:name="Tabla6.D" style:family="table-column">
      <style:table-column-properties style:column-width="2.591cm" style:rel-column-width="9536*"/>
    </style:style>
    <style:style style:name="Tabla6.E" style:family="table-column">
      <style:table-column-properties style:column-width="4.02cm" style:rel-column-width="14797*"/>
    </style:style>
    <style:style style:name="Tabla6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6.2" style:family="table-row">
      <style:table-row-properties style:min-row-height="2.002cm"/>
    </style:style>
    <style:style style:name="Tabla6.A2" style:family="table-cell">
      <style:table-cell-properties style:vertical-align="middle" fo:background-color="#eeeeee" fo:padding="0cm" fo:border-left="none" fo:border-right="none" fo:border-top="none" fo:border-bottom="0.75pt solid #999999" loext:writing-mode="bt-lr">
        <style:background-image/>
      </style:table-cell-properties>
    </style:style>
    <style:style style:name="Tabla6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A13" style:family="table-cell">
      <style:table-cell-properties style:vertical-align="middle" fo:background-color="transparent" fo:padding="0cm" fo:border-left="none" fo:border-right="none" fo:border-top="0.75pt solid #999999" fo:border-bottom="2pt solid #000000" loext:writing-mode="bt-lr">
        <style:background-image/>
      </style:table-cell-properties>
    </style:style>
    <style:style style:name="Tabla6.B13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" style:family="table">
      <style:table-properties style:width="17.806cm" table:align="margins"/>
    </style:style>
    <style:style style:name="Tabla1.A" style:family="table-column">
      <style:table-column-properties style:column-width="17.806cm" style:rel-column-width="65535*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Spring2" style:family="table">
      <style:table-properties style:width="17.806cm" table:align="margins"/>
    </style:style>
    <style:style style:name="Spring2.A" style:family="table-column">
      <style:table-column-properties style:column-width="17.806cm" style:rel-column-width="65535*"/>
    </style:style>
    <style:style style:name="Spring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Spring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Spring2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Sprint3" style:family="table">
      <style:table-properties style:width="17.806cm" table:align="margins"/>
    </style:style>
    <style:style style:name="Sprint3.A" style:family="table-column">
      <style:table-column-properties style:column-width="17.806cm" style:rel-column-width="65535*"/>
    </style:style>
    <style:style style:name="Sprint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Sprint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Sprint3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Heading_20_2">
      <style:paragraph-properties fo:margin-top="0cm" fo:margin-bottom="0cm" style:contextual-spacing="false"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officeooo:paragraph-rsid="00cc3084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7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line-height="114%" fo:text-align="justify" style:justify-single-word="false" fo:text-indent="0cm" style:auto-text-indent="false" fo:background-color="transparent"/>
      <style:text-properties style:font-name="Liberation Seri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Liberation Serif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erif"/>
    </style:style>
    <style:style style:name="P11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line-height="114%" fo:text-align="center" style:justify-single-word="false" fo:text-indent="0cm" style:auto-text-indent="false" fo:background-color="transparent"/>
      <style:text-properties style:font-name="Liberation Serif"/>
    </style:style>
    <style:style style:name="P12" style:family="paragraph" style:parent-style-name="Text_20_body">
      <style:paragraph-properties fo:margin-left="0cm" fo:margin-right="0cm" fo:line-height="114%" fo:text-align="center" style:justify-single-word="false" fo:text-indent="0cm" style:auto-text-indent="false"/>
      <style:text-properties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15" style:family="paragraph" style:parent-style-name="Heading_20_3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 fo:keep-with-next="always"/>
    </style:style>
    <style:style style:name="P16" style:family="paragraph" style:parent-style-name="Heading_20_3">
      <style:paragraph-properties fo:margin-left="0cm" fo:margin-right="0cm" fo:margin-top="0.201cm" fo:margin-bottom="0.201cm" style:contextual-spacing="false" fo:line-height="114%" fo:text-align="center" style:justify-single-word="false" fo:text-indent="0cm" style:auto-text-indent="false" fo:keep-with-next="always"/>
    </style:style>
    <style:style style:name="P17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line-height="114%" fo:text-align="justify" style:justify-single-word="false" fo:text-indent="0cm" style:auto-text-indent="false" style:page-number="auto" fo:background-color="transparent"/>
    </style:style>
    <style:style style:name="P18" style:family="paragraph" style:parent-style-name="Quotations">
      <loext:graphic-properties draw:fill="none"/>
      <style:paragraph-properties fo:margin-left="0cm" fo:margin-right="0cm" fo:margin-top="0cm" fo:margin-bottom="0.499cm" style:contextual-spacing="false" fo:line-height="114%" fo:text-align="justify" style:justify-single-word="false" fo:text-indent="0cm" style:auto-text-indent="false" fo:background-color="transparen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</style:style>
    <style:style style:name="P21" style:family="paragraph" style:parent-style-name="Table_20_Contents">
      <loext:graphic-properties draw:fill="none"/>
      <style:paragraph-properties fo:margin-left="0.3cm" fo:margin-right="0.3cm" fo:margin-top="0.201cm" fo:margin-bottom="0.448cm" style:contextual-spacing="false" fo:line-height="114%" fo:text-align="justify" style:justify-single-word="false" fo:orphans="0" fo:widows="0" fo:text-indent="0cm" style:auto-text-indent="false" fo:background-color="transparent" text:number-lines="false" text:line-number="0"/>
    </style:style>
    <style:style style:name="P22" style:family="paragraph" style:parent-style-name="Table_20_Contents">
      <loext:graphic-properties draw:fill="none"/>
      <style:paragraph-properties fo:margin-left="0.4cm" fo:margin-right="0.101cm" fo:margin-top="0.201cm" fo:margin-bottom="0.448cm" style:contextual-spacing="false" fo:line-height="114%" fo:text-align="justify" style:justify-single-word="false" fo:orphans="0" fo:widows="0" fo:text-indent="0cm" style:auto-text-indent="false" fo:background-color="transparent" text:number-lines="false" text:line-number="0"/>
    </style:style>
    <style:style style:name="P23" style:family="paragraph" style:parent-style-name="Table_20_Contents">
      <loext:graphic-properties draw:fill="none"/>
      <style:paragraph-properties fo:margin-left="0.4cm" fo:margin-right="0.199cm" fo:margin-top="0.201cm" fo:margin-bottom="0.448cm" style:contextual-spacing="false" fo:line-height="114%" fo:text-align="justify" style:justify-single-word="false" fo:orphans="0" fo:widows="0" fo:text-indent="0cm" style:auto-text-indent="false" fo:background-color="transparent" text:number-lines="false" text:line-number="0"/>
    </style:style>
    <style:style style:name="P24" style:family="paragraph" style:parent-style-name="Table_20_Contents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45a4e"/>
    </style:style>
    <style:style style:name="P25" style:family="paragraph" style:parent-style-name="Table_20_Contents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df3be"/>
    </style:style>
    <style:style style:name="P26" style:family="paragraph" style:parent-style-name="Table_20_Contents">
      <loext:graphic-properties draw:fill="none"/>
      <style:paragraph-properties fo:margin-left="0.4cm" fo:margin-right="0.199cm" fo:margin-top="0.302cm" fo:margin-bottom="0.549cm" style:contextual-spacing="false" fo:line-height="114%" fo:text-align="justify" style:justify-single-word="false" fo:orphans="0" fo:widows="0" fo:text-indent="0cm" style:auto-text-indent="false" fo:background-color="transparent" text:number-lines="false" text:line-number="0"/>
      <style:text-properties officeooo:paragraph-rsid="03095856"/>
    </style:style>
    <style:style style:name="P27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officeooo:paragraph-rsid="02c4efa0"/>
    </style:style>
    <style:style style:name="P28" style:family="paragraph" style:parent-style-name="Heading_20_2">
      <style:paragraph-properties fo:margin-top="0.252cm" fo:margin-bottom="0.111cm" style:contextual-spacing="false" fo:line-height="150%" fo:text-align="center" style:justify-single-word="false" fo:keep-with-next="always"/>
      <style:text-properties officeooo:paragraph-rsid="02434674"/>
    </style:style>
    <style:style style:name="P29" style:family="paragraph" style:parent-style-name="Heading_20_3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MathJax_Typewriter"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 style:parent-style-name="Heading_20_3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 fo:keep-with-next="always"/>
      <style:text-properties style:font-name="MathJax_Typewriter"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ans" fo:font-weight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fo:font-weight="bold" officeooo:rsid="0319af7e" officeooo:paragraph-rsid="0319af7e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fo:font-weight="bold" officeooo:rsid="031a742a" officeooo:paragraph-rsid="031a742a" style:font-weight-asian="bold" style:font-weight-complex="bold"/>
    </style:style>
    <style:style style:name="P34" style:family="paragraph" style:parent-style-name="Table_20_Contents" style:list-style-name="L1">
      <loext:graphic-properties draw:fill="none"/>
      <style:paragraph-properties fo:margin-left="1.101cm" fo:margin-right="0.3cm" fo:margin-top="0cm" fo:margin-bottom="0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d0cd1f"/>
    </style:style>
    <style:style style:name="P35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d0cd1f"/>
    </style:style>
    <style:style style:name="P36" style:family="paragraph" style:parent-style-name="Table_20_Contents" style:list-style-name="L1">
      <loext:graphic-properties draw:fill="none"/>
      <style:paragraph-properties fo:margin-left="1.101cm" fo:margin-right="0.3cm" fo:margin-top="0cm" fo:margin-bottom="0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</style:style>
    <style:style style:name="P37" style:family="paragraph" style:parent-style-name="Table_20_Contents" style:list-style-name="L1">
      <loext:graphic-properties draw:fill="none"/>
      <style:paragraph-properties fo:margin-left="1.101cm" fo:margin-right="0.3cm" fo:margin-top="0cm" fo:margin-bottom="0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eb39b9"/>
    </style:style>
    <style:style style:name="P38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eb39b9"/>
    </style:style>
    <style:style style:name="P39" style:family="paragraph" style:parent-style-name="Table_20_Contents" style:list-style-name="L1">
      <loext:graphic-properties draw:fill="none"/>
      <style:paragraph-properties fo:margin-left="1.101cm" fo:margin-right="0.3cm" fo:margin-top="0cm" fo:margin-bottom="0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ef2009"/>
    </style:style>
    <style:style style:name="P40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ef2009"/>
    </style:style>
    <style:style style:name="P41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1b61f"/>
    </style:style>
    <style:style style:name="P42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45a4e"/>
    </style:style>
    <style:style style:name="P43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8fbdc"/>
    </style:style>
    <style:style style:name="P44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9a053"/>
    </style:style>
    <style:style style:name="P45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cd7d7"/>
    </style:style>
    <style:style style:name="P46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2fdf3be"/>
    </style:style>
    <style:style style:name="P47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04c3c"/>
    </style:style>
    <style:style style:name="P48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058a6"/>
    </style:style>
    <style:style style:name="P49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a3d1b"/>
    </style:style>
    <style:style style:name="P50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aebd0"/>
    </style:style>
    <style:style style:name="P51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aebd0"/>
    </style:style>
    <style:style style:name="P52" style:family="paragraph" style:parent-style-name="Table_20_Contents" style:list-style-name="L1">
      <loext:graphic-properties draw:fill="none"/>
      <style:paragraph-properties fo:margin-left="1.101cm" fo:margin-right="0.3cm" fo:margin-top="0.201cm" fo:margin-bottom="0.2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b7d08"/>
    </style:style>
    <style:style style:name="P53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officeooo:paragraph-rsid="030b7d08"/>
    </style:style>
    <style:style style:name="P54" style:family="paragraph" style:parent-style-name="Table_20_Contents" style:list-style-name="L1">
      <loext:graphic-properties draw:fill="none"/>
      <style:paragraph-properties fo:margin-left="1.101cm" fo:margin-right="0.3cm" fo:margin-top="0cm" fo:margin-bottom="0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style:font-name="Liberation Serif" officeooo:paragraph-rsid="02cfc031"/>
    </style:style>
    <style:style style:name="P55" style:family="paragraph" style:parent-style-name="Table_20_Contents" style:list-style-name="L1">
      <loext:graphic-properties draw:fill="none"/>
      <style:paragraph-properties fo:margin-left="1.101cm" fo:margin-right="0.3cm" fo:margin-top="0.101cm" fo:margin-bottom="0.101cm" style:contextual-spacing="false" fo:line-height="114%" fo:text-align="justify" style:justify-single-word="false" fo:orphans="0" fo:widows="0" fo:text-indent="-0.6cm" style:auto-text-indent="false" fo:background-color="transparent" text:number-lines="false" text:line-number="0">
        <style:tab-stops>
          <style:tab-stop style:position="-0.028cm"/>
        </style:tab-stops>
      </style:paragraph-properties>
      <style:text-properties style:font-name="Liberation Serif" officeooo:paragraph-rsid="02cfc031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Liberation Serif" officeooo:paragraph-rsid="02c4efa0"/>
    </style:style>
    <style:style style:name="P57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/>
    </style:style>
    <style:style style:name="P5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59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60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Liberation Serif" fo:font-style="italic" fo:font-weight="bold" officeooo:rsid="031a742a" officeooo:paragraph-rsid="031a742a" style:font-weight-asian="bold" style:font-weight-complex="bold"/>
    </style:style>
    <style:style style:name="P62" style:family="paragraph" style:parent-style-name="Text_20_body" style:list-style-name="L2">
      <style:paragraph-properties fo:margin-top="0cm" fo:margin-bottom="0cm" style:contextual-spacing="false"/>
    </style:style>
    <style:style style:name="P6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</style:style>
    <style:style style:name="P6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</style:style>
    <style:style style:name="P65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68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69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70" style:family="paragraph">
      <loext:graphic-properties draw:fill="solid" draw:fill-color="#dedce6"/>
      <style:paragraph-properties style:writing-mode="lr-tb"/>
    </style:style>
    <style:style style:name="P71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5" style:family="text">
      <style:text-properties style:font-name="MathJax_Typewriter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MathJax_Typewriter" style:text-underline-style="none"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fo:color="#000000" loext:opacity="100%"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11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style:font-size-asian="15pt" style:font-weight-asian="normal" style:font-size-complex="15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323b298" style:font-style-asian="italic" style:font-style-complex="italic"/>
    </style:style>
    <style:style style:name="T14" style:family="text">
      <style:text-properties fo:font-style="italic" fo:font-weight="bold" style:font-style-asian="italic" style:font-style-complex="italic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tyle="italic"/>
    </style:style>
    <style:style style:name="T17" style:family="text">
      <style:text-properties style:font-name="Liberation Serif" fo:font-style="italic" style:font-style-asian="italic" style:font-style-complex="italic"/>
    </style:style>
    <style:style style:name="T18" style:family="text">
      <style:text-properties style:font-name="Liberation Serif" fo:font-style="italic" officeooo:rsid="02ce0fe5" style:font-style-asian="italic" style:font-style-complex="italic"/>
    </style:style>
    <style:style style:name="T19" style:family="text">
      <style:text-properties style:font-name="Liberation Serif" fo:font-style="italic" officeooo:rsid="02ccf2d6" style:font-style-asian="italic" style:font-style-complex="italic"/>
    </style:style>
    <style:style style:name="T20" style:family="text">
      <style:text-properties style:font-name="Liberation Serif" fo:font-style="italic" fo:font-weight="bold" style:font-style-asian="italic" style:font-style-complex="italic"/>
    </style:style>
    <style:style style:name="T21" style:family="text">
      <style:text-properties style:font-name="Liberation Serif" fo:font-style="italic" officeooo:rsid="02d9541b"/>
    </style:style>
    <style:style style:name="T22" style:family="text">
      <style:text-properties style:font-name="Liberation Serif" fo:font-style="italic" officeooo:rsid="030f3a5a"/>
    </style:style>
    <style:style style:name="T23" style:family="text">
      <style:text-properties style:font-name="Liberation Serif" fo:font-weight="bold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bold" officeooo:rsid="02ccf2d6"/>
    </style:style>
    <style:style style:name="T26" style:family="text">
      <style:text-properties style:font-name="Liberation Serif" officeooo:rsid="02bb9e2e"/>
    </style:style>
    <style:style style:name="T27" style:family="text">
      <style:text-properties style:font-name="Liberation Serif" officeooo:rsid="02bd7661"/>
    </style:style>
    <style:style style:name="T28" style:family="text">
      <style:text-properties style:font-name="Liberation Serif" fo:font-style="normal" style:font-style-asian="normal" style:font-style-complex="normal"/>
    </style:style>
    <style:style style:name="T29" style:family="text">
      <style:text-properties style:font-name="Liberation Serif" fo:font-style="normal" officeooo:rsid="02bef222" style:font-style-asian="normal" style:font-style-complex="normal"/>
    </style:style>
    <style:style style:name="T30" style:family="text">
      <style:text-properties style:font-name="Liberation Serif" officeooo:rsid="02bef222"/>
    </style:style>
    <style:style style:name="T31" style:family="text">
      <style:text-properties style:font-name="Liberation Serif" officeooo:rsid="02c4efa0"/>
    </style:style>
    <style:style style:name="T32" style:family="text">
      <style:text-properties style:font-name="Liberation Serif" officeooo:rsid="02cb49bf"/>
    </style:style>
    <style:style style:name="T33" style:family="text">
      <style:text-properties style:font-name="Liberation Serif" officeooo:rsid="02ccf2d6"/>
    </style:style>
    <style:style style:name="T34" style:family="text">
      <style:text-properties style:font-name="Liberation Serif" officeooo:rsid="02e11817"/>
    </style:style>
    <style:style style:name="T35" style:family="text">
      <style:text-properties style:font-name="Liberation Serif" officeooo:rsid="0323b298"/>
    </style:style>
    <style:style style:name="T36" style:family="text">
      <style:text-properties style:font-name="Liberation Sans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2ce7d69"/>
    </style:style>
    <style:style style:name="T39" style:family="text">
      <style:text-properties officeooo:rsid="030232aa"/>
    </style:style>
    <style:style style:name="T40" style:family="text">
      <style:text-properties officeooo:rsid="03064280"/>
    </style:style>
    <style:style style:name="T41" style:family="text">
      <style:text-properties officeooo:rsid="0323b298"/>
    </style:style>
    <style:style style:name="T42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43" style:family="text">
      <style:text-properties style:font-name="MathJax_Typewriter" fo:font-size="26pt" style:text-underline-style="none" style:font-size-asian="26pt" style:font-size-complex="26pt"/>
    </style:style>
    <style:style style:name="T44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3cm, 0.109cm, 0.1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70" svg:width="10.699cm" svg:height="29.795cm" svg:x="-2.833cm" svg:y="-2.82cm"><text:p/><draw:enhanced-geometry svg:viewBox="0 0 21600 21600" draw:type="rectangle" draw:enhanced-path="M 0 0 L 21600 0 21600 21600 0 21600 0 0 Z N"/></draw:custom-shap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3" draw:name="Marco de texto 1" draw:style-name="gr3" draw:text-style-name="P69" svg:width="9.129cm" svg:height="4.296cm" svg:x="1.757cm" svg:y="0.247cm"><draw:text-box><text:p text:style-name="P66"><text:span text:style-name="T44">Seguimiento del </text:span><text:span text:style-name="T44">Proyecto - Scrum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5" draw:name="Marco de texto 3" draw:style-name="gr1" draw:text-style-name="P67" svg:width="7.873cm" svg:height="1.414cm" svg:x="-0.6cm" svg:y="0.312cm"><draw:text-box><text:p text:style-name="P66"><text:span text:style-name="T42">Temporis: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4" draw:name="Marco de texto 2" draw:style-name="gr2" draw:text-style-name="P68" svg:width="7.839cm" svg:height="4.329cm" svg:x="-0.563cm" svg:y="0.381cm"><draw:text-box><text:p text:style-name="P66"><text:span text:style-name="T43">Una herramienta </text:span><text:span text:style-name="T43">accesible para el </text:span><text:span text:style-name="T43">control y la </text:span><text:span text:style-name="T43">optimización de </text:span><text:span text:style-name="T43">nuestro tiempo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custom-shape text:anchor-type="paragraph" draw:z-index="0" draw:name="Forma 2" draw:style-name="gr5" draw:text-style-name="P71" svg:width="2.449cm" svg:height="2.449cm" svg:x="8.46cm" svg:y="0.646cm"><text:p/><draw:enhanced-geometry svg:viewBox="0 0 21600 21600" draw:type="rectangle" draw:enhanced-path="M 0 0 L 21600 0 21600 21600 0 21600 0 0 Z N"/></draw:custom-shape><text:span text:style-name="T9"/></text:p>
      <text:p text:style-name="P4"/>
      <text:h text:style-name="P3" text:outline-level="2"><text:soft-page-break/><text:span text:style-name="T9">1. </text:span>Indicadores de Calidad y Evaluación</text:h>
      <text:p text:style-name="P56">Para evaluar el progreso, he definido los siguientes indicadores:</text:p>
      <text:list text:style-name="L2">
        <text:list-item>
          <text:p text:style-name="P62"><text:span text:style-name="T7">Velocidad:</text:span> Número de tareas completadas por <text:span text:style-name="T12">Sprint</text:span> frente a las planificadas.</text:p>
        </text:list-item>
        <text:list-item>
          <text:p text:style-name="P62"><text:span text:style-name="T7">Tasa de Errores:</text:span> Incidencias detectadas durante la fase de <text:span text:style-name="T12">Testing</text:span> de cada <text:span text:style-name="T12">Sprint</text:span>.</text:p>
        </text:list-item>
        <text:list-item>
          <text:p text:style-name="P62"><text:span text:style-name="T7">Cumplimiento de Accesibilidad:</text:span> Verificación de contrastes según la normativa <text:span text:style-name="T12">WCAG</text:span>.</text:p>
        </text:list-item>
      </text:list>
      <text:h text:style-name="P28" text:outline-level="2"><text:span text:style-name="T10">2. </text:span><text:span text:style-name="T11">Registro de Incidencias (Trazabilidad)</text:span></text:h>
      <text:p text:style-name="P27"><text:span text:style-name="T31">A</text:span><text:span text:style-name="T15"> continuación se presenta la tabla maestra que centraliza la totalidad de las incidencias técnicas registradas y solucionadas durante el ciclo de vida del proyecto. De acuerdo con la planificación final, el desarrollo se organizó en los </text:span><text:span text:style-name="T17">Sprints</text:span><text:span text:style-name="T15"> 1 y 2, mientras que el </text:span><text:span text:style-name="T17">Sprint</text:span><text:span text:style-name="T15"> 3 se reservó de forma exclusiva para la elaboración de casos de prueba y la confección de la documentación técnica asociada.</text:span></text:p>
      <table:table table:name="Tabla6" table:style-name="Tabla6" table:template-name="Elegant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Table_20_Heading"><text:span text:style-name="Strong_20_Emphasis"><text:span text:style-name="T36">ID</text:span></text:span></text:p>
            </table:table-cell>
            <table:table-cell table:style-name="Tabla6.A1" office:value-type="string">
              <text:p text:style-name="Table_20_Heading"><text:span text:style-name="Strong_20_Emphasis"><text:span text:style-name="T36">Sprint / Fase</text:span></text:span></text:p>
            </table:table-cell>
            <table:table-cell table:style-name="Tabla6.A1" office:value-type="string">
              <text:p text:style-name="Table_20_Heading"><text:span text:style-name="Strong_20_Emphasis"><text:span text:style-name="T36">Incidencia Técnica Detectada</text:span></text:span></text:p>
            </table:table-cell>
            <table:table-cell table:style-name="Tabla6.A1" office:value-type="string">
              <text:p text:style-name="Table_20_Heading"><text:span text:style-name="Strong_20_Emphasis"><text:span text:style-name="T36">Impacto / Severidad</text:span></text:span></text:p>
            </table:table-cell>
            <table:table-cell table:style-name="Tabla6.A1" office:value-type="string">
              <text:p text:style-name="P14"><text:span text:style-name="Strong_20_Emphasis"><text:span text:style-name="T36">Tarea Relacionada / Contexto</text:span></text:span></text:p>
            </table:table-cell>
          </table:table-row>
        </table:table-header-rows>
        <table:table-row table:style-name="Tabla6.2">
          <table:table-cell table:style-name="Tabla6.A2" office:value-type="string">
            <text:p text:style-name="P31">INC-01</text:p>
          </table:table-cell>
          <table:table-cell table:style-name="Tabla6.B2" office:value-type="string">
            <text:p text:style-name="P12">Sprint 1 (Auth)</text:p>
          </table:table-cell>
          <table:table-cell table:style-name="Tabla6.B2" office:value-type="string">
            <text:p text:style-name="P11">Error de configuración inicial en los servicios de <text:span text:style-name="T12">Firebase</text:span> y conexión con el proyecto Android.</text:p>
          </table:table-cell>
          <table:table-cell table:style-name="Tabla6.B2" office:value-type="string">
            <text:p text:style-name="P13">Bloqueo total</text:p>
          </table:table-cell>
          <table:table-cell table:style-name="Tabla6.B2" office:value-type="string">
            <text:p text:style-name="P10">Configuración de infraestructura base</text:p>
          </table:table-cell>
        </table:table-row>
        <table:table-row table:style-name="Tabla6.2">
          <table:table-cell table:style-name="Tabla6.A2" office:value-type="string">
            <text:p text:style-name="P31">INC-02</text:p>
          </table:table-cell>
          <table:table-cell table:style-name="Tabla6.B2" office:value-type="string">
            <text:p text:style-name="P12">Sprint 1 (Logic)</text:p>
          </table:table-cell>
          <table:table-cell table:style-name="Tabla6.B2" office:value-type="string">
            <text:p text:style-name="P11">Problemas de compilación por <text:span text:style-name="T12">imports</text:span> faltantes tras la creación de entidades <text:span text:style-name="T12">Kotlin</text:span>.</text:p>
          </table:table-cell>
          <table:table-cell table:style-name="Tabla6.B2" office:value-type="string">
            <text:p text:style-name="P13">Error de compilación</text:p>
          </table:table-cell>
          <table:table-cell table:style-name="Tabla6.B2" office:value-type="string">
            <text:p text:style-name="P10">Modelado de datos inicial</text:p>
          </table:table-cell>
        </table:table-row>
        <table:table-row table:style-name="Tabla6.2">
          <table:table-cell table:style-name="Tabla6.A2" office:value-type="string">
            <text:p text:style-name="P31">INC-03</text:p>
          </table:table-cell>
          <table:table-cell table:style-name="Tabla6.B2" office:value-type="string">
            <text:p text:style-name="P12">Sprint 2 (Auth)</text:p>
          </table:table-cell>
          <table:table-cell table:style-name="Tabla6.B2" office:value-type="string">
            <text:p text:style-name="P11">Error "10" en la autenticación con <text:span text:style-name="T12">Google Account</text:span>.</text:p>
          </table:table-cell>
          <table:table-cell table:style-name="Tabla6.B2" office:value-type="string">
            <text:p text:style-name="P13">Acceso denegado</text:p>
          </table:table-cell>
          <table:table-cell table:style-name="Tabla6.B2" office:value-type="string">
            <text:p text:style-name="P10">Integración de Autenticación de Google</text:p>
          </table:table-cell>
        </table:table-row>
        <table:table-row table:style-name="Tabla6.2">
          <table:table-cell table:style-name="Tabla6.A2" office:value-type="string">
            <text:p text:style-name="P31">INC-04</text:p>
          </table:table-cell>
          <table:table-cell table:style-name="Tabla6.B2" office:value-type="string">
            <text:p text:style-name="P12">Sprint 2 (UI)</text:p>
          </table:table-cell>
          <table:table-cell table:style-name="Tabla6.B2" office:value-type="string">
            <text:p text:style-name="P11">Desajuste en el título de la vista del Perfil de Usuario (<text:span text:style-name="T12">User Profile View</text:span>).</text:p>
          </table:table-cell>
          <table:table-cell table:style-name="Tabla6.B2" office:value-type="string">
            <text:p text:style-name="P13">Error visual</text:p>
          </table:table-cell>
          <table:table-cell table:style-name="Tabla6.B2" office:value-type="string">
            <text:p text:style-name="P10">Interfaz de usuario (<text:span text:style-name="T12">Dashboard</text:span> Perfil)</text:p>
          </table:table-cell>
        </table:table-row>
        <table:table-row table:style-name="Tabla6.2">
          <table:table-cell table:style-name="Tabla6.A2" office:value-type="string">
            <text:p text:style-name="P31">INC-05</text:p>
          </table:table-cell>
          <table:table-cell table:style-name="Tabla6.B2" office:value-type="string">
            <text:p text:style-name="P12">Sprint 2 (Core)</text:p>
          </table:table-cell>
          <table:table-cell table:style-name="Tabla6.B2" office:value-type="string">
            <text:p text:style-name="P11">Error en la función de borrado (<text:span text:style-name="T12">Delete</text:span>) de los temporizadores creados.</text:p>
          </table:table-cell>
          <table:table-cell table:style-name="Tabla6.B2" office:value-type="string">
            <text:p text:style-name="P13">Pérdida de datos</text:p>
          </table:table-cell>
          <table:table-cell table:style-name="Tabla6.B2" office:value-type="string">
            <text:p text:style-name="P10">Lógica del Repositorio de Temporizadores</text:p>
          </table:table-cell>
        </table:table-row>
        <table:table-row table:style-name="Tabla6.2">
          <table:table-cell table:style-name="Tabla6.A2" office:value-type="string">
            <text:p text:style-name="P31">INC-06</text:p>
          </table:table-cell>
          <table:table-cell table:style-name="Tabla6.B2" office:value-type="string">
            <text:p text:style-name="P12">Sprint 2 (UI)</text:p>
          </table:table-cell>
          <table:table-cell table:style-name="Tabla6.B2" office:value-type="string">
            <text:p text:style-name="P11">Persistencia de errores en el botón de cerrar sesión (<text:span text:style-name="T12">Logout</text:span>).</text:p>
          </table:table-cell>
          <table:table-cell table:style-name="Tabla6.B2" office:value-type="string">
            <text:p text:style-name="P13">Fallo de seguridad</text:p>
          </table:table-cell>
          <table:table-cell table:style-name="Tabla6.B2" office:value-type="string">
            <text:p text:style-name="P10">Gestión de ciclo de sesión de usuario</text:p>
          </table:table-cell>
        </table:table-row>
        <table:table-row table:style-name="Tabla6.2">
          <table:table-cell table:style-name="Tabla6.A2" office:value-type="string">
            <text:p text:style-name="P31">INC-07</text:p>
          </table:table-cell>
          <table:table-cell table:style-name="Tabla6.B2" office:value-type="string">
            <text:p text:style-name="P12">Sprint 2 (Acc)</text:p>
          </table:table-cell>
          <table:table-cell table:style-name="Tabla6.B2" office:value-type="string">
            <text:p text:style-name="P11">Fatal Error (<text:span text:style-name="T12">Crash</text:span>) al intentar acceder a la vista de opciones de Accesibilidad.</text:p>
          </table:table-cell>
          <table:table-cell table:style-name="Tabla6.B2" office:value-type="string">
            <text:p text:style-name="P13">Bloqueo de función</text:p>
          </table:table-cell>
          <table:table-cell table:style-name="Tabla6.B2" office:value-type="string">
            <text:p text:style-name="P10">Configuración de <text:span text:style-name="T12">TalkBack</text:span> y redimensión</text:p>
          </table:table-cell>
        </table:table-row>
        <table:table-row table:style-name="Tabla6.2">
          <table:table-cell table:style-name="Tabla6.A2" office:value-type="string">
            <text:p text:style-name="P31">INC-08</text:p>
          </table:table-cell>
          <table:table-cell table:style-name="Tabla6.B2" office:value-type="string">
            <text:p text:style-name="P12">Sprint 2 (Acc)</text:p>
          </table:table-cell>
          <table:table-cell table:style-name="Tabla6.B2" office:value-type="string">
            <text:p text:style-name="P11">Error crítico al activar el Modo Oscuro en las vistas <text:span text:style-name="T12">Home</text:span>, <text:span text:style-name="T12">Timers</text:span> e <text:span text:style-name="T12">Info</text:span>.</text:p>
          </table:table-cell>
          <table:table-cell table:style-name="Tabla6.B2" office:value-type="string">
            <text:p text:style-name="P13">‘<text:span text:style-name="T12">Crash</text:span>’ de la ‘<text:span text:style-name="T12">App</text:span>’</text:p>
          </table:table-cell>
          <table:table-cell table:style-name="Tabla6.B2" office:value-type="string">
            <text:p text:style-name="P10">Estilos de Temas Dinámicos</text:p>
          </table:table-cell>
        </table:table-row>
        <table:table-row table:style-name="Tabla6.2">
          <table:table-cell table:style-name="Tabla6.A2" office:value-type="string">
            <text:p text:style-name="P31">INC-09</text:p>
          </table:table-cell>
          <table:table-cell table:style-name="Tabla6.B2" office:value-type="string">
            <text:p text:style-name="P12">Sprint 2 (UI)</text:p>
          </table:table-cell>
          <table:table-cell table:style-name="Tabla6.B2" office:value-type="string">
            <text:p text:style-name="P11">Los botones de la interfaz aparecían con estilos inconsistentes (cuadrados vs redondeados) entre temas.</text:p>
          </table:table-cell>
          <table:table-cell table:style-name="Tabla6.B2" office:value-type="string">
            <text:p text:style-name="P13">Estética / UX</text:p>
          </table:table-cell>
          <table:table-cell table:style-name="Tabla6.B2" office:value-type="string">
            <text:p text:style-name="P10">Unificación estética del sistema visual</text:p>
          </table:table-cell>
        </table:table-row>
        <text:soft-page-break/>
        <table:table-row table:style-name="Tabla6.2">
          <table:table-cell table:style-name="Tabla6.A2" office:value-type="string">
            <text:p text:style-name="P31">INC-10</text:p>
          </table:table-cell>
          <table:table-cell table:style-name="Tabla6.B2" office:value-type="string">
            <text:p text:style-name="P12">Sprint 2 (Acc)</text:p>
          </table:table-cell>
          <table:table-cell table:style-name="Tabla6.B2" office:value-type="string">
            <text:p text:style-name="P11">Desajuste en el escalado de textos al usar unidades "<text:span text:style-name="T12">dp</text:span>" en lugar de "<text:span text:style-name="T12">sp</text:span>".</text:p>
          </table:table-cell>
          <table:table-cell table:style-name="Tabla6.B2" office:value-type="string">
            <text:p text:style-name="P13">Accesibilidad</text:p>
          </table:table-cell>
          <table:table-cell table:style-name="Tabla6.B2" office:value-type="string">
            <text:p text:style-name="P10">Adaptabilidad de fuentes accesibles</text:p>
          </table:table-cell>
        </table:table-row>
        <table:table-row table:style-name="Tabla6.2">
          <table:table-cell table:style-name="Tabla6.A2" office:value-type="string">
            <text:p text:style-name="P31">INC-11</text:p>
          </table:table-cell>
          <table:table-cell table:style-name="Tabla6.B2" office:value-type="string">
            <text:p text:style-name="P12">Sprint 2 (Final)</text:p>
          </table:table-cell>
          <table:table-cell table:style-name="Tabla6.B2" office:value-type="string">
            <text:p text:style-name="P11">El teclado virtual ocultaba los formularios de entrada de datos al crear o editar temporizadores. (Aún pendiente de parche definitivo en producción)</text:p>
          </table:table-cell>
          <table:table-cell table:style-name="Tabla6.B2" office:value-type="string">
            <text:p text:style-name="P13">Usabilidad (UX)</text:p>
          </table:table-cell>
          <table:table-cell table:style-name="Tabla6.B2" office:value-type="string">
            <text:p text:style-name="P10">Formulario de Entrada en pantallas pequeñas</text:p>
          </table:table-cell>
        </table:table-row>
        <table:table-row table:style-name="Tabla6.2">
          <table:table-cell table:style-name="Tabla6.A13" office:value-type="string">
            <text:p text:style-name="P31">INC-12</text:p>
          </table:table-cell>
          <table:table-cell table:style-name="Tabla6.B13" office:value-type="string">
            <text:p text:style-name="P12">Sprint 2 (Auth)</text:p>
          </table:table-cell>
          <table:table-cell table:style-name="Tabla6.B13" office:value-type="string">
            <text:p text:style-name="P7">Redirección errónea a la pantalla de inicio justo después de aplicar cambios en la configuración de accesibilidad.</text:p>
          </table:table-cell>
          <table:table-cell table:style-name="Tabla6.B13" office:value-type="string">
            <text:p text:style-name="P13">Error de flujo</text:p>
          </table:table-cell>
          <table:table-cell table:style-name="Tabla6.B13" office:value-type="string">
            <text:p text:style-name="P8">Control de navegación y ciclo de fragmentos</text:p>
          </table:table-cell>
        </table:table-row>
      </table:table>
      <text:p text:style-name="P18"><text:span text:style-name="T24"/></text:p>
      <text:p text:style-name="P18"><text:span text:style-name="T24">Nota de Ajuste de Trazabilidad:</text:span><text:span text:style-name="T15"> Las incidencias </text:span><text:span text:style-name="Source_20_Text"><text:span text:style-name="T15">INC-06</text:span></text:span><text:span text:style-name="T15"> a </text:span><text:span text:style-name="Source_20_Text"><text:span text:style-name="T15">INC-12</text:span></text:span><text:span text:style-name="T15"> han sido </text:span><text:span text:style-name="T26">finalmente</text:span><text:span text:style-name="T15"> asignadas al </text:span><text:span text:style-name="T17">Sprint</text:span><text:span text:style-name="T15"> 2, consolidando allí toda la fase final de lógica, interfaces y los esfuerzos de accesibilidad móvil antes de congelar el código, </text:span><text:span text:style-name="T27">abordar</text:span><text:span text:style-name="T15"> para la fase de </text:span><text:span text:style-name="T30">desarrollo de</text:span><text:span text:style-name="T15"> </text:span><text:span text:style-name="T29">los casos de prueba</text:span><text:span text:style-name="T15"> </text:span><text:span text:style-name="T27">y </text:span><text:span text:style-name="T30">de la </text:span><text:span text:style-name="T27">documentación</text:span><text:span text:style-name="T15">.</text:span></text:p>
      <text:p text:style-name="P17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oft-page-break/><text:span text:style-name="T15"/></text:p>
      <text:h text:style-name="P3" text:outline-level="2"><text:span text:style-name="T9">3. </text:span>Tablas Explicativas Detalladas por <text:span text:style-name="T12">Sprint</text:span></text:h>
      <text:h text:style-name="P29" text:outline-level="3">Sprint 1: Inicialización de la Arquitectura y Entidades Base</text:h>
      <text:list text:style-name="L3">
        <text:list-item>
          <text:p text:style-name="P58"><text:span text:style-name="T7">Fecha de Inicio:</text:span> 13 de febrero de 2025</text:p>
        </text:list-item>
        <text:list-item>
          <text:p text:style-name="P58"><text:span text:style-name="T7">Fecha de Fin:</text:span> 25 de marzo de 2025</text:p>
        </text:list-item>
      </text:list>
      <table:table table:name="Tabla1" table:style-name="Tabla1" table:template-name="Elegant">
        <table:table-column table:style-name="Tabla1.A"/>
        <table:table-header-rows>
          <table:table-row>
            <table:table-cell table:style-name="Tabla1.A1" office:value-type="string">
              <text:h text:style-name="P16" text:outline-level="3"><text:span text:style-name="Strong_20_Emphasis"><text:span text:style-name="T6">Detalle de Incidencias Técnicas Registradas (Sprint 1)</text:span></text:span></text:h>
            </table:table-cell>
          </table:table-row>
        </table:table-header-rows>
        <table:table-row>
          <table:table-cell table:style-name="Tabla1.A2" office:value-type="string">
            <text:p text:style-name="P21"><text:span text:style-name="T15">📋 </text:span><text:span text:style-name="T23">Incidencia:</text:span><text:span text:style-name="T15"> </text:span><text:span text:style-name="Source_20_Text"><text:span text:style-name="T15">INC-01</text:span></text:span><text:span text:style-name="T15"> — Error de configuración en los servicios de </text:span><text:span text:style-name="T17">Firebase</text:span><text:span text:style-name="T15"> </text:span><text:span text:style-name="T32">definición errónea de las reglas de acceso (a la base de datos)</text:span><text:span text:style-name="T15"> y conexión </text:span><text:span text:style-name="T32">fallida, </text:span><text:span text:style-name="T15">con el proyecto Android.</text:span></text:p>
            <text:list text:style-name="L1">
              <text:list-item>
                <text:p text:style-name="P34"><text:span text:style-name="T23">Tarea relacionada:</text:span><text:span text:style-name="T15"> Configuración de </text:span><text:span text:style-name="T17">Firebase Auth / Firestore</text:span><text:span text:style-name="T15">.</text:span></text:p>
              </text:list-item>
              <text:list-item>
                <text:p text:style-name="P35"><text:span text:style-name="T23">Problemas generados:</text:span><text:span text:style-name="T15"> Bloqueo absoluto de las llamadas de red y </text:span><text:span text:style-name="T17">crash</text:span><text:span text:style-name="T15"> de la </text:span><text:span text:style-name="T17">app</text:span><text:span text:style-name="T15"> en el arranque al no validar el archivo </text:span><text:span text:style-name="Source_20_Text"><text:span text:style-name="T15">google-services.json</text:span></text:span><text:span text:style-name="T15">.</text:span></text:p>
              </text:list-item>
              <text:list-item>
                <text:p text:style-name="P35"><text:span text:style-name="T23">Cambios </text:span><text:span text:style-name="T25">realizados</text:span><text:span text:style-name="T23"> / Lecciones:</text:span><text:span text:style-name="T15"> Vali</text:span><text:span text:style-name="T33">dación de las</text:span><text:span text:style-name="T15"> credenciales de SHA-1 en la consola de </text:span><text:span text:style-name="T17">Firebase</text:span><text:span text:style-name="T28">,</text:span><text:span text:style-name="T15"> antes de compilar localmente, </text:span><text:span text:style-name="T33">y ajuste de las reglas de acceso, definidas anteriormente desde el panel de control de </text:span><text:span text:style-name="T19">Firebase Firestore</text:span><text:span text:style-name="T15">.</text:span></text:p>
              </text:list-item>
            </text:list>
          </table:table-cell>
        </table:table-row>
        <table:table-row>
          <table:table-cell table:style-name="Tabla1.A3" office:value-type="string">
            <text:p text:style-name="P21"><text:span text:style-name="T15">📋 </text:span><text:span text:style-name="T23">Incidencia:</text:span><text:span text:style-name="T15"> </text:span><text:span text:style-name="Source_20_Text"><text:span text:style-name="T15">INC-02</text:span></text:span><text:span text:style-name="T15"> — Problemas de compilación por </text:span><text:span text:style-name="T17">imports</text:span><text:span text:style-name="T15"> faltantes tras la creación de entidades </text:span><text:span text:style-name="T17">Kotlin</text:span><text:span text:style-name="T15">.</text:span></text:p>
            <text:list xml:id="list191231968691040" text:continue-numbering="true" text:style-name="L1">
              <text:list-item>
                <text:p text:style-name="P36"><text:span text:style-name="T23">Tarea relacionada:</text:span><text:span text:style-name="T15"> Modelado e “inicialización” de entidades de negocio (</text:span><text:span text:style-name="Source_20_Text"><text:span text:style-name="T17">User</text:span></text:span><text:span text:style-name="T17">, </text:span><text:span text:style-name="Source_20_Text"><text:span text:style-name="T17">Timer, </text:span></text:span><text:span text:style-name="Source_20_Text"><text:span text:style-name="T18">Post, etc</text:span></text:span><text:span text:style-name="T15">).</text:span></text:p>
              </text:list-item>
              <text:list-item>
                <text:p text:style-name="P54"><text:span text:style-name="T7">Problemas generados:</text:span> Errores explícitos en el compilador de <text:span text:style-name="T12">Gradle</text:span> que detuvieron la integración en la rama limpia de desarrollo.</text:p>
              </text:list-item>
              <text:list-item>
                <text:p text:style-name="P55"><text:span text:style-name="T7">Cambios realizados / Lecciones:</text:span> Configurar la auto-importación estricta en <text:span text:style-name="T12">Android Studio</text:span> y realizar <text:span text:style-name="T38">más</text:span> comprobaciones <text:span text:style-name="T12">pre-commit</text:span>, <text:span text:style-name="T38">antes de enviar los nuevos cambios al repositorio remoto</text:span>.</text:p>
              </text:list-item>
            </text:list>
          </table:table-cell>
        </table:table-row>
      </table:table>
      <text:h text:style-name="P5" text:outline-level="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0" text:outline-level="3"><text:soft-page-break/>Sprint 2: Implementación de Lógica Core, UX y Capa de Accesibilidad</text:h>
      <text:list text:style-name="L4">
        <text:list-item>
          <text:p text:style-name="P59"><text:span text:style-name="T7">Fecha de Inicio:</text:span> 26 de marzo de 2026</text:p>
        </text:list-item>
        <text:list-item>
          <text:p text:style-name="P59"><text:span text:style-name="T7">Fecha de Fin:</text:span> 29 de abril de 2026</text:p>
        </text:list-item>
      </text:list>
      <table:table table:name="Spring2" table:style-name="Spring2" table:template-name="Elegant">
        <table:table-column table:style-name="Spring2.A"/>
        <table:table-header-rows>
          <table:table-row>
            <table:table-cell table:style-name="Spring2.A1" office:value-type="string">
              <text:h text:style-name="P16" text:outline-level="3"><text:span text:style-name="Strong_20_Emphasis"><text:span text:style-name="T6">Detalle de Incidencias Técnicas Registradas (Sprint 2)</text:span></text:span></text:h>
            </table:table-cell>
          </table:table-row>
        </table:table-header-rows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3</text:span></text:span><text:span text:style-name="T15"> — Error "10" en la autenticación con </text:span><text:span text:style-name="T17">Google Account</text:span><text:span text:style-name="T15">.</text:span></text:p>
            <text:list text:continue-list="list191231968691040" text:style-name="L1">
              <text:list-item>
                <text:p text:style-name="P37"><text:span text:style-name="T23">Tarea relacionada:</text:span><text:span text:style-name="T15"> Autenticación con Google.</text:span></text:p>
              </text:list-item>
              <text:list-item>
                <text:p text:style-name="P38"><text:span text:style-name="T23">Problemas generados:</text:span><text:span text:style-name="T15"> Flujo de </text:span><text:span text:style-name="T17">Login</text:span><text:span text:style-name="T15"> interrumpido; denegación de acceso completa debido a un desajuste técnico con la firma SHA-1 de depuración.</text:span></text:p>
              </text:list-item>
              <text:list-item>
                <text:p text:style-name="P38"><text:span text:style-name="T23">Cambios realizados / Lecciones:</text:span><text:span text:style-name="T15"> Sincronizar las firmas de desarrollo y producción de </text:span><text:span text:style-name="T17">Gradle</text:span><text:span text:style-name="T15"> directamente en el panel de control del proveedor de autenticación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4</text:span></text:span><text:span text:style-name="T15"> — Desajuste en el título de la vista del Perfil de Usuario (</text:span><text:span text:style-name="T17">User Profile View</text:span><text:span text:style-name="T15">).</text:span></text:p>
            <text:list text:continue-numbering="true" text:style-name="L1">
              <text:list-item>
                <text:p text:style-name="P39"><text:span text:style-name="T7">Tarea relacionada: </text:span><text:span text:style-name="T15">Maquetación del panel del usuario.</text:span></text:p>
              </text:list-item>
              <text:list-item>
                <text:p text:style-name="P40"><text:span text:style-name="T23">Problemas generados:</text:span><text:span text:style-name="T15"> Error visual menor pero que rompía la línea estética en múltiples resoluciones de pantalla.</text:span></text:p>
              </text:list-item>
              <text:list-item>
                <text:p text:style-name="P40"><text:span text:style-name="T23">Cambios realizados / Lecciones:</text:span><text:span text:style-name="T15"> Emplear restricciones flexibles en el </text:span><text:span text:style-name="T17">Layout XML</text:span><text:span text:style-name="T15"> en lugar de márgenes fijos (</text:span><text:span text:style-name="Source_20_Text"><text:span text:style-name="T17">hardcoded</text:span></text:span><text:span text:style-name="T15">)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5</text:span></text:span><text:span text:style-name="T15"> — Error en la función de borrado (</text:span><text:span text:style-name="T17">Delete</text:span><text:span text:style-name="T15">) de los temporizadores creados.</text:span></text:p>
            <text:list text:continue-numbering="true" text:style-name="L1">
              <text:list-item>
                <text:p text:style-name="P41"><text:span text:style-name="T7">Tarea relacionada: </text:span><text:span text:style-name="T15">Operaciones </text:span><text:span text:style-name="T17">CRUD</text:span><text:span text:style-name="T15"> del Repositorio de Temporizadores.</text:span></text:p>
              </text:list-item>
              <text:list-item>
                <text:p text:style-name="P41"><text:span text:style-name="T23">Problemas generados:</text:span><text:span text:style-name="T15"> Persistencia huérfana en la base de datos local y riesgo crítico de inconsistencia o pérdida de datos visualizados.</text:span></text:p>
              </text:list-item>
              <text:list-item>
                <text:p text:style-name="P41"><text:span text:style-name="T23">Cambios realizados / Lecciones:</text:span><text:span text:style-name="T15"> Implementar borrado lógico inmediato acompañado de una confirmación asíncrona mediante </text:span><text:span text:style-name="T17">callbacks</text:span><text:span text:style-name="T15"> de </text:span><text:span text:style-name="T17">Firebase</text:span><text:span text:style-name="T15">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6</text:span></text:span><text:span text:style-name="T15"> — Persistencia de errores en el botón de cerrar sesión (</text:span><text:span text:style-name="T17">Logout</text:span><text:span text:style-name="T15">).</text:span></text:p>
            <text:list text:continue-numbering="true" text:style-name="L1">
              <text:list-item>
                <text:p text:style-name="P42"><text:span text:style-name="T7">Tarea relacionada:</text:span> <text:span text:style-name="T15">Control de Ciclo de Vida de Sesión.</text:span></text:p>
              </text:list-item>
              <text:list-item>
                <text:p text:style-name="P42"><text:span text:style-name="T23">Problemas generados:</text:span><text:span text:style-name="T15"> El </text:span><text:span text:style-name="T17">token</text:span><text:span text:style-name="T15"> quedaba en caché, permitiendo regresar a la pantalla anterior sin credenciales válidas (Fallo de seguridad).</text:span></text:p>
              </text:list-item>
              <text:list-item>
                <text:p text:style-name="P42"><text:span text:style-name="T23">Cambios realizados / Lecciones:</text:span><text:span text:style-name="T15"> Invalidar explícitamente la instancia del cliente de autenticación e invocar un borrado completo de la pila de actividades (</text:span><text:span text:style-name="Source_20_Text"><text:span text:style-name="T17">Intent.FLAG_ACTIVITY_CLEAR_TOP</text:span></text:span><text:span text:style-name="T15">).</text:span></text:p>
              </text:list-item>
            </text:list>
            <text:p text:style-name="P24"><text:span text:style-name="T15"/></text:p>
            <text:p text:style-name="P24"><text:span text:style-name="T15"/></text:p>
            <text:p text:style-name="P24"><text:span text:style-name="T15"/></text:p>
          </table:table-cell>
        </table:table-row>
        <text:soft-page-break/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7</text:span></text:span><text:span text:style-name="T15"> — Fatal Error (</text:span><text:span text:style-name="T17">Crash</text:span><text:span text:style-name="T15">) al intentar acceder a la vista de opciones de Accesibilidad.</text:span></text:p>
            <text:list text:continue-numbering="true" text:style-name="L1">
              <text:list-item>
                <text:p text:style-name="P43"><text:span text:style-name="T8">Tarea relacionada:</text:span> <text:span text:style-name="T15">Vista de Ajustes de Accesibilidad.</text:span></text:p>
              </text:list-item>
              <text:list-item>
                <text:p text:style-name="P43"><text:span text:style-name="T23">Problemas generados:</text:span><text:span text:style-name="T15"> Caída drástica de la aplicación al presionar el botón de ajustes debido a inflado erróneo del fragmento.</text:span></text:p>
              </text:list-item>
              <text:list-item>
                <text:p text:style-name="P43"><text:span text:style-name="T23">Cambios realizados / Lecciones:</text:span><text:span text:style-name="T15"> </text:span><text:span text:style-name="T34">Aislar</text:span><text:span text:style-name="T15"> y </text:span><text:span text:style-name="T34">comprobar</text:span><text:span text:style-name="T15"> las vistas complejas mediante herramientas de UI unitaria de manera previa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8</text:span></text:span><text:span text:style-name="T15"> — Error crítico al activar el Modo Oscuro en las vistas </text:span><text:span text:style-name="T17">Home, Timers</text:span><text:span text:style-name="T15"> e </text:span><text:span text:style-name="T17">Info</text:span><text:span text:style-name="T15">.</text:span></text:p>
            <text:list text:continue-numbering="true" text:style-name="L1">
              <text:list-item>
                <text:p text:style-name="P44"><text:span text:style-name="T7">Tarea relacionada: </text:span><text:span text:style-name="T15">Aplicación de Temas Dinámicos en la UI.</text:span></text:p>
              </text:list-item>
              <text:list-item>
                <text:p text:style-name="P44"><text:span text:style-name="T23">Problemas generados:</text:span><text:span text:style-name="T15"> Bloqueo total (“</text:span><text:span text:style-name="T17">Crash”</text:span><text:span text:style-name="T15">) de la aplicación por falta de referencias de color en el archivo XML nocturno.</text:span></text:p>
              </text:list-item>
              <text:list-item>
                <text:p text:style-name="P44"><text:span text:style-name="T23">Cambios realizados / Lecciones:</text:span><text:span text:style-name="T15"> Validar la simetría absoluta de atributos entre el archivo </text:span><text:span text:style-name="Source_20_Text"><text:span text:style-name="T17">themes.xml</text:span></text:span><text:span text:style-name="T15"> estándar y su variante </text:span><text:span text:style-name="Source_20_Text"><text:span text:style-name="T17">night</text:span></text:span><text:span text:style-name="T15">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09</text:span></text:span><text:span text:style-name="T15"> — Estilos inconsistentes en los botones de la interfaz (cuadrados vs redondeados) entre temas.</text:span></text:p>
            <text:list text:continue-numbering="true" text:style-name="L1">
              <text:list-item>
                <text:p text:style-name="P45"><text:span text:style-name="T7">Tarea relacionada: </text:span><text:span text:style-name="T15">Centralización estética de la interfaz de usuario.</text:span></text:p>
              </text:list-item>
              <text:list-item>
                <text:p text:style-name="P45"><text:span text:style-name="T23">Problemas generados:</text:span><text:span text:style-name="T15"> Degradación de la consistencia de marca y de la </text:span><text:span text:style-name="T17">UX</text:span><text:span text:style-name="T15"> al saltar de modo claro a alto contraste.</text:span></text:p>
              </text:list-item>
              <text:list-item>
                <text:p text:style-name="P45"><text:span text:style-name="T23">Cambios realizados / Lecciones:</text:span><text:span text:style-name="T15"> Heredar de estilos globales unificados e inmutables del sistema de diseño base de la aplicación.</text:span></text:p>
              </text:list-item>
            </text:list>
          </table:table-cell>
        </table:table-row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10</text:span></text:span><text:span text:style-name="T15"> — Desajuste en el escalado de textos al usar unidades "</text:span><text:span text:style-name="T17">dp</text:span><text:span text:style-name="T15">" en lugar de "</text:span><text:span text:style-name="T17">sp</text:span><text:span text:style-name="T15">".</text:span></text:p>
            <text:list text:continue-numbering="true" text:style-name="L1">
              <text:list-item>
                <text:p text:style-name="P46"><text:span text:style-name="T7">Tarea relacionada: </text:span><text:span text:style-name="T15">Adaptabilidad de textos según normativas </text:span><text:span text:style-name="T17">WCAG</text:span><text:span text:style-name="T15">.</text:span></text:p>
              </text:list-item>
              <text:list-item>
                <text:p text:style-name="P46"><text:span text:style-name="T23">Problemas generados:</text:span><text:span text:style-name="T15"> Bloqueo en la accesibilidad para usuarios que dependen del </text:span><text:span text:style-name="T17">zoom</text:span><text:span text:style-name="T15"> de texto del sistema operativo móvil.</text:span></text:p>
              </text:list-item>
              <text:list-item>
                <text:p text:style-name="P46"><text:span text:style-name="T23">Cambios realizados / Lecciones:</text:span><text:span text:style-name="T15"> Prohibir el uso de "</text:span><text:span text:style-name="T17">dp</text:span><text:span text:style-name="T15">" para fuentes en el linter estático de código del proyecto Android.</text:span></text:p>
              </text:list-item>
            </text:list>
            <text:p text:style-name="P25"><text:span text:style-name="T15"/></text:p>
            <text:p text:style-name="P25"><text:span text:style-name="T15"/></text:p>
            <text:p text:style-name="P25"><text:span text:style-name="T15"/></text:p>
          </table:table-cell>
        </table:table-row>
        <text:soft-page-break/>
        <table:table-row>
          <table:table-cell table:style-name="Spring2.A2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11</text:span></text:span><text:span text:style-name="T15"> — El teclado virtual </text:span><text:span text:style-name="T17">ocultaba</text:span><text:span text:style-name="T15"> los formularios de entrada de datos al crear o editar temporizadores.</text:span></text:p>
            <text:list text:continue-numbering="true" text:style-name="L1">
              <text:list-item>
                <text:p text:style-name="P47"><text:span text:style-name="T7">Tarea relacionada: </text:span><text:span text:style-name="T15">Usabilidad en vistas de entrada de datos.</text:span></text:p>
              </text:list-item>
              <text:list-item>
                <text:p text:style-name="P47"><text:span text:style-name="T23">Problemas generados:</text:span><text:span text:style-name="T15"> Interrupción severa de la </text:span><text:span text:style-name="T17">UX</text:span><text:span text:style-name="T15"> en pantallas pequeñas al tapar el botón de guardado (Queda pendiente de rediseño de interfaz).</text:span></text:p>
              </text:list-item>
              <text:list-item>
                <text:p text:style-name="P47"><text:span text:style-name="T23">Cambios realizados / Lecciones:</text:span><text:span text:style-name="T15"> Envolver siempre los formularios extensos dentro de un componente contenedor de tipo </text:span><text:span text:style-name="Source_20_Text"><text:span text:style-name="T17">ScrollView</text:span></text:span><text:span text:style-name="T15">.</text:span></text:p>
              </text:list-item>
            </text:list>
          </table:table-cell>
        </table:table-row>
        <table:table-row>
          <table:table-cell table:style-name="Spring2.A11" office:value-type="string">
            <text:p text:style-name="P22"><text:span text:style-name="T15">📋 </text:span><text:span text:style-name="T23">Incidencia:</text:span><text:span text:style-name="T15"> </text:span><text:span text:style-name="Source_20_Text"><text:span text:style-name="T15">INC-12</text:span></text:span><text:span text:style-name="T15"> — Redirección errónea a la pantalla de inicio tras aplicar cambios en accesibilidad.</text:span></text:p>
            <text:list xml:id="list191231162354251" text:continue-numbering="true" text:style-name="L1">
              <text:list-item>
                <text:p text:style-name="P48"><text:span text:style-name="T7">Tarea relacionada: </text:span><text:span text:style-name="T15">Gestión de navegación y persistencia de configuraciones.</text:span></text:p>
              </text:list-item>
              <text:list-item>
                <text:p text:style-name="P48"><text:span text:style-name="T23">Problemas generados:</text:span><text:span text:style-name="T15"> Error de flujo molesto que obligaba al usuario a re-navegar las opciones de nuevo.</text:span></text:p>
              </text:list-item>
              <text:list-item>
                <text:p text:style-name="P48"><text:span text:style-name="T23">Cambios realizados / Lecciones:</text:span><text:span text:style-name="T15"> Guardar el estado exacto del fragmento previo en la memoria persistente local antes de forzar la recreación del tema gráfico de la actividad.</text:span></text:p>
              </text:list-item>
            </text:list>
          </table:table-cell>
        </table:table-row>
      </table:table>
      <text:h text:style-name="P5" text:outline-level="3"/>
      <text:h text:style-name="P5" text:outline-level="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0" text:outline-level="3"><text:soft-page-break/>Sprint 3: Control de Calidad (Testing Automatizado), Cobertura e Integración de <text:span text:style-name="T39">la</text:span> Documentación</text:h>
      <text:list text:style-name="L5">
        <text:list-item>
          <text:p text:style-name="P60"><text:span text:style-name="T7">Fecha de Inicio:</text:span> 30 de abril de 2026</text:p>
        </text:list-item>
        <text:list-item>
          <text:p text:style-name="P60"><text:span text:style-name="T7">Fecha de Fin:</text:span> <text:span text:style-name="T39">5</text:span> de <text:span text:style-name="T39">junio</text:span> de 2026</text:p>
        </text:list-item>
        <text:list-item>
          <text:p text:style-name="P63"><text:span text:style-name="T23">Tablero Kanban:</text:span><text:span text:style-name="T15"> Como se ilustra visualmente en el panel del repositorio, la tarjeta clave:</text:span><text:span text:style-name="T16"> Documentación y Pruebas (Tests)”</text:span><text:span text:style-name="T15"> se mantuvo de forma activa en la columna </text:span><text:span text:style-name="T23">“</text:span><text:span text:style-name="T20">In progress”</text:span><text:span text:style-name="T15">, centralizando las actividades de aseguramiento de calidad antes del cierre técnico.</text:span></text:p>
        </text:list-item>
      </text:list>
      <table:table table:name="Sprint3" table:style-name="Sprint3" table:template-name="Elegant">
        <table:table-column table:style-name="Sprint3.A"/>
        <table:table-header-rows>
          <table:table-row>
            <table:table-cell table:style-name="Sprint3.A1" office:value-type="string">
              <text:h text:style-name="P16" text:outline-level="3"><text:span text:style-name="Strong_20_Emphasis"><text:span text:style-name="T6">Detalle de Incidencias Técnicas Registradas (Sprint 3)</text:span></text:span></text:h>
            </table:table-cell>
          </table:table-row>
        </table:table-header-rows>
        <table:table-row>
          <table:table-cell table:style-name="Sprint3.A2" office:value-type="string">
            <text:p text:style-name="P26"><text:span text:style-name="T15">📋 </text:span><text:span text:style-name="T23">Incidencia:</text:span><text:span text:style-name="T15"> </text:span><text:span text:style-name="Source_20_Text"><text:span text:style-name="T15">INC-QA-01</text:span></text:span><text:span text:style-name="T15"> — Conflictos e incompatibilidades de </text:span><text:span text:style-name="T17">Gradle</text:span><text:span text:style-name="T15"> al ejecutar la suite completa de pruebas unitarias con herramientas de cobertura (</text:span><text:span text:style-name="T17">JaCoCo</text:span><text:span text:style-name="T15">).</text:span></text:p>
            <text:list text:continue-list="list191231162354251" text:style-name="L1">
              <text:list-item>
                <text:p text:style-name="P49"><text:span text:style-name="T8">Tarea relacionada:</text:span> <text:span text:style-name="T15">Implementación de pruebas unitarias masivas (</text:span><text:span text:style-name="Source_20_Text"><text:span text:style-name="T17">MainActivityTest</text:span></text:span><text:span text:style-name="T17">, </text:span><text:span text:style-name="Source_20_Text"><text:span text:style-name="T17">TimerRepositoryTest</text:span></text:span><text:span text:style-name="T17">, </text:span><text:span text:style-name="Source_20_Text"><text:span text:style-name="T17">PostRepositoryTest</text:span></text:span><text:span text:style-name="T15">).</text:span></text:p>
              </text:list-item>
              <text:list-item>
                <text:p text:style-name="P49"><text:span text:style-name="T23">Problemas generados:</text:span><text:span text:style-name="T15"> Las pruebas se ejecutaban correctamente de forma aislada, pero fallaban en bloque o causaban desbordamientos de memoria al lanzarse en el entorno </text:span><text:span text:style-name="T17">CI/CD</text:span><text:span text:style-name="T15"> remoto.</text:span></text:p>
              </text:list-item>
              <text:list-item>
                <text:p text:style-name="P49"><text:span text:style-name="T23">Cambios realizados / Lecciones:</text:span><text:span text:style-name="T15"> Aislar las llamadas de base de datos simuladas de </text:span><text:span text:style-name="T17">Robolectric </text:span><text:span text:style-name="T28">(</text:span><text:span text:style-name="Source_20_Text"><text:span text:style-name="T17">Robolectric SQLite modes</text:span></text:span><text:span text:style-name="T15">) por cada clase individual de prueba y estructurar la inyección estática de propiedades.</text:span></text:p>
              </text:list-item>
            </text:list>
          </table:table-cell>
        </table:table-row>
        <table:table-row>
          <table:table-cell table:style-name="Sprint3.A2" office:value-type="string">
            <text:p text:style-name="P23"><text:span text:style-name="T15">📋 </text:span><text:span text:style-name="T23">Incidencia:</text:span><text:span text:style-name="T15"> </text:span><text:span text:style-name="Source_20_Text"><text:span text:style-name="T15">INC-QA-02</text:span></text:span><text:span text:style-name="T15"> — Caídas por hilos de ejecución en segundo plano (</text:span><text:span text:style-name="Source_20_Text"><text:span text:style-name="T17">background threading crash</text:span></text:span><text:span text:style-name="T15">) durante el “mockeo” de </text:span><text:span text:style-name="T17">Firestore</text:span><text:span text:style-name="T15"> en </text:span><text:span text:style-name="Source_20_Text"><text:span text:style-name="T17">PostRepositoryTest</text:span></text:span><text:span text:style-name="T15">.</text:span></text:p>
            <text:list text:continue-numbering="true" text:style-name="L1">
              <text:list-item>
                <text:p text:style-name="P50"><text:span text:style-name="T8">Tarea relacionada:</text:span><text:span text:style-name="T7"> </text:span><text:span text:style-name="T15">Cobertura de la capa de datos de </text:span><text:span text:style-name="T17">Firebase</text:span><text:span text:style-name="T15">.</text:span></text:p>
              </text:list-item>
              <text:list-item>
                <text:p text:style-name="P51"><text:span text:style-name="T23">Problemas generados:</text:span><text:span text:style-name="T15"> Interrupción abrupta de la integración continua (</text:span><text:span text:style-name="T17">GitHub Actions</text:span><text:span text:style-name="T15">) debido a respuestas asíncronas no controladas.</text:span></text:p>
              </text:list-item>
              <text:list-item>
                <text:p text:style-name="P51"><text:span text:style-name="T23">Cambios realizados / Lecciones:</text:span><text:span text:style-name="T15"> Implementar </text:span><text:span text:style-name="T17">mocks</text:span><text:span text:style-name="T15"> estrictos de las tareas asíncronas de </text:span><text:span text:style-name="T17">Firebase</text:span><text:span text:style-name="T15"> y forzar despachadores síncronos de prueba en </text:span><text:span text:style-name="T17">Kotlin Coroutines</text:span><text:span text:style-name="T15"> (</text:span><text:span text:style-name="Source_20_Text"><text:span text:style-name="T17">TestDispatcher</text:span></text:span><text:span text:style-name="T15">).</text:span></text:p>
              </text:list-item>
            </text:list>
          </table:table-cell>
        </table:table-row>
        <table:table-row>
          <table:table-cell table:style-name="Sprint3.A4" office:value-type="string">
            <text:p text:style-name="P23"><text:span text:style-name="T15">📋 </text:span><text:span text:style-name="T23">Incidencia:</text:span><text:span text:style-name="T15"> </text:span><text:span text:style-name="Source_20_Text"><text:span text:style-name="T15">INC-QA-03</text:span></text:span><text:span text:style-name="T15"> — Fallos recurrentes en el motor de análisis estático </text:span><text:span text:style-name="T17">SonarCloud</text:span><text:span text:style-name="T15"> debidos a la inyección de </text:span><text:span text:style-name="T17">Beans</text:span><text:span text:style-name="T15"> incompatibles con la versión 8.13 de </text:span><text:span text:style-name="T17">Gradle</text:span><text:span text:style-name="T15">.</text:span></text:p>
            <text:list text:continue-numbering="true" text:style-name="L1">
              <text:list-item>
                <text:p text:style-name="P52"><text:span text:style-name="T8">Tarea relacionada:</text:span><text:span text:style-name="T7"> </text:span><text:span text:style-name="T17">Pipeline</text:span><text:span text:style-name="T15"> automatizado de calidad de software en la nube.</text:span></text:p>
              </text:list-item>
              <text:list-item>
                <text:p text:style-name="P53"><text:span text:style-name="T23">Problemas generados:</text:span><text:span text:style-name="T15"> Bloqueo de las </text:span><text:span text:style-name="T17">Pull Requests</text:span><text:span text:style-name="T15"> en </text:span><text:span text:style-name="T17">GitHub</text:span><text:span text:style-name="T15"> al arrojar excepciones de conversión de cadenas (</text:span><text:span text:style-name="Source_20_Text"><text:span text:style-name="T17">String cast exceptions</text:span></text:span><text:span text:style-name="T15">).</text:span></text:p>
              </text:list-item>
              <text:list-item>
                <text:p text:style-name="P53"><text:span text:style-name="T23">Cambios realizados / Lecciones:</text:span><text:span text:style-name="T15"> Centralizar y unificar el </text:span><text:span text:style-name="T17">plugin</text:span><text:span text:style-name="T15"> clásico de SonarQube directamente en el directorio raíz (</text:span><text:span text:style-name="Source_20_Text"><text:span text:style-name="T17">root</text:span></text:span><text:span text:style-name="T15">), abstrayendo las rutas mediante colecciones nativas de tipo </text:span><text:span text:style-name="Source_20_Text"><text:span text:style-name="T15">files()</text:span></text:span><text:span text:style-name="T15"> en lugar de rutas absolutas cableadas.</text:span></text:p>
              </text:list-item>
            </text:list>
          </table:table-cell>
        </table:table-row>
      </table:table>
      <text:p text:style-name="P6"/>
      <text:h text:style-name="P3" text:outline-level="2"><text:soft-page-break/><text:span text:style-name="T37">Tablero</text:span> Kanban</text:h>
      <text:p text:style-name="P19"><text:span text:style-name="T16">(El estado y avance detallado de las actividades de cierre se puede contrastar directamente en la interfaz del tablero Scrum/</text:span><text:span text:style-name="T21">Kanban</text:span><text:span text:style-name="T16">, disponible </text:span><text:span text:style-name="T21">mediante</text:span><text:span text:style-name="T16"> </text:span><text:span text:style-name="T22">las imágenes adjuntas a continuación</text:span><text:span text:style-name="T16">.</text:span></text:p>
      <text:p text:style-name="P32"><draw:frame draw:style-name="fr2" draw:name="Imagen3" text:anchor-type="char" svg:x="0cm" svg:y="0.649cm" svg:width="17.806cm" svg:height="8.322cm" draw:z-index="6"><draw:image xlink:href="Pictures/100000010000077D0000038016F93D3D.png" xlink:type="simple" xlink:show="embed" xlink:actuate="onLoad" draw:mime-type="image/png"/></draw:frame><text:span text:style-name="T16">1er Sprint:</text:span></text:p>
      <text:p text:style-name="P33"><text:span text:style-name="T16"/></text:p>
      <text:p text:style-name="P61">MPV Actual:</text:p>
      <text:p text:style-name="P20"><draw:frame draw:style-name="fr1" draw:name="Imagen4" text:anchor-type="char" svg:x="0cm" svg:y="0.203cm" svg:width="17.761cm" svg:height="9.947cm" draw:z-index="7"><draw:image xlink:href="Pictures/1000000100000650000003F4FC6F812F.png" xlink:type="simple" xlink:show="embed" xlink:actuate="onLoad" draw:mime-type="image/png"/></draw:frame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h text:style-name="P15" text:outline-level="3"><text:soft-page-break/><text:span text:style-name="T5">Análisis de Retrospectiva y Comentarios Posteriores</text:span></text:h>
      <text:list text:style-name="L6">
        <text:list-item>
          <text:p text:style-name="P64"><text:span text:style-name="T23">Sobre la Gestión de Errores Críticos (</text:span><text:span text:style-name="T20">Crashes</text:span><text:span text:style-name="T23">):</text:span><text:span text:style-name="T15"> La mayoría de los errores fatales (</text:span><text:span text:style-name="Source_20_Text"><text:span text:style-name="T15">INC-07</text:span></text:span><text:span text:style-name="T15"> y </text:span><text:span text:style-name="Source_20_Text"><text:span text:style-name="T15">INC-08</text:span></text:span><text:span text:style-name="T15">) ocurrieron durante la implementación de las opciones de accesibilidad. Esto nos enseñó la importancia de probar cada vista de “forma aislada” (Implementando una especie de “</text:span><text:span text:style-name="T17">Unit</text:span><text:span text:style-name="T15"> </text:span><text:span text:style-name="T17">Testing de UI”</text:span><text:span text:style-name="T15">) antes de integrarlas en el flujo/rama de desarrollo principal.</text:span></text:p>
        </text:list-item>
        <text:list-item>
          <text:p text:style-name="P64"><text:span text:style-name="T23">Sobre la Experiencia de Usuario (</text:span><text:span text:style-name="T20">UX</text:span><text:span text:style-name="T23">):</text:span><text:span text:style-name="T15"> La </text:span><text:span text:style-name="Source_20_Text"><text:span text:style-name="T15">INC-11</text:span></text:span><text:span text:style-name="T15"> fue una de las más complejas de detectar, ya que solo ocurría en dispositivos con pantallas pequeñas. La solución no solo fue técnica, sino de diseño, obligándonos a repensar cómo se presentan los formularios en móviles.</text:span></text:p>
        </text:list-item>
        <text:list-item>
          <text:p text:style-name="P64"><text:span text:style-name="T23">Sobre la Consistencia Visual:</text:span><text:span text:style-name="T15"> Gracias a la resolución de la </text:span><text:span text:style-name="Source_20_Text"><text:span text:style-name="T15">INC-09</text:span></text:span><text:span text:style-name="T15">, logramos que Temporis mantenga una identidad de marca sólida (botones redondeados, tipografía legible) independientemente de si el usuario utiliza el modo de alto contraste o el oscuro.</text:span></text:p>
        </text:list-item>
      </text:list>
      <text:h text:style-name="P30" text:outline-level="3">4. Procedimiento de Gestión de Cambios</text:h>
      <text:p text:style-name="P9">Ante cualquier desviación (como las mejoras de accesibilidad solicitadas), he aplicado un protocolo de:</text:p>
      <text:list text:style-name="L7">
        <text:list-item>
          <text:p text:style-name="P57"><text:span text:style-name="T7">Identificación:</text:span> <text:span text:style-name="T41">Se ha detectado</text:span> el cambio necesario.</text:p>
        </text:list-item>
        <text:list-item>
          <text:p text:style-name="P65"><text:span text:style-name="T23">Análisis de Impacto:</text:span><text:span text:style-name="T15"> </text:span><text:span text:style-name="T35">Se ha evaluado</text:span><text:span text:style-name="T15"> si afecta a la fecha de entrega de</text:span><text:span text:style-name="T35">finida en e</text:span><text:span text:style-name="T15">l </text:span><text:span text:style-name="T17">Gantt</text:span><text:span text:style-name="T15">.</text:span></text:p>
        </text:list-item>
        <text:list-item>
          <text:p text:style-name="P57"><text:span text:style-name="T7">Repriorización:</text:span> <text:span text:style-name="T41">Se ha movido las</text:span> tareas menos críticas (ej. animaciones extra) al siguiente <text:span text:style-name="T12">Sprint</text:span> <text:span text:style-name="T41">o al </text:span><text:span text:style-name="T13">Backlog</text:span><text:span text:style-name="T41"> </text:span>para dar cabida a la corrección.</text:p>
        </text:list-item>
      </text:list>
      <text:h text:style-name="P30" text:outline-level="3">5. Retrospectiva del Proyecto</text:h>
      <text:p text:style-name="P9">Al finalizar los <text:span text:style-name="T12">Sprints</text:span>, he concluido que la centralización de estilos en el archivo de temas base ahorra tiempo y evita errores de contraste. La integración temprana con <text:span text:style-name="T12">Firebase</text:span> facilitó detectar problemas de latencia desde el primer momento. Asimismo, la decisión estratégica de dedicar el <text:span text:style-name="T14">Sprint 3</text:span> exclusivamente al aseguramiento y refactorización de código mediante SonarCloud <text:span text:style-name="T40">permitió</text:span> que la versión final de la aplicación <text:span text:style-name="T40">pueda mantener y asegurar</text:span> los estándares técnicos exigidos, <text:span text:style-name="T40">en un futuro y haciendo uso de </text:span>una <text:span text:style-name="T12">suite/</text:span><text:span text:style-name="T40">colección </text:span>robusta de pruebas automatizadas <text:span text:style-name="T40">y</text:span> funcion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042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guimiento del Proyecto - Scrum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6-03T19:12:29.710374808</dc:date>
    <meta:editing-duration>P1DT3H44M12S</meta:editing-duration>
    <meta:editing-cycles>715</meta:editing-cycles>
    <meta:print-date>2026-06-03T19:05:09.150151356</meta:print-date>
    <meta:printed-by>Archivos PDF</meta:printed-by>
    <meta:document-statistic meta:table-count="4" meta:image-count="3" meta:object-count="0" meta:page-count="10" meta:paragraph-count="163" meta:word-count="2077" meta:character-count="13513" meta:non-whitespace-character-count="11644"/>
  </office:meta>
</office:document-meta>
</file>
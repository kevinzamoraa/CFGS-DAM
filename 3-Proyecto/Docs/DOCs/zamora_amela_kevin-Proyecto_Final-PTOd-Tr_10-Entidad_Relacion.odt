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F0000039A73BE5E49.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Heading_20_2">
      <style:paragraph-properties fo:line-height="150%" fo:text-align="center" style:justify-single-word="false"/>
      <style:text-properties officeooo:paragraph-rsid="00cc3084"/>
    </style:style>
    <style:style style:name="P5"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none" fo:font-weight="normal" officeooo:rsid="01a5417d" officeooo:paragraph-rsid="00cc3084" style:font-size-asian="15pt" style:font-weight-asian="normal" style:font-size-complex="15pt" style:font-weight-complex="normal"/>
    </style:style>
    <style:style style:name="P6" style:family="paragraph" style:parent-style-name="Heading_20_2">
      <style:paragraph-properties fo:line-height="150%" fo:text-align="center" style:justify-single-word="false" fo:keep-with-next="always"/>
      <style:text-properties officeooo:paragraph-rsid="00cc3084"/>
    </style:style>
    <style:style style:name="P7" style:family="paragraph" style:parent-style-name="Heading_20_2">
      <style:paragraph-properties fo:line-height="150%" fo:text-align="center" style:justify-single-word="false"/>
      <style:text-properties officeooo:paragraph-rsid="00cc3084"/>
    </style:style>
    <style:style style:name="P8" style:family="paragraph" style:parent-style-name="Text_20_body">
      <style:paragraph-properties fo:text-align="justify" style:justify-single-word="false"/>
    </style:style>
    <style:style style:name="P9" style:family="paragraph" style:parent-style-name="Text_20_body" style:list-style-name="L8">
      <style:paragraph-properties fo:text-align="justify" style:justify-single-word="false"/>
    </style:style>
    <style:style style:name="P10" style:family="paragraph" style:parent-style-name="Text_20_body" style:list-style-name="L8">
      <style:paragraph-properties fo:text-align="justify" style:justify-single-word="false"/>
      <style:text-properties officeooo:paragraph-rsid="01fa6079"/>
    </style:style>
    <style:style style:name="P11" style:family="paragraph" style:parent-style-name="Text_20_body" style:list-style-name="L9">
      <style:paragraph-properties fo:text-align="justify" style:justify-single-word="false"/>
    </style:style>
    <style:style style:name="P12" style:family="paragraph" style:parent-style-name="Text_20_body" style:list-style-name="L10">
      <style:paragraph-properties fo:margin-top="0cm" fo:margin-bottom="0.046cm" style:contextual-spacing="false" fo:text-align="justify" style:justify-single-word="false"/>
    </style:style>
    <style:style style:name="P13" style:family="paragraph" style:parent-style-name="Text_20_body" style:list-style-name="L11">
      <style:paragraph-properties fo:margin-top="0cm" fo:margin-bottom="0.046cm" style:contextual-spacing="false" fo:text-align="justify" style:justify-single-word="false"/>
    </style:style>
    <style:style style:name="P14" style:family="paragraph" style:parent-style-name="Text_20_body" style:list-style-name="L12">
      <style:paragraph-properties fo:margin-top="0cm" fo:margin-bottom="0.046cm" style:contextual-spacing="false" fo:text-align="justify" style:justify-single-word="false"/>
    </style:style>
    <style:style style:name="P15" style:family="paragraph" style:parent-style-name="Text_20_body" style:list-style-name="L13">
      <style:paragraph-properties fo:margin-top="0cm" fo:margin-bottom="0.046cm" style:contextual-spacing="false" fo:text-align="justify" style:justify-single-word="false"/>
    </style:style>
    <style:style style:name="P16" style:family="paragraph" style:parent-style-name="Text_20_body" style:list-style-name="L14">
      <style:paragraph-properties fo:text-align="justify" style:justify-single-word="false"/>
    </style:style>
    <style:style style:name="P17" style:family="paragraph" style:parent-style-name="Text_20_body">
      <style:paragraph-properties fo:line-height="150%" fo:text-align="center" style:justify-single-word="false"/>
      <style:text-properties officeooo:paragraph-rsid="00cc3084"/>
    </style:style>
    <style:style style:name="P18" style:family="paragraph" style:parent-style-name="Text_20_body">
      <style:paragraph-properties fo:text-align="justify" style:justify-single-word="false"/>
      <style:text-properties style:font-name="MathJax_Typewriter" fo:font-weight="bold" style:font-weight-asian="bold" style:font-weight-complex="bold"/>
    </style:style>
    <style:style style:name="P19" style:family="paragraph" style:parent-style-name="Text_20_body">
      <style:paragraph-properties fo:margin-top="0.302cm" fo:margin-bottom="0.549cm" style:contextual-spacing="false" fo:text-align="justify" style:justify-single-word="false"/>
      <style:text-properties style:font-name="MathJax_Typewriter" fo:font-weight="bold" style:font-weight-asian="bold" style:font-weight-complex="bold"/>
    </style:style>
    <style:style style:name="P20" style:family="paragraph">
      <style:paragraph-properties fo:text-align="center"/>
    </style:style>
    <style:style style:name="P21" style:family="paragraph">
      <loext:graphic-properties draw:fill="none" draw:fill-color="#ffffff"/>
      <style:paragraph-properties fo:text-align="center"/>
      <style:text-properties style:font-name="MathJax_SansSerif" fo:font-size="40pt" style:font-size-asian="40pt" style:font-size-complex="40pt"/>
    </style:style>
    <style:style style:name="P22" style:family="paragraph">
      <loext:graphic-properties draw:fill="none" draw:fill-color="#ffffff"/>
      <style:paragraph-properties fo:text-align="center"/>
      <style:text-properties style:font-name="MathJax_Typewriter" fo:font-size="26pt" style:font-size-asian="26pt" style:font-size-complex="26pt"/>
    </style:style>
    <style:style style:name="P23"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24" style:family="paragraph">
      <loext:graphic-properties draw:fill="solid" draw:fill-color="#dedce6"/>
      <style:paragraph-properties style:writing-mode="lr-tb"/>
    </style:style>
    <style:style style:name="P25" style:family="paragraph">
      <loext:graphic-properties draw:fill-color="#ffffff"/>
      <style:paragraph-properties fo:text-align="center"/>
    </style:style>
    <style:style style:name="T1" style:family="text">
      <style:text-properties style:font-name="MathJax_Typewriter" fo:font-size="15pt" fo:font-weight="normal" officeooo:rsid="018c626a" style:font-size-asian="15pt" style:font-weight-asian="normal" style:font-size-complex="15pt" style:font-weight-complex="normal"/>
    </style:style>
    <style:style style:name="T2" style:family="text">
      <style:text-properties style:font-name="MathJax_Typewriter" fo:font-size="15pt" fo:font-weight="normal" officeooo:rsid="003bb751" style:font-size-asian="15pt" style:font-weight-asian="normal" style:font-size-complex="15pt" style:font-weight-complex="normal"/>
    </style:style>
    <style:style style:name="T3" style:family="text">
      <style:text-properties style:font-name="MathJax_Typewriter" fo:font-size="15pt" fo:font-weight="normal" officeooo:rsid="006b4a44" style:font-size-asian="15pt" style:font-weight-asian="normal" style:font-size-complex="15pt"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color="#000000" loext:opacity="100%" fo:font-size="15pt" style:font-size-asian="15pt" style:font-size-complex="15pt"/>
    </style:style>
    <style:style style:name="T8" style:family="text">
      <style:text-properties fo:color="#000000" loext:opacity="100%" style:font-name="MathJax_Typewriter"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T9" style:family="text">
      <style:text-properties fo:color="#000000" loext:opacity="100%" style:font-name="MathJax_Typewriter" fo:font-size="15pt" style:text-underline-style="solid" style:text-underline-width="auto" style:text-underline-color="font-color" fo:font-weight="normal" officeooo:rsid="01a5417d" style:font-size-asian="15pt" style:font-weight-asian="normal" style:font-size-complex="15pt" style:font-weight-complex="normal"/>
    </style:style>
    <style:style style:name="T10" style:family="text">
      <style:text-properties fo:color="#000000" loext:opacity="100%" style:font-name="MathJax_Typewriter" fo:font-size="15pt" style:text-underline-style="none" fo:font-weight="normal" officeooo:rsid="01876577" style:font-name-asian="Noto Serif CJK SC" style:font-size-asian="15pt" style:font-weight-asian="normal" style:font-name-complex="FreeSans" style:font-size-complex="15pt" style:font-weight-complex="normal"/>
    </style:style>
    <style:style style:name="T11" style:family="text">
      <style:text-properties fo:color="#000000" loext:opacity="100%" style:font-name="MathJax_Typewriter" fo:font-size="15pt" style:text-underline-style="none" fo:font-weight="normal" officeooo:rsid="00cc3084" style:font-name-asian="Noto Serif CJK SC" style:font-size-asian="15pt" style:font-weight-asian="normal" style:font-name-complex="FreeSans" style:font-size-complex="15pt" style:font-weight-complex="normal"/>
    </style:style>
    <style:style style:name="T12" style:family="text">
      <style:text-properties fo:color="#000000" loext:opacity="100%" style:font-name="MathJax_Typewriter" fo:font-size="15pt" style:text-underline-style="none" fo:font-weight="normal" officeooo:rsid="01a5417d" style:font-name-asian="Noto Serif CJK SC" style:font-size-asian="15pt" style:font-weight-asian="normal" style:font-name-complex="FreeSans" style:font-size-complex="15pt" style:font-weight-complex="normal"/>
    </style:style>
    <style:style style:name="T13" style:family="text">
      <style:text-properties fo:color="#000000" loext:opacity="100%" style:font-name="MathJax_Typewriter" fo:font-size="15pt" style:text-underline-style="none" fo:font-weight="normal" officeooo:rsid="01a5417d" style:font-size-asian="15pt" style:font-weight-asian="normal" style:font-size-complex="15pt" style:font-weight-complex="normal"/>
    </style:style>
    <style:style style:name="T14" style:family="text">
      <style:text-properties fo:font-style="italic" style:font-style-asian="italic" style:font-style-complex="italic"/>
    </style:style>
    <style:style style:name="T15" style:family="text">
      <style:text-properties fo:font-style="italic" officeooo:rsid="01f6cb74"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text-underline-style="solid" style:text-underline-width="auto" style:text-underline-color="font-color"/>
    </style:style>
    <style:style style:name="T18" style:family="text">
      <style:text-properties style:font-name="MathJax_Typewriter"/>
    </style:style>
    <style:style style:name="T19" style:family="text">
      <style:text-properties style:font-name="MathJax_Typewriter" officeooo:rsid="01f33bd9"/>
    </style:style>
    <style:style style:name="T20" style:family="text">
      <style:text-properties style:font-name="MathJax_Typewriter" fo:font-style="italic" style:font-style-asian="italic" style:font-style-complex="italic"/>
    </style:style>
    <style:style style:name="T21" style:family="text">
      <style:text-properties style:font-name="MathJax_Typewriter" officeooo:rsid="01fa30e6"/>
    </style:style>
    <style:style style:name="T22" style:family="text">
      <style:text-properties style:font-name="MathJax_Typewriter" officeooo:rsid="01fd03c9"/>
    </style:style>
    <style:style style:name="T23" style:family="text">
      <style:text-properties style:font-name="MathJax_Typewriter" officeooo:rsid="01fc1ef8"/>
    </style:style>
    <style:style style:name="T24" style:family="text">
      <style:text-properties officeooo:rsid="01f6cb74"/>
    </style:style>
    <style:style style:name="T25" style:family="text">
      <style:text-properties officeooo:rsid="01fc1ef8"/>
    </style:style>
    <style:style style:name="T26" style:family="text">
      <style:text-properties officeooo:rsid="01fd03c9"/>
    </style:style>
    <style:style style:name="T27" style:family="text">
      <style:text-properties officeooo:rsid="01fdbe97"/>
    </style:style>
    <style:style style:name="T28" style:family="text">
      <style:text-properties style:font-name="MathJax_SansSerif" fo:font-size="40pt" style:text-underline-style="none" fo:font-weight="bold" style:font-size-asian="40pt" style:font-weight-asian="bold" style:font-size-complex="40pt" style:font-weight-complex="bold"/>
    </style:style>
    <style:style style:name="T29" style:family="text">
      <style:text-properties style:font-name="MathJax_Typewriter" fo:font-size="26pt" style:text-underline-style="none" style:font-size-asian="26pt" style:font-size-complex="26pt"/>
    </style:style>
    <style:style style:name="T30"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24" svg:width="10.699cm" svg:height="29.795cm" svg:x="-2.833cm" svg:y="-2.82cm"><text:p/><draw:enhanced-geometry svg:viewBox="0 0 21600 21600" draw:type="rectangle" draw:enhanced-path="M 0 0 L 21600 0 21600 21600 0 21600 0 0 Z N"/></draw:custom-shape><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draw:frame draw:style-name="fr1" draw:name="Imagen2" text:anchor-type="char" svg:x="-0.647cm" svg:y="0.125cm" svg:width="7.987cm" svg:height="7.987cm" draw:z-index="2"><draw:image xlink:href="Pictures/10000001000001B0000001B04AB7F566.png" xlink:type="simple" xlink:show="embed" xlink:actuate="onLoad" draw:mime-type="image/png"/></draw:frame><text:span text:style-name="T6"/></text:p>
      <text:p text:style-name="P2"><text:span text:style-name="T6"/></text:p>
      <text:p text:style-name="P2"><text:span text:style-name="T6"/></text:p>
      <text:p text:style-name="P2"><draw:frame text:anchor-type="paragraph" draw:z-index="3" draw:name="Marco de texto 1" draw:style-name="gr3" draw:text-style-name="P23" svg:width="9.129cm" svg:height="5.118cm" svg:x="1.757cm" svg:y="0.002cm"><draw:text-box><text:p text:style-name="P20"><text:span text:style-name="T30">Diagrama </text:span><text:span text:style-name="T30">Entidad - </text:span><text:span text:style-name="T30">Relación</text:span></text:p></draw:text-box></draw:frame><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draw:frame text:anchor-type="paragraph" draw:z-index="5" draw:name="Marco de texto 3" draw:style-name="gr1" draw:text-style-name="P21" svg:width="7.873cm" svg:height="1.414cm" svg:x="-0.6cm" svg:y="0.312cm"><draw:text-box><text:p text:style-name="P20"><text:span text:style-name="T28">Temporis:</text:span></text:p></draw:text-box></draw:frame><text:span text:style-name="T6"/></text:p>
      <text:p text:style-name="P2"><text:span text:style-name="T6"/></text:p>
      <text:p text:style-name="P2"><text:span text:style-name="T6"/></text:p>
      <text:p text:style-name="P2"><draw:frame text:anchor-type="paragraph" draw:z-index="4" draw:name="Marco de texto 2" draw:style-name="gr2" draw:text-style-name="P22" svg:width="7.839cm" svg:height="4.329cm" svg:x="-0.563cm" svg:y="0.381cm"><draw:text-box><text:p text:style-name="P20"><text:span text:style-name="T29">Una herramienta </text:span><text:span text:style-name="T29">accesible para el </text:span><text:span text:style-name="T29">control y la </text:span><text:span text:style-name="T29">optimización de </text:span><text:span text:style-name="T29">nuestro tiempo</text:span></text:p></draw:text-box></draw:frame><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draw:custom-shape text:anchor-type="paragraph" draw:z-index="0" draw:name="Forma 2" draw:style-name="gr5" draw:text-style-name="P25" svg:width="2.449cm" svg:height="2.449cm" svg:x="8.46cm" svg:y="0.646cm"><text:p/><draw:enhanced-geometry svg:viewBox="0 0 21600 21600" draw:type="rectangle" draw:enhanced-path="M 0 0 L 21600 0 21600 21600 0 21600 0 0 Z N"/></draw:custom-shape><text:span text:style-name="T6"/></text:p>
      <text:p text:style-name="P3"><text:span text:style-name="T7"/></text:p>
      <text:h text:style-name="P4" text:outline-level="2"><text:soft-page-break/><text:span text:style-name="T10">1</text:span><text:span text:style-name="T11">. </text:span><text:span text:style-name="T8">Diagrama Entidad - Relación</text:span></text:h>
      <text:p text:style-name="P8"><draw:frame draw:style-name="fr1" draw:name="Imagen1" text:anchor-type="char" svg:x="0.173cm" svg:y="0.769cm" svg:width="17.131cm" svg:height="16.2cm" draw:z-index="6"><draw:image xlink:href="Pictures/10000000000003CF0000039A73BE5E49.png" xlink:type="simple" xlink:show="embed" xlink:actuate="onLoad" draw:mime-type="image/png"/></draw:frame></text:p>
      <text:p text:style-name="P8"/>
      <text:p text:style-name="P17"/>
      <text:h text:style-name="P4" text:outline-level="2"><text:span text:style-name="T12">1.1 </text:span><text:span text:style-name="T8">Introducción al Modelo de Datos</text:span></text:h>
      <text:p text:style-name="P8">El presente documento detalla el <text:span text:style-name="T5">Diagrama Entidad-Relación (E-R)</text:span> del proyecto <text:span text:style-name="T5">Temporis</text:span>. El diseño de este modelo se ha desvinculado de la rigidez de los ficheros de código fuente para centrarse en la estructura lógica de los datos que persisten en el <text:span text:style-name="T14">backend</text:span>. Cada entidad responde de manera directa a los requisitos de almacenamiento, análisis de tiempos y distribución de contenidos informativos de la aplicación.</text:p>
      <text:p text:style-name="P8"/>
      <text:p text:style-name="P8"/>
      <text:h text:style-name="P6" text:outline-level="2"><text:soft-page-break/><text:span text:style-name="T13">2. </text:span><text:span text:style-name="T9">Justificación Tecnológica: NoSQL (Firebase Firestore) vs. Relacional (SQL)</text:span></text:h>
      <text:p text:style-name="P8">Para el desarrollo de Temporis, se ha optado por implementar una base de datos <text:span text:style-name="T14">NoSQL</text:span> orientada a documentos mediante <text:span text:style-name="T14">Firebase Cloud Firestore</text:span>, descartando opciones relacionales tradicionales como <text:span text:style-name="T14">MySQL</text:span> con <text:span text:style-name="T14">PhpMyAdmin</text:span>. Esta decisión se fundamenta en los siguientes pilares estratégicos:</text:p>
      <text:p text:style-name="P8"/>
      <text:list text:style-name="L8">
        <text:list-item>
          <text:p text:style-name="P10"><text:span text:style-name="T5">Escalabilidad Dinámica:</text:span> A diferencia de <text:span text:style-name="T14">MySQL</text:span>, donde los esquemas de tablas son rígidos, <text:span text:style-name="T14">Firestore</text:span> permite que cada documento contenga una estructura flexible de colecciones. Esto facilita la expansión futura de la aplicación sin necesidad de realizar costosas migraciones de esquemas que comprometan la disponibilidad del servicio en producción.</text:p>
          <text:p text:style-name="P10"/>
        </text:list-item>
        <text:list-item>
          <text:p text:style-name="P9"><text:span text:style-name="T5">Sincronización en Tiempo Real:</text:span> <text:span text:style-name="T14">Firestore</text:span> ofrece una integración nativa mediante “oyentes” (<text:span text:style-name="T14">listeners</text:span>). Para una aplicación enfocada en la gestión del tiempo como Temporis, esto garantiza que si un usuario modifica o detiene un temporizador en un dispositivo, la actualización se propaga instantáneamente a cualquier otra sesión activa del usuario.</text:p>
          <text:p text:style-name="P9"/>
        </text:list-item>
        <text:list-item>
          <text:p text:style-name="P9"><text:span text:style-name="T5">Gestión de Datos Desconectados (</text:span><text:span text:style-name="T16">Offline</text:span><text:span text:style-name="T5">):</text:span> Las aplicaciones móviles operan en entornos de conectividad variable. <text:span text:style-name="T14">Firestore</text:span> gestiona de forma automática una caché local persistente en el dispositivo, lo que permite que Temporis continúe registrando tiempos sin acceso a Internet y sincronice las colecciones de forma transparente al recuperar la cobertura.</text:p>
          <text:p text:style-name="P9"/>
        </text:list-item>
        <text:list-item>
          <text:p text:style-name="P9"><text:span text:style-name="T5">Optimización de Consultas:</text:span> Al no requerir operaciones de combinación complejas (<text:span text:style-name="T14">JOINS</text:span>), la velocidad de lectura de documentos se mantiene constante y ligada únicamente al tamaño del conjunto de resultados solicitado, asegurando una experiencia de usuario fluida a medida que escala la plataforma.</text:p>
        </text:list-item>
      </text:list>
      <text:p text:style-name="P8"/>
      <text:p text:style-name="P8"/>
      <text:p text:style-name="P8"/>
      <text:p text:style-name="P8"/>
      <text:p text:style-name="P8"/>
      <text:p text:style-name="P8"/>
      <text:p text:style-name="P8"/>
      <text:p text:style-name="P8"/>
      <text:p text:style-name="P8"/>
      <text:p text:style-name="P8"/>
      <text:p text:style-name="P8"/>
      <text:h text:style-name="P5" text:outline-level="2"><text:soft-page-break/>3. <text:span text:style-name="T17">Seguridad y Control de Acceso: Firebase Security Rules</text:span></text:h>
      <text:p text:style-name="P8">A diferencia de una arquitectura <text:span text:style-name="T14">SQL</text:span> tradicional, donde la seguridad reside exclusivamente en un servidor intermedio (<text:span text:style-name="T14">Backend</text:span>), <text:span text:style-name="T14">Firestore</text:span> permite acoplar las reglas de validación y autorización directamente sobre la capa de datos mediante las <text:span text:style-name="T14">Security Rules</text:span>. Esto garantiza:</text:p>
      <text:p text:style-name="P8"/>
      <text:list text:style-name="L9">
        <text:list-item>
          <text:p text:style-name="P11"><text:span text:style-name="T5">Privacidad Estricta del Usuario:</text:span> Se han implementado reglas basadas en la propiedad <text:span text:style-name="Source_20_Text"><text:span text:style-name="T18">request.auth.uid</text:span></text:span>. Una petición de lectura o escritura sobre un documento de las colecciones de temporizadores o registros de tiempo solo será autorizada si el campo <text:span text:style-name="Source_20_Text"><text:span text:style-name="T18">uid</text:span></text:span> del documento coincide con el identificador único del usuario autenticado.</text:p>
          <text:p text:style-name="P11"/>
        </text:list-item>
        <text:list-item>
          <text:p text:style-name="P11"><text:span text:style-name="T5">Integridad de Tipos en Tiempo Real:</text:span> Las reglas actúan como validadores de esquemas, rechazando escrituras que contengan atributos malformados o tipos de datos inconsistentes con las especificaciones del modelo.</text:p>
          <text:p text:style-name="P11"/>
        </text:list-item>
        <text:list-item>
          <text:p text:style-name="P11"><text:span text:style-name="T5">Principio de Menor Privilegio:</text:span> Cualquier intento de acceso que no esté explícitamente permitido por una regla de seguridad es denegado por defecto, blindando los datos de vectores de acceso malicioso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 text:outline-level="2"><text:soft-page-break/>4. <text:span text:style-name="T17">Descripción de Entidades y Atributos</text:span></text:h>
      <text:h text:style-name="P5" text:outline-level="2">4.1. <text:span text:style-name="T17">Definición de Entidades y Atributos</text:span></text:h>
      <text:p text:style-name="P8">Para adaptar el modelo al estándar de bases de datos, se corrigen los tipos de datos de programación (<text:span text:style-name="Source_20_Text"><text:span text:style-name="T20">char</text:span></text:span><text:span text:style-name="T20">, </text:span><text:span text:style-name="Source_20_Text"><text:span text:style-name="T20">bool</text:span></text:span><text:span text:style-name="T20">, </text:span><text:span text:style-name="Source_20_Text"><text:span text:style-name="T20">long double</text:span></text:span>) por tipos de datos de almacenamiento estándar (<text:span text:style-name="Source_20_Text"><text:span text:style-name="T20">String</text:span></text:span><text:span text:style-name="T20">, </text:span><text:span text:style-name="Source_20_Text"><text:span text:style-name="T20">Boolean</text:span></text:span><text:span text:style-name="T20">, </text:span><text:span text:style-name="Source_20_Text"><text:span text:style-name="T20">Integer</text:span></text:span><text:span text:style-name="T20">, </text:span><text:span text:style-name="Source_20_Text"><text:span text:style-name="T20">Timestamp</text:span></text:span>).</text:p>
      <text:p text:style-name="P18">1. USUARIO</text:p>
      <text:p text:style-name="P8">Representa a los usuarios registrados en la plataforma a través del módulo de autenticación.</text:p>
      <text:list text:style-name="L10">
        <text:list-item>
          <text:p text:style-name="P12"><text:span text:style-name="T18">uid (PK): </text:span><text:span text:style-name="Source_20_Text"><text:span text:style-name="T18">String</text:span></text:span> - Identificador único provisto por <text:span text:style-name="T14">Firebase Auth</text:span>.</text:p>
        </text:list-item>
        <text:list-item>
          <text:p text:style-name="P12"><text:span text:style-name="T18">username: </text:span><text:span text:style-name="Source_20_Text"><text:span text:style-name="T18">String</text:span></text:span> - Nombre de usuario único del perfil.</text:p>
        </text:list-item>
        <text:list-item>
          <text:p text:style-name="P12"><text:span text:style-name="T18">displayName: </text:span><text:span text:style-name="Source_20_Text"><text:span text:style-name="T18">String</text:span></text:span> - Nombre público visible del usuario.</text:p>
        </text:list-item>
        <text:list-item>
          <text:p text:style-name="P12"><text:span text:style-name="T18">email: </text:span><text:span text:style-name="Source_20_Text"><text:span text:style-name="T18">String</text:span></text:span> - Dirección de correo electrónico de registro.</text:p>
        </text:list-item>
        <text:list-item>
          <text:p text:style-name="P12"><text:span text:style-name="T18">password: </text:span><text:span text:style-name="Source_20_Text"><text:span text:style-name="T18">String</text:span></text:span> - <text:span text:style-name="T14">Hash</text:span> de seguridad de la contraseña (gestionado por el proveedor de autenticación).</text:p>
        </text:list-item>
        <text:list-item>
          <text:p text:style-name="P12"><text:span text:style-name="T18">profilePhotoUrl: </text:span><text:span text:style-name="Source_20_Text"><text:span text:style-name="T18">String</text:span></text:span> - Enlace al almacenamiento de la imagen de perfil.</text:p>
        </text:list-item>
        <text:list-item>
          <text:p text:style-name="P12"><text:span text:style-name="T18">qrCode: </text:span><text:span text:style-name="Source_20_Text"><text:span text:style-name="T18">String</text:span></text:span> - Cadena de texto codificada para la generación del código QR de perfil. <text:span text:style-name="T24">(Actualmente no se usa, aunque en un futuro podría contribuir al desarrollo de alguna funcionalidad interesante y de utilidad considerable)</text:span></text:p>
        </text:list-item>
        <text:list-item>
          <text:p text:style-name="P12"><text:span text:style-name="T18">rol: </text:span><text:span text:style-name="Source_20_Text"><text:span text:style-name="T18">Integer</text:span></text:span> - Indicador numérico de privilegios (ej. 0: Usuario estándar, 1: Administrador). <text:span text:style-name="T24">(Actualmente no se usa y la administración de los “posts” y de los “users” se realiza desde el portal web de </text:span><text:span text:style-name="T15">Firebase</text:span><text:span text:style-name="T24">)</text:span></text:p>
        </text:list-item>
      </text:list>
      <text:p text:style-name="P19">2. TEMPORIZADOR</text:p>
      <text:p text:style-name="P8">Entidad que almacena los contadores y configuraciones de tiempo personalizadas.</text:p>
      <text:list text:style-name="L11">
        <text:list-item>
          <text:p text:style-name="P13"><text:span text:style-name="T18">id (PK): </text:span><text:span text:style-name="Source_20_Text"><text:span text:style-name="T18">String</text:span></text:span> - Identificador único del documento del temporizador.</text:p>
        </text:list-item>
        <text:list-item>
          <text:p text:style-name="P13"><text:span text:style-name="T18">name: </text:span><text:span text:style-name="Source_20_Text"><text:span text:style-name="T18">String</text:span></text:span> - Título o etiqueta del temporizador.</text:p>
        </text:list-item>
        <text:list-item>
          <text:p text:style-name="P13"><text:span text:style-name="T18">duration: </text:span><text:span text:style-name="Source_20_Text"><text:span text:style-name="T18">Integer</text:span></text:span> - Tiempo total configurado en segundos.</text:p>
        </text:list-item>
        <text:list-item>
          <text:p text:style-name="P13"><text:span text:style-name="T18">isActive: </text:span><text:span text:style-name="Source_20_Text"><text:span text:style-name="T18">Boolean</text:span></text:span> - Estado actual del temporizador (Activo / Pausado).</text:p>
        </text:list-item>
        <text:list-item>
          <text:p text:style-name="P13"><text:span text:style-name="T18">createdAt: </text:span><text:span text:style-name="Source_20_Text"><text:span text:style-name="T18">Timestamp</text:span></text:span> - Fecha y hora exacta de creación.</text:p>
        </text:list-item>
        <text:list-item>
          <text:p text:style-name="P13"><text:span text:style-name="T18">uid (FK): </text:span><text:span text:style-name="Source_20_Text"><text:span text:style-name="T18">String</text:span></text:span> - Clave foránea que vincula el temporizador con su Usuario propietario.</text:p>
        </text:list-item>
      </text:list>
      <text:p text:style-name="P19">3. REGISTRO_TIEMPO</text:p>
      <text:p text:style-name="P8">Historial de sesiones de tiempo consolidadas y efectivamente ejecutadas.</text:p>
      <text:list text:style-name="L12">
        <text:list-item>
          <text:p text:style-name="P14"><text:span text:style-name="T18">id (PK): </text:span><text:span text:style-name="Source_20_Text"><text:span text:style-name="T18">String</text:span></text:span> - Identificador único del registro de actividad.</text:p>
        </text:list-item>
        <text:list-item>
          <text:p text:style-name="P14"><text:span text:style-name="T18">date: </text:span><text:span text:style-name="Source_20_Text"><text:span text:style-name="T18">Timestamp</text:span></text:span> - Fecha en la que se realizó la sesión de cronometraje.</text:p>
        </text:list-item>
        <text:list-item>
          <text:p text:style-name="P14"><text:span text:style-name="T18">duration: </text:span><text:span text:style-name="Source_20_Text"><text:span text:style-name="T18">Integer</text:span></text:span> - Cantidad de segundos efectivamente transcurridos y grabados.</text:p>
        </text:list-item>
        <text:list-item>
          <text:p text:style-name="P14"><text:span text:style-name="T18">category: </text:span><text:span text:style-name="Source_20_Text"><text:span text:style-name="T18">String</text:span></text:span> - Etiqueta de categorización de la actividad (ej. "Estudio", "Trabajo").</text:p>
        </text:list-item>
        <text:list-item>
          <text:p text:style-name="P14"><text:span text:style-name="T18">description: </text:span><text:span text:style-name="Source_20_Text"><text:span text:style-name="T18">String</text:span></text:span> - Breve anotación u observación opcional del usuario sobre la sesión.</text:p>
        </text:list-item>
        <text:list-item>
          <text:p text:style-name="P14"><text:span text:style-name="T21">counter</text:span><text:span text:style-name="T18">Id (FK): </text:span><text:span text:style-name="Source_20_Text"><text:span text:style-name="T18">String</text:span></text:span> - Clave foránea que conecta el registro con el Temporizador de origen.</text:p>
        </text:list-item>
      </text:list>
      <text:p text:style-name="P18"><text:soft-page-break/>4. PUBLICACIÓN</text:p>
      <text:p text:style-name="P8">Contenido informativo o educativo distribuido de forma global a los usuarios de la plataforma. Es una entidad independiente (sin dependencias foráneas directas en este nivel).</text:p>
      <text:list text:style-name="L13">
        <text:list-item>
          <text:p text:style-name="P15"><text:span text:style-name="T18">id (PK): </text:span><text:span text:style-name="Source_20_Text"><text:span text:style-name="T18">String</text:span></text:span> - Identificador único del <text:span text:style-name="T14">post</text:span>.</text:p>
        </text:list-item>
        <text:list-item>
          <text:p text:style-name="P15"><text:span text:style-name="T18">title: </text:span><text:span text:style-name="Source_20_Text"><text:span text:style-name="T18">String</text:span></text:span> - Título descriptivo de la publicación.</text:p>
        </text:list-item>
        <text:list-item>
          <text:p text:style-name="P15"><text:span text:style-name="T18">content: </text:span><text:span text:style-name="Source_20_Text"><text:span text:style-name="T18">String</text:span></text:span> - Cuerpo del texto o mensaje.</text:p>
        </text:list-item>
        <text:list-item>
          <text:p text:style-name="P15"><text:span text:style-name="T18">imageUrl: </text:span><text:span text:style-name="Source_20_Text"><text:span text:style-name="T18">String</text:span></text:span> - Enlace al recurso gráfico o miniatura del <text:span text:style-name="T14">post</text:span>.</text:p>
        </text:list-item>
        <text:list-item>
          <text:p text:style-name="P15"><text:span text:style-name="T18">webUrl: </text:span><text:span text:style-name="Source_20_Text"><text:span text:style-name="T18">String</text:span></text:span> - <text:span text:style-name="T14">URL</text:span> externa de referencia para ampliar la información.</text:p>
        </text:list-item>
        <text:list-item>
          <text:p text:style-name="P15"><text:span text:style-name="T18">createdAt: </text:span><text:span text:style-name="Source_20_Text"><text:span text:style-name="T18">Timestamp</text:span></text:span> - Fecha de edición o lanzamiento de la publicación.</text:p>
        </text:list-item>
      </text:list>
      <text:p text:style-name="P8"/>
      <text:p text:style-name="P8"/>
      <text:h text:style-name="P5" text:outline-level="2">4.2 <text:span text:style-name="T17">Relaciones y Lógica de Negocio (Cardinalidades)</text:span></text:h>
      <text:list text:style-name="L14">
        <text:list-item>
          <text:p text:style-name="P16">Usuario - Temporizador (1:N): Un usuario puede dar de alta y gestionar múltiples temporizadores personalizados dentro de su aplicación. Sin embargo, un documento de temporizador pertenece única y exclusivamente a un usuario específico, quedando vinculado mediante el campo <text:span text:style-name="Source_20_Text"><text:span text:style-name="T18">uid</text:span></text:span>. La cardinalidad es estructuralmente 1 a N.</text:p>
        </text:list-item>
        <text:list-item>
          <text:p text:style-name="P16">Temporizador - Registro de Tiempo (1:N): Un mismo temporizador puede ser ejecutado, guardado y finalizado infinitas veces a lo largo de las semanas, generando un historial ramificado. Por lo tanto, un temporizador puede estar asociado a múltiples registros de tiempo históricos, mientras que cada registro individual está ligado al temporizador que lo accionó a través del atributo <text:span text:style-name="Source_20_Text"><text:span text:style-name="T18">counterId</text:span></text:span>. La cardinalidad es 1 a N.</text:p>
        </text:list-item>
      </text:list>
      <text:p text:style-name="P8"/>
      <text:p text:style-name="P8"/>
      <text:h text:style-name="P5" text:outline-level="2">5. <text:span text:style-name="T17">Notas sobre la Optimización del Modelo</text:span></text:h>
      <text:p text:style-name="P8">En consonancia con el desarrollo real de la infraestructura del software, la entidad abstracta preliminar <text:span text:style-name="Source_20_Text"><text:span text:style-name="T18">Counter.java</text:span></text:span> (Contador) ha sido depurada e integrada por completo dentro de la entidad <text:span text:style-name="Source_20_Text"><text:span text:style-name="T18">TEMPORIZADOR</text:span></text:span>.</text:p>
      <text:p text:style-name="P8">Esta unificación conceptual elimina campos redundantes y nulos (como el antiguo <text:span text:style-name="Source_20_Text"><text:span text:style-name="T18">counterid(</text:span></text:span><text:span text:style-name="Source_20_Text"><text:span text:style-name="T19">FK</text:span></text:span><text:span text:style-name="Source_20_Text">)</text:span> de la versión previa), centralizando el flujo de datos <text:span text:style-name="T26">(</text:span><text:span text:style-name="T25">aunque en la clase </text:span><text:span text:style-name="T22">T</text:span><text:span text:style-name="T23">imer</text:span><text:span text:style-name="T22">Register</text:span><text:span text:style-name="T23">.java</text:span><text:span text:style-name="T25"> sigue existiendo, por si nos resulta nuevamente necesario usarlo en un futuro</text:span><text:span text:style-name="T26">)</text:span>. De esta manera, cualquier módulo de analítica o registro lee directamente del identificador del temporizador activo, garantizando un modelo normalizado, limpio y optimizado para consultas directas en entornos móviles de alta velocidad.</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18c626a" style:font-size-asian="15pt" style:font-weight-asian="normal" style:font-size-complex="15pt" style:font-weight-complex="normal"/>
    </style:style>
    <style:style style:name="MT2" style:family="text">
      <style:text-properties style:font-name="MathJax_Typewriter" fo:font-size="15pt" fo:font-weight="normal" officeooo:rsid="003bb751" style:font-size-asian="15pt" style:font-weight-asian="normal" style:font-size-complex="15pt" style:font-weight-complex="normal"/>
    </style:style>
    <style:style style:name="MT3"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725cm" fo:margin-bottom="1.337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8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iagrama Entidad – Relación<text:tab/><text:tab/></text:span><text:span text:style-name="MT2">Kevin Zamora </text:span><text:span text:style-name="MT3">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6-04T19:22:26.210628039</dc:date>
    <meta:editing-duration>PT18H30M14S</meta:editing-duration>
    <meta:editing-cycles>442</meta:editing-cycles>
    <meta:print-date>2026-06-04T19:14:26.578760495</meta:print-date>
    <meta:printed-by>Archivos PDF</meta:printed-by>
    <meta:document-statistic meta:table-count="0" meta:image-count="2" meta:object-count="0" meta:page-count="6" meta:paragraph-count="63" meta:word-count="1166" meta:character-count="7725" meta:non-whitespace-character-count="6655"/>
  </office:meta>
</office:document-meta>
</file>
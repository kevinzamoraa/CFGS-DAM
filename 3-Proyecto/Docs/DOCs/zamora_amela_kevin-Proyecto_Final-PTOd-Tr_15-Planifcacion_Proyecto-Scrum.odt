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0000003F4FC6F812F.png" manifest:media-type="image/png"/>
  <manifest:file-entry manifest:full-path="Pictures/100000010000077D0000038016F93D3D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Heading_20_4">
      <style:paragraph-properties fo:text-align="start" style:justify-single-word="false" fo:keep-with-next="always"/>
      <style:text-properties style:font-name="MathJax_Typewriter" style:text-underline-style="solid" style:text-underline-width="auto" style:text-underline-color="font-color" officeooo:rsid="03080393" officeooo:paragraph-rsid="02b99699"/>
    </style:style>
    <style:style style:name="P5" style:family="paragraph" style:parent-style-name="Heading_20_4">
      <style:paragraph-properties fo:margin-top="0.212cm" fo:margin-bottom="0.212cm" style:contextual-spacing="false" fo:text-align="center" style:justify-single-word="false"/>
      <style:text-properties style:font-name="MathJax_Typewriter" style:text-underline-style="solid" style:text-underline-width="auto" style:text-underline-color="font-color" officeooo:paragraph-rsid="0337896a"/>
    </style:style>
    <style:style style:name="P6" style:family="paragraph" style:parent-style-name="Heading_20_4">
      <style:paragraph-properties fo:margin-top="0.714cm" fo:margin-bottom="0.714cm" style:contextual-spacing="false" fo:text-align="start" style:justify-single-word="false" fo:keep-with-next="always"/>
      <style:text-properties style:font-name="MathJax_Typewriter" officeooo:rsid="03080393" officeooo:paragraph-rsid="02b99699"/>
    </style:style>
    <style:style style:name="P7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2a358aa"/>
    </style:style>
    <style:style style:name="P10" style:family="paragraph" style:parent-style-name="Text_20_body">
      <style:paragraph-properties fo:margin-top="0.101cm" fo:margin-bottom="0.347cm" style:contextual-spacing="false" fo:text-align="justify" style:justify-single-word="false"/>
      <style:text-properties officeooo:paragraph-rsid="02bcef5b"/>
    </style:style>
    <style:style style:name="P11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paragraph-rsid="03062065"/>
    </style:style>
    <style:style style:name="P12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paragraph-rsid="03231fb6"/>
    </style:style>
    <style:style style:name="P13" style:family="paragraph" style:parent-style-name="Text_20_body">
      <style:paragraph-properties fo:margin-top="0.302cm" fo:margin-bottom="0.549cm" style:contextual-spacing="false"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2f5f524"/>
    </style:style>
    <style:style style:name="P15" style:family="paragraph" style:parent-style-name="Text_20_body">
      <style:paragraph-properties fo:text-align="justify" style:justify-single-word="false"/>
      <style:text-properties officeooo:rsid="02aaa695" officeooo:paragraph-rsid="02aaa695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 officeooo:rsid="031cdb06" officeooo:paragraph-rsid="031daf5f"/>
    </style:style>
    <style:style style:name="P17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rsid="0324cbe0" officeooo:paragraph-rsid="0324cbe0"/>
    </style:style>
    <style:style style:name="P18" style:family="paragraph" style:parent-style-name="Heading_20_4">
      <style:paragraph-properties fo:margin-top="0.212cm" fo:margin-bottom="0.212cm" style:contextual-spacing="false" fo:text-align="center" style:justify-single-word="false" fo:keep-with-next="always"/>
      <style:text-properties officeooo:paragraph-rsid="0337896a"/>
    </style:style>
    <style:style style:name="P19" style:family="paragraph" style:parent-style-name="Heading_20_4">
      <style:paragraph-properties fo:text-align="center" style:justify-single-word="false" fo:keep-with-next="always"/>
      <style:text-properties officeooo:paragraph-rsid="033e7ee5"/>
    </style:style>
    <style:style style:name="P20" style:family="paragraph" style:parent-style-name="Heading_20_4">
      <style:paragraph-properties fo:text-align="center" style:justify-single-word="false" fo:keep-with-next="always"/>
      <style:text-properties officeooo:paragraph-rsid="033fddee"/>
    </style:style>
    <style:style style:name="P21" style:family="paragraph" style:parent-style-name="Heading_20_4">
      <style:paragraph-properties fo:text-align="center" style:justify-single-word="false" fo:keep-with-next="always"/>
      <style:text-properties officeooo:paragraph-rsid="034169ca"/>
    </style:style>
    <style:style style:name="P22" style:family="paragraph" style:parent-style-name="Heading_20_4">
      <style:paragraph-properties fo:text-align="center" style:justify-single-word="false"/>
      <style:text-properties officeooo:paragraph-rsid="034169ca"/>
    </style:style>
    <style:style style:name="P23" style:family="paragraph" style:parent-style-name="Heading_20_4">
      <style:paragraph-properties fo:text-align="center" style:justify-single-word="false"/>
      <style:text-properties style:font-name="MathJax_Typewriter" style:text-underline-style="solid" style:text-underline-width="auto" style:text-underline-color="font-color" officeooo:paragraph-rsid="033fddee"/>
    </style:style>
    <style:style style:name="P24" style:family="paragraph" style:parent-style-name="Heading_20_4">
      <style:paragraph-properties fo:text-align="center" style:justify-single-word="false"/>
      <style:text-properties style:font-name="MathJax_Typewriter" style:text-underline-style="solid" style:text-underline-width="auto" style:text-underline-color="font-color" officeooo:paragraph-rsid="033e7ee5"/>
    </style:style>
    <style:style style:name="P25" style:family="paragraph" style:parent-style-name="Text_20_body" style:list-style-name="L1">
      <style:paragraph-properties fo:text-align="justify" style:justify-single-word="false"/>
      <style:text-properties fo:font-weight="bold"/>
    </style:style>
    <style:style style:name="P26" style:family="paragraph" style:parent-style-name="Text_20_body" style:list-style-name="L2">
      <style:paragraph-properties fo:text-align="justify" style:justify-single-word="false"/>
      <style:text-properties fo:font-weight="bold"/>
    </style:style>
    <style:style style:name="P27" style:family="paragraph" style:parent-style-name="Text_20_body" style:list-style-name="L3">
      <style:paragraph-properties fo:text-align="justify" style:justify-single-word="false"/>
      <style:text-properties fo:font-weight="bold"/>
    </style:style>
    <style:style style:name="P28" style:family="paragraph" style:parent-style-name="Text_20_body" style:list-style-name="L4">
      <style:paragraph-properties fo:text-align="justify" style:justify-single-word="false"/>
      <style:text-properties fo:font-weight="bold"/>
    </style:style>
    <style:style style:name="P29" style:family="paragraph" style:parent-style-name="Text_20_body" style:list-style-name="L5">
      <style:paragraph-properties fo:text-align="justify" style:justify-single-word="false"/>
      <style:text-properties fo:font-weight="bold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 style:list-style-name="L3">
      <style:paragraph-properties fo:text-align="justify" style:justify-single-word="false"/>
    </style:style>
    <style:style style:name="P33" style:family="paragraph" style:parent-style-name="Text_20_body" style:list-style-name="L4">
      <style:paragraph-properties fo:text-align="justify" style:justify-single-word="false"/>
    </style:style>
    <style:style style:name="P34" style:family="paragraph" style:parent-style-name="Text_20_body" style:list-style-name="L5">
      <style:paragraph-properties fo:text-align="justify" style:justify-single-word="false"/>
    </style:style>
    <style:style style:name="P35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paragraph-rsid="03062065"/>
    </style:style>
    <style:style style:name="P36" style:family="paragraph" style:parent-style-name="Text_20_body" style:list-style-name="L4"/>
    <style:style style:name="P37" style:family="paragraph" style:parent-style-name="Text_20_body" style:list-style-name="L5">
      <style:paragraph-properties fo:text-align="justify" style:justify-single-word="false"/>
      <style:text-properties officeooo:rsid="034a3b91" officeooo:paragraph-rsid="034a3b91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40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41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42" style:family="paragraph">
      <loext:graphic-properties draw:fill="solid" draw:fill-color="#dedce6"/>
      <style:paragraph-properties style:writing-mode="lr-tb"/>
    </style:style>
    <style:style style:name="P43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6" style:family="text">
      <style:text-properties style:font-name="MathJax_Typewriter" style:text-underline-style="solid" style:text-underline-width="auto" style:text-underline-color="font-color"/>
    </style:style>
    <style:style style:name="T7" style:family="text">
      <style:text-properties style:font-name="MathJax_Typewriter" style:text-underline-style="solid" style:text-underline-width="auto" style:text-underline-color="font-color" officeooo:rsid="02bb3e73"/>
    </style:style>
    <style:style style:name="T8" style:family="text">
      <style:text-properties style:font-name="MathJax_Typewriter" fo:font-style="italic"/>
    </style:style>
    <style:style style:name="T9" style:family="text">
      <style:text-properties style:font-name="MathJax_Typewriter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="MathJax_Typewriter" fo:font-style="italic" style:text-underline-style="solid" style:text-underline-width="auto" style:text-underline-color="font-color" officeooo:rsid="02bb3e73" style:font-style-asian="italic" style:font-style-complex="italic"/>
    </style:style>
    <style:style style:name="T11" style:family="text">
      <style:text-properties style:font-name="MathJax_Typewriter" fo:font-style="italic" officeooo:rsid="02a2311e" style:font-style-asian="italic" style:font-style-complex="italic"/>
    </style:style>
    <style:style style:name="T12" style:family="text">
      <style:text-properties style:font-name="MathJax_Typewriter" fo:font-weight="bold"/>
    </style:style>
    <style:style style:name="T13" style:family="text">
      <style:text-properties fo:font-weight="bold"/>
    </style:style>
    <style:style style:name="T14" style:family="text">
      <style:text-properties fo:font-weight="bold" officeooo:rsid="02a0362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fo:color="#000000" loext:opacity="100%" fo:font-size="15pt" style:font-size-asian="15pt" style:font-size-complex="15pt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2a2311e" style:font-style-asian="italic" style:font-style-complex="italic"/>
    </style:style>
    <style:style style:name="T21" style:family="text">
      <style:text-properties fo:font-style="italic" officeooo:rsid="034a3b91" style:font-style-asian="italic" style:font-style-complex="italic"/>
    </style:style>
    <style:style style:name="T22" style:family="text">
      <style:text-properties fo:font-style="italic" fo:font-weight="bold" style:font-style-asian="italic" style:font-style-complex="italic"/>
    </style:style>
    <style:style style:name="T23" style:family="text">
      <style:text-properties officeooo:rsid="02a0362d"/>
    </style:style>
    <style:style style:name="T24" style:family="text">
      <style:text-properties officeooo:rsid="02a358aa"/>
    </style:style>
    <style:style style:name="T25" style:family="text">
      <style:text-properties fo:font-style="normal" officeooo:rsid="034a3b91" style:font-style-asian="normal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3027c92" style:font-weight-asian="normal" style:font-weight-complex="normal"/>
    </style:style>
    <style:style style:name="T28" style:family="text">
      <style:text-properties fo:font-weight="normal" officeooo:rsid="03446af4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343c244"/>
    </style:style>
    <style:style style:name="T31" style:family="text">
      <style:text-properties officeooo:rsid="0336127d"/>
    </style:style>
    <style:style style:name="T32" style:family="text">
      <style:text-properties officeooo:rsid="033b957c"/>
    </style:style>
    <style:style style:name="T33" style:family="text">
      <style:text-properties officeooo:rsid="033c4eff"/>
    </style:style>
    <style:style style:name="T34" style:family="text">
      <style:text-properties officeooo:rsid="03446af4"/>
    </style:style>
    <style:style style:name="T35" style:family="text">
      <style:text-properties officeooo:rsid="03461d0d"/>
    </style:style>
    <style:style style:name="T36" style:family="text">
      <style:text-properties officeooo:rsid="034a3b91"/>
    </style:style>
    <style:style style:name="T37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38" style:family="text">
      <style:text-properties style:font-name="MathJax_Typewriter" fo:font-size="26pt" style:text-underline-style="none" style:font-size-asian="26pt" style:font-size-complex="26pt"/>
    </style:style>
    <style:style style:name="T39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42" svg:width="10.699cm" svg:height="29.795cm" svg:x="-2.833cm" svg:y="-2.82cm"><text:p/><draw:enhanced-geometry svg:viewBox="0 0 21600 21600" draw:type="rectangle" draw:enhanced-path="M 0 0 L 21600 0 21600 21600 0 21600 0 0 Z N"/></draw:custom-shap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frame text:anchor-type="paragraph" draw:z-index="3" draw:name="Marco de texto 1" draw:style-name="gr3" draw:text-style-name="P41" svg:width="9.129cm" svg:height="4.296cm" svg:x="1.757cm" svg:y="0.247cm"><draw:text-box><text:p text:style-name="P38"><text:span text:style-name="T39">Planificación </text:span><text:span text:style-name="T39">del Proyecto - </text:span><text:span text:style-name="T39">Scrum</text:span></text:p></draw:text-box></draw:fram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frame text:anchor-type="paragraph" draw:z-index="5" draw:name="Marco de texto 3" draw:style-name="gr1" draw:text-style-name="P39" svg:width="7.873cm" svg:height="1.414cm" svg:x="-0.6cm" svg:y="0.312cm"><draw:text-box><text:p text:style-name="P38"><text:span text:style-name="T37">Temporis:</text:span></text:p></draw:text-box></draw:frame><text:span text:style-name="T16"/></text:p>
      <text:p text:style-name="P2"><text:span text:style-name="T16"/></text:p>
      <text:p text:style-name="P2"><text:span text:style-name="T16"/></text:p>
      <text:p text:style-name="P2"><draw:frame text:anchor-type="paragraph" draw:z-index="4" draw:name="Marco de texto 2" draw:style-name="gr2" draw:text-style-name="P40" svg:width="7.839cm" svg:height="4.329cm" svg:x="-0.563cm" svg:y="0.381cm"><draw:text-box><text:p text:style-name="P38"><text:span text:style-name="T38">Una herramienta </text:span><text:span text:style-name="T38">accesible para el </text:span><text:span text:style-name="T38">control y la </text:span><text:span text:style-name="T38">optimización de </text:span><text:span text:style-name="T38">nuestro tiempo</text:span></text:p></draw:text-box></draw:fram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custom-shape text:anchor-type="paragraph" draw:z-index="0" draw:name="Forma 2" draw:style-name="gr5" draw:text-style-name="P43" svg:width="2.449cm" svg:height="2.449cm" svg:x="8.46cm" svg:y="0.646cm"><text:p/><draw:enhanced-geometry svg:viewBox="0 0 21600 21600" draw:type="rectangle" draw:enhanced-path="M 0 0 L 21600 0 21600 21600 0 21600 0 0 Z N"/></draw:custom-shape><text:span text:style-name="T16"/></text:p>
      <text:p text:style-name="P3"><text:span text:style-name="T17"/></text:p>
      <text:h text:style-name="P7" text:outline-level="2"><text:soft-page-break/>1. Introducción y Metodología</text:h>
      <text:p text:style-name="P9">Para el desarrollo de <text:span text:style-name="T13">Temporis</text:span>, <text:span text:style-name="T34">adoptamos</text:span> el marco de trabajo ágil <text:span text:style-name="T22">Scrum</text:span>, adaptando estratégicamente sus <text:span text:style-name="T24">eventos, ceremonias</text:span> y artefactos a un entorno de <text:span text:style-name="T13">desarrollo individual (</text:span><text:span text:style-name="T22">Solo-Scrum</text:span><text:span text:style-name="T13">)</text:span>. El ciclo de vida del proyecto se divide de forma <text:span text:style-name="T34">flexible (en cierta medida)</text:span> en <text:span text:style-name="T22">Sprints</text:span><text:span text:style-name="T13"> “fijos” de dos semanas de duración</text:span><text:span text:style-name="T26">, </text:span><text:span text:style-name="T28">debido a la limitada disponibilidad temporal de la que se dispone</text:span>.</text:p>
      <text:p text:style-name="P8">Esta ventana <text:span text:style-name="T34">de tiempo</text:span> garantiza un ritmo de inspección y adaptación <text:span text:style-name="T35">medianamente</text:span> constante <text:span text:style-name="T35">y organizado</text:span>, permitiendo desplegar <text:span text:style-name="T13">incrementos de </text:span><text:span text:style-name="T22">software</text:span><text:span text:style-name="T13"> potencialmente entregables</text:span> tras cada ciclo. La flexibilidad de este enfoque facilita la integración inmediata de las pautas de accesibilidad y las correcciones de diseño identificadas durante las fases de <text:span text:style-name="T24">prueba</text:span> continu<text:span text:style-name="T24">a</text:span>, mitigando <text:span text:style-name="T24">así posibles</text:span> riesgos de desviación, en el alcance final.</text:p>
      <text:p text:style-name="P8"/>
      <text:p text:style-name="P8"/>
      <text:h text:style-name="P7" text:outline-level="2">2. Product Backlog (Pila del Producto)</text:h>
      <text:p text:style-name="P8">El <text:span text:style-name="T19">Product Backlog</text:span> se compone de historias de usuario y requerimientos técnicos desglosados y ponderados según su valor para el <text:span text:style-name="T13">Mínimo Producto Viable (MVP)</text:span> y su impacto en la <text:span text:style-name="T13">inclusión digital</text:span>. La priorización sigue una taxonomía estricta de dependencias técnicas:</text:p>
      <text:p text:style-name="P8"/>
      <text:list text:style-name="L1">
        <text:list-item>
          <text:p text:style-name="P25">Prioridad Alta (Bloque de Infraestructura y Core CRUD):</text:p>
          <text:list>
            <text:list-item>
              <text:p text:style-name="P30">Aprovisionamiento del entorno de desarrollo y SDKs esenciales.</text:p>
            </text:list-item>
            <text:list-item>
              <text:p text:style-name="P30">Capa de persistencia <text:span text:style-name="T19">cloud</text:span> y aislamiento criptográfico de datos (<text:span text:style-name="T19">Firebase</text:span>).</text:p>
            </text:list-item>
            <text:list-item>
              <text:p text:style-name="P30">Gestión de la lógica operacional y transaccional del temporizador.</text:p>
              <text:p text:style-name="P30"/>
            </text:list-item>
          </text:list>
        </text:list-item>
        <text:list-item>
          <text:p text:style-name="P25">Prioridad Media (Lógica del Contador, Arquitectura y UI Base):</text:p>
          <text:list>
            <text:list-item>
              <text:p text:style-name="P30">Sincronización asíncrona en segundo plano (Corrutinas de <text:span text:style-name="T19">Kotlin</text:span> y Servicios nativos).</text:p>
            </text:list-item>
            <text:list-item>
              <text:p text:style-name="P30">Estructura arquitectónica limpia siguiendo el patrón MVVM.</text:p>
            </text:list-item>
            <text:list-item>
              <text:p text:style-name="P30">Implementación de la interfaz responsiva y soporte nativo para el Modo Oscuro.</text:p>
              <text:p text:style-name="P30"/>
            </text:list-item>
          </text:list>
        </text:list-item>
        <text:list-item>
          <text:p text:style-name="P25">Prioridad Baja (Analítica Avanzada y Optimización de la Accesibilidad):</text:p>
          <text:list>
            <text:list-item>
              <text:p text:style-name="P30">Módulo estadístico y renderizado del mapa de calor de productividad (<text:span text:style-name="T18">heatmap</text:span>).</text:p>
            </text:list-item>
            <text:list-item>
              <text:p text:style-name="P30">Temas de interfaz adaptados a entornos de baja visión (Modo de Alto Contraste).</text:p>
            </text:list-item>
            <text:list-item>
              <text:p text:style-name="P30">Pulido fino de microinteracciones, transiciones visuales y animaciones inclusivas.</text:p>
            </text:list-item>
          </text:list>
        </text:list-item>
      </text:list>
      <text:p text:style-name="P15"/>
      <text:p text:style-name="P15"/>
      <text:p text:style-name="P15"/>
      <text:h text:style-name="P7" text:outline-level="2"><text:soft-page-break/><text:span text:style-name="T16">3. </text:span>Planificación de <text:span text:style-name="T19">Sprints</text:span> (<text:span text:style-name="T19">Sprint Backlog</text:span>)</text:h>
      <text:h text:style-name="P21" text:outline-level="4"><text:span text:style-name="T10">Sprint 0</text:span><text:span text:style-name="T7">: </text:span></text:h>
      <text:h text:style-name="P22" text:outline-level="4"><text:span text:style-name="T7">Inicialización de la Infraestructura Base y Prototipado </text:span><text:span text:style-name="T10">Cloud</text:span></text:h>
      <text:list text:style-name="L2">
        <text:list-item>
          <text:p text:style-name="P31"><text:span text:style-name="T13">Duración:</text:span> Fase de conceptualización y desarrollo base (equivalente a 2 semanas de carga nominal, ejecutadas de forma asíncrona entre febrero y mayo de 2025).</text:p>
        </text:list-item>
        <text:list-item>
          <text:p text:style-name="P26">Tareas Programadas:</text:p>
          <text:list>
            <text:list-item>
              <text:p text:style-name="P31">Configuración inicial del entorno de trabajo en <text:span text:style-name="T19">Android Studio</text:span>, gestión de dependencias con <text:span text:style-name="T19">Gradle</text:span> y aprovisionamiento del repositorio en <text:span text:style-name="T19">GitHub</text:span>.</text:p>
            </text:list-item>
            <text:list-item>
              <text:p text:style-name="P31">Vinculación del proyecto con la consola de Firebase e integración de los SDKs de <text:span text:style-name="T18">Firebase Auth</text:span> y <text:span text:style-name="T18">Cloud Firestore</text:span>.</text:p>
            </text:list-item>
            <text:list-item>
              <text:p text:style-name="P31">Implementación inicial de las <text:span text:style-name="T18">Security Rules</text:span> de <text:span text:style-name="T19">Firestore</text:span> para el aislamiento de datos por <text:span text:style-name="T1">UID</text:span>.</text:p>
            </text:list-item>
            <text:list-item>
              <text:p text:style-name="P31">Diseño y codificación de las clases de entidad de datos base: <text:span text:style-name="Source_20_Text"><text:span text:style-name="T1">User.java</text:span></text:span>, <text:span text:style-name="Source_20_Text"><text:span text:style-name="T1">Timer.java</text:span></text:span>, <text:span text:style-name="Source_20_Text"><text:span text:style-name="T1">TimeRegister.java</text:span></text:span> y <text:span text:style-name="Source_20_Text"><text:span text:style-name="T1">Post.kt</text:span></text:span>.</text:p>
            </text:list-item>
            <text:list-item>
              <text:p text:style-name="P31">Maquetación y lógica preliminar de las interfaces críticas: <text:span text:style-name="T8">Login</text:span>, <text:span text:style-name="T8">Register</text:span>, <text:span text:style-name="T8">Timers</text:span>, <text:span text:style-name="T8">Timer</text:span> y <text:span text:style-name="T8">User Dashboard</text:span>.</text:p>
            </text:list-item>
          </text:list>
        </text:list-item>
      </text:list>
      <text:p text:style-name="P8"/>
      <text:list text:continue-numbering="true" text:style-name="L2">
        <text:list-item>
          <text:p text:style-name="P31"><text:span text:style-name="T13">Estado de Entrega (Tareas Realizadas):</text:span> 100% completado. Incremento funcional verificado en entorno local, identificándose comportamientos anómalos en la sincronización reactiva de los datos del perfil de usuario en <text:span text:style-name="T19">Firestore</text:span>.</text:p>
        </text:list-item>
      </text:list>
      <text:p text:style-name="P8"/>
      <text:list text:continue-numbering="true" text:style-name="L2">
        <text:list-item>
          <text:p text:style-name="P31"><text:span text:style-name="T13">Justificación de Desviaciones:</text:span> Al compaginar esta fase inicial con la jornada laboral y la carga lectiva del CFGS, el desarrollo se extendió cronológicamente, asumiéndose una serie de disfunciones menores etiquetadas como deuda técnica, para su resolución en el ciclo principal.</text:p>
        </text:list-item>
      </text:list>
      <text:p text:style-name="P13"/>
      <text:p text:style-name="P13"/>
      <text:p text:style-name="P13"/>
      <text:p text:style-name="P10"/>
      <text:p text:style-name="P10"/>
      <text:p text:style-name="P10"/>
      <text:h text:style-name="P20" text:outline-level="4"><text:soft-page-break/><text:span text:style-name="T9">Sprint</text:span><text:span text:style-name="T6"> 1: </text:span></text:h>
      <text:h text:style-name="P23" text:outline-level="4">Consolidación Arquitectónica y Resolución de Deuda Técnica</text:h>
      <text:list text:style-name="L3">
        <text:list-item>
          <text:p text:style-name="P32"><text:span text:style-name="T13">Duración:</text:span> 2 semanas.</text:p>
        </text:list-item>
        <text:list-item>
          <text:p text:style-name="P27">Tareas Programadas y Desglose Granular:</text:p>
          <text:list>
            <text:list-item>
              <text:p text:style-name="P32"><text:span text:style-name="T13">(Deuda Técnica):</text:span> Corrección de las <text:span text:style-name="T18">Security Rules</text:span> de Firestore y subsanación del flujo de actualización del perfil de usuario (<text:span text:style-name="Source_20_Text"><text:span text:style-name="T1">User</text:span></text:span>).</text:p>
            </text:list-item>
            <text:list-item>
              <text:p text:style-name="P32"><text:span text:style-name="T13">(Deuda Técnica):</text:span> Reorganización estructural del proyecto hacia una arquitectura limpia (<text:span text:style-name="T18">Clean Architecture</text:span>) mediante paquetes delimitados (<text:span text:style-name="Source_20_Text"><text:span text:style-name="T1">adapter</text:span></text:span>, <text:span text:style-name="Source_20_Text"><text:span text:style-name="T1">model</text:span></text:span>, <text:span text:style-name="Source_20_Text"><text:span text:style-name="T1">repository</text:span></text:span>, <text:span text:style-name="Source_20_Text"><text:span text:style-name="T1">ui</text:span></text:span>, <text:span text:style-name="Source_20_Text"><text:span text:style-name="T1">util</text:span></text:span>).</text:p>
            </text:list-item>
            <text:list-item>
              <text:p text:style-name="P32"><text:span text:style-name="T13">(Deuda Técnica):</text:span> Abstracción de datos mediante el patrón <text:span text:style-name="Source_20_Text"><text:span text:style-name="T1">Repository</text:span></text:span> (<text:span text:style-name="Source_20_Text"><text:span text:style-name="T1">TimerRepository.kt</text:span></text:span>, <text:span text:style-name="Source_20_Text"><text:span text:style-name="T1">UserRepository.kt</text:span></text:span>, <text:span text:style-name="Source_20_Text"><text:span text:style-name="T1">PostRepository.kt</text:span></text:span>).</text:p>
            </text:list-item>
            <text:list-item>
              <text:p text:style-name="P32"><text:span text:style-name="T13">(Mejora):</text:span> Implementación de la capa de presentación mediante <text:span text:style-name="T19">ViewModels</text:span> (<text:span text:style-name="Source_20_Text"><text:span text:style-name="T1">TimerViewModel.kt</text:span></text:span>) gestionando el estado de la UI de forma reactiva con <text:span text:style-name="Source_20_Text"><text:span text:style-name="T1">MutableStateFlow</text:span></text:span>.</text:p>
            </text:list-item>
            <text:list-item>
              <text:p text:style-name="P32"><text:span text:style-name="T13">(Mejora):</text:span> Optimización del motor de cuenta atrás del temporizador delegando el procesamiento asíncrono en <text:span text:style-name="T18">Kotlin Coroutines</text:span>.</text:p>
            </text:list-item>
            <text:list-item>
              <text:p text:style-name="P32"><text:span text:style-name="T13">(Mejora):</text:span> Rediseño estético de las tarjetas de temporizadores y corrección del comportamiento del <text:span text:style-name="T19">scroll</text:span> vertical en listas densas.</text:p>
            </text:list-item>
          </text:list>
          <text:p text:style-name="P32"><text:span text:style-name="T13"/></text:p>
        </text:list-item>
        <text:list-item>
          <text:p text:style-name="P32"><text:span text:style-name="T13">Estado de Entrega (Tareas Realizadas):</text:span> Completado y verificado bajo la ‘Definición de Hecho’ (<text:span text:style-name="T18">Definition of Done</text:span>). Las historias de usuario asociadas han sido integradas en las tarjetas del tablero <text:span text:style-name="T19">Kanban</text:span> mediante sintaxis estructurada <text:span text:style-name="T19">Gherkin</text:span>.</text:p>
        </text:list-item>
      </text:list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h text:style-name="P19" text:outline-level="4"><text:soft-page-break/><text:span text:style-name="T9">Sprint 2</text:span><text:span text:style-name="T6">: </text:span></text:h>
      <text:h text:style-name="P24" text:outline-level="4">Diseño de Interfaces Responsivas y Accesibilidad Universal (WCAG)</text:h>
      <text:list text:style-name="L4">
        <text:list-header>
          <text:p text:style-name="P36"><text:span text:style-name="T13"/></text:p>
        </text:list-header>
        <text:list-item>
          <text:p text:style-name="P33"><text:span text:style-name="T13">Duración:</text:span> 2 semanas.</text:p>
        </text:list-item>
        <text:list-item>
          <text:p text:style-name="P28">Tareas Programadas y Desglose Granular:</text:p>
          <text:list>
            <text:list-item>
              <text:p text:style-name="P33">Diseño y maquetación del árbol de vistas XML mediante componentes adaptativos complejos (<text:span text:style-name="Source_20_Text"><text:span text:style-name="T1">ConstraintLayout</text:span></text:span>).</text:p>
            </text:list-item>
            <text:list-item>
              <text:p text:style-name="P33">Unificación del sistema de diseño visual (estilos globales para botones redondeados, gradientes estables y jerarquía tipográfica).</text:p>
            </text:list-item>
            <text:list-item>
              <text:p text:style-name="P33">Creación e inyección de los recursos de color (<text:span text:style-name="Source_20_Text"><text:span text:style-name="T1">colors.xml</text:span></text:span>) para dotar a la aplicación de soporte nativo para <text:span text:style-name="T13">Modo Oscuro</text:span> y <text:span text:style-name="T13">Modo de Alto Contraste</text:span>.</text:p>
            </text:list-item>
            <text:list-item>
              <text:p text:style-name="P33">Auditoría e inyección del atributo <text:span text:style-name="Source_20_Text"><text:span text:style-name="T1">contentDescription</text:span></text:span> en componentes interactivos e imágenes para la correcta verbalización a través del lector de pantallas <text:span text:style-name="T18">TalkBack</text:span>.</text:p>
            </text:list-item>
            <text:list-item>
              <text:p text:style-name="P33">Implementación de escalado dinámico de fuentes en unidades <text:span text:style-name="Source_20_Text"><text:span text:style-name="T1">sp</text:span></text:span> (hasta 30sp), garantizando la adaptabilidad visual sin desbordamiento de componentes.</text:p>
            </text:list-item>
          </text:list>
        </text:list-item>
      </text:list>
      <text:p text:style-name="Text_20_body"><text:span text:style-name="T13"/></text:p>
      <text:p text:style-name="Text_20_body"><text:span text:style-name="T13"/></text:p>
      <text:list text:continue-numbering="true" text:style-name="L4">
        <text:list-item>
          <text:p text:style-name="P33"><text:span text:style-name="T13">Estado de Entrega (Tareas Realizadas):</text:span> Completado. Las vistas de configuración de accesibilidad son 100% operativas. Código integrado en la rama principal (<text:span text:style-name="Source_20_Text"><text:span text:style-name="T1">main</text:span></text:span>) tras superar el <text:span text:style-name="T19">pipeline</text:span><text:span text:style-name="T25">(tubería)</text:span> <text:span text:style-name="T36">preliminar/en desarrollo </text:span>de pruebas locales.</text:p>
        </text:list-item>
      </text:list>
      <text:p text:style-name="P8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h text:style-name="P18" text:outline-level="4"><text:soft-page-break/><text:span text:style-name="T9">Sprint 3</text:span><text:span text:style-name="T6">: </text:span></text:h>
      <text:h text:style-name="P5" text:outline-level="4">Automatización de QA <text:span text:style-name="T31">(Control de Calidad)</text:span>, Inspección Estática (SonarQube), <text:span text:style-name="T31">Documentación</text:span> y Cierre</text:h>
      <text:list text:style-name="L5">
        <text:list-item>
          <text:p text:style-name="P34"><text:span text:style-name="T13">Duración:</text:span> 2 semanas.</text:p>
        </text:list-item>
        <text:list-item>
          <text:p text:style-name="P29">Tareas Programadas:</text:p>
          <text:list>
            <text:list-item>
              <text:p text:style-name="P34">Configuración del flujo de integración continua (CI) mediante <text:span text:style-name="T13">GitHub Actions</text:span><text:span text:style-name="T26">,</text:span> para la exportación automatizada de métricas hacia el servidor de <text:span text:style-name="T13">SonarQube</text:span>.</text:p>
            </text:list-item>
            <text:list-item>
              <text:p text:style-name="P34">Análisis estático de código para la erradicación de <text:span text:style-name="T18">code smells</text:span> y reducción de la complejidad ciclomática en la lógica de los <text:span text:style-name="T19">ViewModels</text:span>.</text:p>
            </text:list-item>
            <text:list-item>
              <text:p text:style-name="P34">Escritura y ejecución de la suite de pruebas unitarias (<text:span text:style-name="T1">JUnit</text:span>) y de pruebas instrumentales de interfaz (<text:span text:style-name="T1">Espresso</text:span>).</text:p>
            </text:list-item>
            <text:list-item>
              <text:p text:style-name="P34">Verificación de la cobertura de código mediante el <text:span text:style-name="T19">plugin</text:span> de <text:span text:style-name="T12">JaCoCo</text:span>.</text:p>
            </text:list-item>
            <text:list-item>
              <text:p text:style-name="P34">Validación manual <text:span text:style-name="T32">(</text:span>de campo<text:span text:style-name="T32">)</text:span> de las características de accesibilidad sobre un dispositivo físico <text:span text:style-name="T32">(</text:span><text:span text:style-name="T33">y </text:span>real<text:span text:style-name="T32">)</text:span>.</text:p>
            </text:list-item>
            <text:list-item>
              <text:p text:style-name="P34">Compilación del artefacto/<text:span text:style-name="T33">ejecutable</text:span> final corregido (APK/AAB) y redacción de las memorias técnicas de calidad.</text:p>
            </text:list-item>
            <text:list-item>
              <text:p text:style-name="P37">Elaboración de la documentación técnica complementaría.</text:p>
            </text:list-item>
          </text:list>
        </text:list-item>
      </text:list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list text:continue-numbering="true" text:style-name="L5">
        <text:list-item>
          <text:p text:style-name="P34"><text:span text:style-name="T13">Estado de Entrega (Tareas Realizadas):</text:span> En proceso de estabilización. Las baterías de pruebas locales están operativas, orientando los esfuerzos actuales a la automatización del <text:span text:style-name="T18">Quality Gate</text:span> en el servidor y a <text:span text:style-name="T33">alcanzar/</text:span>consolidar una cobertura de código superior al 85%.</text:p>
        </text:list-item>
      </text:list>
      <text:p text:style-name="Text_20_body"><text:span text:style-name="T27"/></text:p>
      <text:p text:style-name="P12"><text:span text:style-name="T27"/></text:p>
      <text:p text:style-name="P12"><text:span text:style-name="T27"/></text:p>
      <text:p text:style-name="P17"><text:span text:style-name="T15">PD:</text:span> Durante el desarrollo de alguno de los <text:span text:style-name="T19">sprints</text:span> definidos, hemos sufrido algunos pequeños retrasos, debido principalmente a la limitada disponibilidad de tiempo operativo, aunque hemos sido capaces de reajustar los flujos de trabajo y continuar con el desarrollo favorable del proyecto.</text:p>
      <text:p text:style-name="P8"/>
      <text:h text:style-name="P7" text:outline-level="2"><text:soft-page-break/>4. Tablero Kanban (Herramienta de Gestión)</text:h>
      <text:p text:style-name="P8">Para el seguimiento visual, <text:span text:style-name="T23">se ha </text:span>utiliz<text:span text:style-name="T23">ado</text:span> un tablero <text:span text:style-name="T13">Kanban, </text:span><text:span text:style-name="T14">creado y administrado mediante</text:span><text:span text:style-name="T13"> GitHub Projects</text:span>, <text:span text:style-name="T23">en el cual,</text:span> las tareas, <text:span text:style-name="T23">han ido</text:span> transitan<text:span text:style-name="T23">do/desplazándose</text:span> por/<text:span text:style-name="T23">a través de</text:span> las columnas <text:span text:style-name="T23">definidas</text:span>: <text:span text:style-name="T11">New issues</text:span><text:span text:style-name="T20">, </text:span><text:span text:style-name="T11">Ice Box</text:span><text:span text:style-name="T20">, </text:span><text:span text:style-name="T11">Product Backlog</text:span><text:span text:style-name="T20">,</text:span><text:span text:style-name="T11"> Sprint Backlog</text:span><text:span text:style-name="T19">, </text:span><text:span text:style-name="T11">In Progress</text:span><text:span text:style-name="T19">, </text:span><text:span text:style-name="T11">In Review</text:span><text:span text:style-name="T19"> y </text:span><text:span text:style-name="T11">Done</text:span><text:span text:style-name="T19">.</text:span> Esto me permite detectar cuellos de botella en la fase de diseño de interfaces.</text:p>
      <text:h text:style-name="P4" text:outline-level="4">Estado inicial:</text:h>
      <text:h text:style-name="P6" text:outline-level="4"><draw:frame draw:style-name="fr2" draw:name="Imagen1" text:anchor-type="char" svg:width="17.806cm" svg:height="8.322cm" draw:z-index="6"><draw:image xlink:href="Pictures/100000010000077D0000038016F93D3D.png" xlink:type="simple" xlink:show="embed" xlink:actuate="onLoad" draw:mime-type="image/png"/></draw:frame><text:span text:style-name="T29">Estado “actual” (a 2</text:span><text:span text:style-name="T30">8</text:span><text:span text:style-name="T29">/5/2026):</text:span></text:h>
      <text:p text:style-name="P16"><draw:frame draw:style-name="fr1" draw:name="Imagen3" text:anchor-type="char" svg:x="0.056cm" svg:y="-0.005cm" svg:width="17.806cm" svg:height="11.15cm" draw:z-index="7"><draw:image xlink:href="Pictures/1000000100000650000003F4FC6F81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154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lanificación del Proyecto - Scrum</text:span><text:span text:style-name="MT2"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5-28T00:26:33.313842838</dc:date>
    <meta:editing-duration>P1DT3H38M42S</meta:editing-duration>
    <meta:editing-cycles>741</meta:editing-cycles>
    <meta:print-date>2026-05-28T00:00:45.388402881</meta:print-date>
    <meta:printed-by>Archivos PDF</meta:printed-by>
    <meta:document-statistic meta:table-count="0" meta:image-count="3" meta:object-count="0" meta:page-count="7" meta:paragraph-count="72" meta:word-count="1120" meta:character-count="7681" meta:non-whitespace-character-count="6677"/>
  </office:meta>
</office:document-meta>
</file>
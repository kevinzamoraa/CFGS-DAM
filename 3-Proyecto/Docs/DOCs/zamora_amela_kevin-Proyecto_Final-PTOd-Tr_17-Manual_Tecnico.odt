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A8F0000049493577A67.png" manifest:media-type="image/png"/>
  <manifest:file-entry manifest:full-path="Pictures/1000000000000AA20000039713682EBA.png" manifest:media-type="image/png"/>
  <manifest:file-entry manifest:full-path="Pictures/1000000000000664000003C17751F3C7.png" manifest:media-type="image/png"/>
  <manifest:file-entry manifest:full-path="Pictures/10000000000005F8000004054A336375.png" manifest:media-type="image/png"/>
  <manifest:file-entry manifest:full-path="Pictures/10000000000004C5000002DF7003DE6E.png" manifest:media-type="image/png"/>
  <manifest:file-entry manifest:full-path="Pictures/10000001000000C0000000C0BF7E4599.png" manifest:media-type="image/png"/>
  <manifest:file-entry manifest:full-path="Pictures/10000001000002AE000000B55E2BA27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thJax_Typewriter" svg:font-family="MathJax_Typewriter" style:font-family-generic="modern"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DAFO" style:family="table">
      <style:table-properties style:width="16.607cm" table:align="margins" style:writing-mode="lr-tb"/>
    </style:style>
    <style:style style:name="DAFO.A" style:family="table-column">
      <style:table-column-properties style:column-width="5.535cm" style:rel-column-width="21845*"/>
    </style:style>
    <style:style style:name="DAFO.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DAFO.A2" style:family="table-cell">
      <style:table-cell-properties style:vertical-align="middle" fo:background-color="#eeeeee" fo:padding="0cm" fo:border-left="none" fo:border-right="none" fo:border-top="none" fo:border-bottom="0.75pt solid #999999" style:writing-mode="lr-tb">
        <style:background-image/>
      </style:table-cell-properties>
    </style:style>
    <style:style style:name="DAFO.A5" style:family="table-cell">
      <style:table-cell-properties style:vertical-align="middle" fo:background-color="transparent" fo:padding="0cm" fo:border-left="none" fo:border-right="none" fo:border-top="0.75pt solid #999999" fo:border-bottom="2pt solid #000000" style:writing-mode="lr-tb">
        <style:background-image/>
      </style:table-cell-properties>
    </style:style>
    <style:style style:name="RequisitosFuncionales" style:family="table">
      <style:table-properties style:width="16.607cm" table:align="margins" style:writing-mode="lr-tb"/>
    </style:style>
    <style:style style:name="RequisitosFuncionales.A" style:family="table-column">
      <style:table-column-properties style:column-width="0.691cm" style:rel-column-width="2728*"/>
    </style:style>
    <style:style style:name="RequisitosFuncionales.B" style:family="table-column">
      <style:table-column-properties style:column-width="4.314cm" style:rel-column-width="17025*"/>
    </style:style>
    <style:style style:name="RequisitosFuncionales.C" style:family="table-column">
      <style:table-column-properties style:column-width="11.601cm" style:rel-column-width="45782*"/>
    </style:style>
    <style:style style:name="RequisitosFuncionales.A1" style:family="table-cell">
      <style:table-cell-properties style:vertical-align="middle" fo:background-color="transparent" fo:padding="0cm" fo:border-left="none" fo:border-right="none" fo:border-top="2pt solid #000000" fo:border-bottom="0.75pt solid #000000" style:writing-mode="page">
        <style:background-image/>
      </style:table-cell-properties>
    </style:style>
    <style:style style:name="RequisitosFuncionales.2" style:family="table-row">
      <style:table-row-properties style:min-row-height="2.002cm"/>
    </style:style>
    <style:style style:name="RequisitosFuncionales.A2" style:family="table-cell">
      <style:table-cell-properties style:vertical-align="middle" fo:background-color="#eeeeee" fo:padding="0cm" fo:border-left="none" fo:border-right="none" fo:border-top="none" fo:border-bottom="0.75pt solid #999999" loext:writing-mode="bt-lr">
        <style:background-image/>
      </style:table-cell-properties>
    </style:style>
    <style:style style:name="RequisitosFuncionales.B2" style:family="table-cell">
      <style:table-cell-properties style:vertical-align="middle" fo:background-color="#eeeeee" fo:padding="0cm" fo:border-left="none" fo:border-right="none" fo:border-top="none" fo:border-bottom="0.75pt solid #999999" style:writing-mode="page">
        <style:background-image/>
      </style:table-cell-properties>
    </style:style>
    <style:style style:name="RequisitosFuncionales.A9" style:family="table-cell">
      <style:table-cell-properties style:vertical-align="middle" fo:background-color="transparent" fo:padding="0cm" fo:border-left="none" fo:border-right="none" fo:border-top="0.75pt solid #999999" fo:border-bottom="2pt solid #000000" loext:writing-mode="bt-lr">
        <style:background-image/>
      </style:table-cell-properties>
    </style:style>
    <style:style style:name="RequisitosFuncionales.B9" style:family="table-cell">
      <style:table-cell-properties style:vertical-align="middle" fo:background-color="transparent" fo:padding="0cm" fo:border-left="none" fo:border-right="none" fo:border-top="0.75pt solid #999999" fo:border-bottom="2pt solid #000000" style:writing-mode="page">
        <style:background-image/>
      </style:table-cell-properties>
    </style:style>
    <style:style style:name="RequisitosNoFuncionales" style:family="table">
      <style:table-properties style:width="16.607cm" table:align="margins" style:writing-mode="lr-tb"/>
    </style:style>
    <style:style style:name="RequisitosNoFuncionales.A" style:family="table-column">
      <style:table-column-properties style:column-width="0.794cm" style:rel-column-width="3132*"/>
    </style:style>
    <style:style style:name="RequisitosNoFuncionales.B" style:family="table-column">
      <style:table-column-properties style:column-width="3.013cm" style:rel-column-width="11888*"/>
    </style:style>
    <style:style style:name="RequisitosNoFuncionales.C" style:family="table-column">
      <style:table-column-properties style:column-width="2.889cm" style:rel-column-width="11401*"/>
    </style:style>
    <style:style style:name="RequisitosNoFuncionales.D" style:family="table-column">
      <style:table-column-properties style:column-width="9.911cm" style:rel-column-width="39114*"/>
    </style:style>
    <style:style style:name="RequisitosNoFuncionales.A1" style:family="table-cell">
      <style:table-cell-properties style:vertical-align="middle" fo:background-color="transparent" fo:padding="0cm" fo:border-left="none" fo:border-right="none" fo:border-top="2pt solid #000000" fo:border-bottom="0.75pt solid #000000" style:writing-mode="page">
        <style:background-image/>
      </style:table-cell-properties>
    </style:style>
    <style:style style:name="RequisitosNoFuncionales.2" style:family="table-row">
      <style:table-row-properties style:min-row-height="2.002cm"/>
    </style:style>
    <style:style style:name="RequisitosNoFuncionales.A2" style:family="table-cell">
      <style:table-cell-properties style:vertical-align="middle" fo:background-color="#eeeeee" fo:padding="0cm" fo:border-left="none" fo:border-right="none" fo:border-top="none" fo:border-bottom="0.75pt solid #999999" loext:writing-mode="bt-lr">
        <style:background-image/>
      </style:table-cell-properties>
    </style:style>
    <style:style style:name="RequisitosNoFuncionales.B2" style:family="table-cell">
      <style:table-cell-properties style:vertical-align="middle" fo:background-color="#eeeeee" fo:padding="0cm" fo:border-left="none" fo:border-right="none" fo:border-top="none" fo:border-bottom="0.75pt solid #999999" style:writing-mode="page">
        <style:background-image/>
      </style:table-cell-properties>
    </style:style>
    <style:style style:name="RequisitosNoFuncionales.A8" style:family="table-cell">
      <style:table-cell-properties style:vertical-align="middle" fo:background-color="transparent" fo:padding="0cm" fo:border-left="none" fo:border-right="none" fo:border-top="0.75pt solid #999999" fo:border-bottom="2pt solid #000000" loext:writing-mode="bt-lr">
        <style:background-image/>
      </style:table-cell-properties>
    </style:style>
    <style:style style:name="RequisitosNoFuncionales.B8" style:family="table-cell">
      <style:table-cell-properties style:vertical-align="middle" fo:background-color="transparent" fo:padding="0cm" fo:border-left="none" fo:border-right="none" fo:border-top="0.75pt solid #999999" fo:border-bottom="2pt solid #000000" style:writing-mode="page">
        <style:background-image/>
      </style:table-cell-properties>
    </style:style>
    <style:style style:name="EstudioFinanciero" style:family="table">
      <style:table-properties style:width="16.607cm" table:align="margins" style:writing-mode="lr-tb"/>
    </style:style>
    <style:style style:name="EstudioFinanciero.A" style:family="table-column">
      <style:table-column-properties style:column-width="5.535cm" style:rel-column-width="21845*"/>
    </style:style>
    <style:style style:name="EstudioFinanciero.A1" style:family="table-cell">
      <style:table-cell-properties style:vertical-align="middle" fo:background-color="transparent" fo:padding="0cm" fo:border-left="none" fo:border-right="none" fo:border-top="2pt solid #000000" fo:border-bottom="0.75pt solid #000000" style:writing-mode="page">
        <style:background-image/>
      </style:table-cell-properties>
    </style:style>
    <style:style style:name="EstudioFinanciero.A2" style:family="table-cell">
      <style:table-cell-properties style:vertical-align="middle" fo:background-color="#eeeeee" fo:padding="0cm" fo:border-left="none" fo:border-right="none" fo:border-top="none" fo:border-bottom="0.75pt solid #999999" style:writing-mode="page">
        <style:background-image/>
      </style:table-cell-properties>
    </style:style>
    <style:style style:name="EstudioFinanciero.A6" style:family="table-cell">
      <style:table-cell-properties style:vertical-align="middle" fo:background-color="transparent" fo:padding="0cm" fo:border-left="none" fo:border-right="none" fo:border-top="0.75pt solid #999999" fo:border-bottom="2pt solid #000000" style:writing-mode="page">
        <style:background-image/>
      </style:table-cell-properties>
    </style:style>
    <style:style style:name="P1" style:family="paragraph" style:parent-style-name="Footer">
      <style:text-properties style:font-name="MathJax_Typewriter" fo:font-style="normal" fo:font-weight="bold" officeooo:rsid="0010ca43" officeooo:paragraph-rsid="0010ca43" style:font-style-asian="normal" style:font-weight-asian="bold" style:font-style-complex="normal" style:font-weight-complex="bold"/>
    </style:style>
    <style:style style:name="P2" style:family="paragraph" style:parent-style-name="Heading_20_3">
      <style:text-properties style:font-name="MathJax_Typewriter" fo:font-size="11pt" officeooo:paragraph-rsid="0019292e" style:font-size-asian="11pt" style:font-size-complex="11pt"/>
    </style:style>
    <style:style style:name="P3" style:family="paragraph" style:parent-style-name="Heading_20_3">
      <style:paragraph-properties fo:margin-left="0cm" fo:margin-right="0cm" fo:text-indent="0cm" style:auto-text-indent="false"/>
      <style:text-properties style:font-name="MathJax_Typewriter" fo:font-size="11pt" style:font-size-asian="11pt" style:font-size-complex="11pt"/>
    </style:style>
    <style:style style:name="P4" style:family="paragraph" style:parent-style-name="Heading_20_4">
      <style:paragraph-properties fo:margin-left="0cm" fo:margin-right="0cm" fo:margin-top="0cm" fo:margin-bottom="0.247cm" style:contextual-spacing="false" fo:line-height="114%" fo:text-indent="0cm" style:auto-text-indent="false"/>
      <style:text-properties style:font-name="MathJax_Typewriter"/>
    </style:style>
    <style:style style:name="P5" style:family="paragraph" style:parent-style-name="Frame_20_contents">
      <style:paragraph-properties fo:text-align="center" style:justify-single-word="false"/>
    </style:style>
    <style:style style:name="P6" style:family="paragraph" style:parent-style-name="Table_20_Heading">
      <style:paragraph-properties fo:margin-top="0cm" fo:margin-bottom="0cm" style:contextual-spacing="false" fo:text-align="center" style:justify-single-word="false"/>
    </style:style>
    <style:style style:name="P7" style:family="paragraph" style:parent-style-name="Table_20_Heading">
      <style:paragraph-properties fo:text-align="center" style:justify-single-word="false"/>
    </style:style>
    <style:style style:name="P8" style:family="paragraph" style:parent-style-name="Standard">
      <style:paragraph-properties fo:margin-right="0.748cm">
        <style:tab-stops>
          <style:tab-stop style:position="1.752cm"/>
          <style:tab-stop style:position="15.252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Standard">
      <style:paragraph-properties fo:margin-left="4.995cm" fo:text-indent="-4.995cm" style:auto-text-indent="false">
        <style:tab-stops>
          <style:tab-stop style:position="1.794cm"/>
        </style:tab-stops>
      </style:paragraph-properties>
    </style:style>
    <style:style style:name="P11" style:family="paragraph" style:parent-style-name="Heading_20_3">
      <style:paragraph-properties fo:margin-left="0cm" fo:margin-right="0cm" fo:text-indent="0cm" style:auto-text-indent="false"/>
      <style:text-properties style:font-name="Liberation Sans" fo:font-size="11pt" style:font-size-asian="11pt" style:font-size-complex="11pt"/>
    </style:style>
    <style:style style:name="P12" style:family="paragraph" style:parent-style-name="Heading_20_4">
      <style:paragraph-properties fo:margin-left="0cm" fo:margin-right="0cm" fo:margin-top="0cm" fo:margin-bottom="0.247cm" style:contextual-spacing="false" fo:line-height="114%" fo:text-indent="0cm" style:auto-text-indent="false"/>
      <style:text-properties style:font-name="Liberation Sans"/>
    </style:style>
    <style:style style:name="P13" style:family="paragraph" style:parent-style-name="Text_20_body">
      <style:paragraph-properties fo:margin-left="0cm" fo:margin-right="0cm" fo:margin-top="0cm" fo:margin-bottom="0.247cm" style:contextual-spacing="false" fo:line-height="114%" fo:text-indent="0cm" style:auto-text-indent="false"/>
      <style:text-properties style:font-name="Liberation Sans"/>
    </style:style>
    <style:style style:name="P14" style:family="paragraph" style:parent-style-name="Heading_20_3">
      <style:paragraph-properties fo:margin-left="0cm" fo:margin-right="0cm" fo:margin-top="0cm" fo:margin-bottom="0.247cm" style:contextual-spacing="false" fo:line-height="114%" fo:text-indent="0cm" style:auto-text-indent="false"/>
      <style:text-properties style:font-name="Liberation Sans"/>
    </style:style>
    <style:style style:name="P15" style:family="paragraph" style:parent-style-name="Table_20_Contents">
      <style:paragraph-properties fo:margin-left="0cm" fo:margin-right="0cm" fo:margin-top="0cm" fo:margin-bottom="0.247cm" style:contextual-spacing="false" fo:line-height="114%" fo:text-indent="0cm" style:auto-text-indent="false"/>
      <style:text-properties style:font-name="Liberation Sans"/>
    </style:style>
    <style:style style:name="P16" style:family="paragraph" style:parent-style-name="Text_20_body">
      <style:paragraph-properties fo:margin-left="0cm" fo:margin-right="0cm" fo:margin-top="0cm" fo:margin-bottom="0.247cm" style:contextual-spacing="false" fo:line-height="114%" fo:text-indent="0cm" style:auto-text-indent="false" fo:padding="0cm" fo:border="none"/>
      <style:text-properties style:font-name="Liberation Sans"/>
    </style:style>
    <style:style style:name="P17" style:family="paragraph" style:parent-style-name="Table_20_Contents">
      <style:paragraph-properties fo:margin-left="0cm" fo:margin-right="0cm" fo:margin-top="0.201cm" fo:margin-bottom="0.201cm" style:contextual-spacing="false" fo:line-height="114%" fo:text-align="center" style:justify-single-word="false" fo:text-indent="0cm" style:auto-text-indent="false"/>
      <style:text-properties style:font-name="Liberation Sans"/>
    </style:style>
    <style:style style:name="P18" style:family="paragraph" style:parent-style-name="Table_20_Contents">
      <style:paragraph-properties fo:margin-left="0cm" fo:margin-right="0cm" fo:margin-top="0cm" fo:margin-bottom="0.247cm" style:contextual-spacing="false" fo:line-height="114%" fo:text-align="center" style:justify-single-word="false" fo:text-indent="0cm" style:auto-text-indent="false"/>
      <style:text-properties style:font-name="Liberation Sans"/>
    </style:style>
    <style:style style:name="P19" style:family="paragraph" style:parent-style-name="Table_20_Contents">
      <style:paragraph-properties fo:margin-left="0cm" fo:margin-right="0cm" fo:margin-top="0cm" fo:margin-bottom="0.146cm" style:contextual-spacing="false" fo:line-height="114%" fo:text-align="center" style:justify-single-word="false" fo:text-indent="0cm" style:auto-text-indent="false"/>
      <style:text-properties style:font-name="Liberation Sans"/>
    </style:style>
    <style:style style:name="P20" style:family="paragraph" style:parent-style-name="Table_20_Contents">
      <style:paragraph-properties fo:margin-left="0cm" fo:margin-right="0cm" fo:margin-top="0cm" fo:margin-bottom="0cm" style:contextual-spacing="false" fo:line-height="114%" fo:text-align="center" style:justify-single-word="false" fo:text-indent="0cm" style:auto-text-indent="false"/>
      <style:text-properties style:font-name="Liberation Sans"/>
    </style:style>
    <style:style style:name="P21" style:family="paragraph" style:parent-style-name="Table_20_Contents">
      <style:paragraph-properties fo:margin-left="0cm" fo:margin-right="0cm" fo:margin-top="0.101cm" fo:margin-bottom="0.247cm" style:contextual-spacing="false" fo:line-height="114%" fo:text-align="center" style:justify-single-word="false" fo:text-indent="0cm" style:auto-text-indent="false"/>
      <style:text-properties style:font-name="Liberation Sans"/>
    </style:style>
    <style:style style:name="P22" style:family="paragraph" style:parent-style-name="Table_20_Contents">
      <style:paragraph-properties fo:margin-left="0cm" fo:margin-right="0cm" fo:margin-top="0.201cm" fo:margin-bottom="0.347cm" style:contextual-spacing="false" fo:line-height="114%" fo:text-align="center" style:justify-single-word="false" fo:text-indent="0cm" style:auto-text-indent="false"/>
      <style:text-properties style:font-name="Liberation Sans"/>
    </style:style>
    <style:style style:name="P23" style:family="paragraph" style:parent-style-name="Table_20_Contents">
      <style:paragraph-properties fo:margin-left="0cm" fo:margin-right="0cm" fo:margin-top="0.101cm" fo:margin-bottom="0.101cm" style:contextual-spacing="false" fo:line-height="114%" fo:text-align="center" style:justify-single-word="false" fo:text-indent="0cm" style:auto-text-indent="false"/>
      <style:text-properties style:font-name="Liberation Sans"/>
    </style:style>
    <style:style style:name="P24" style:family="paragraph" style:parent-style-name="Table_20_Contents">
      <style:paragraph-properties fo:margin-left="0cm" fo:margin-right="0cm" fo:margin-top="0.101cm" fo:margin-bottom="0.347cm" style:contextual-spacing="false" fo:line-height="114%" fo:text-align="center" style:justify-single-word="false" fo:text-indent="0cm" style:auto-text-indent="false"/>
      <style:text-properties style:font-name="Liberation Sans"/>
    </style:style>
    <style:style style:name="P25" style:family="paragraph" style:parent-style-name="Text_20_body">
      <style:paragraph-properties fo:margin-left="0cm" fo:margin-right="0cm" fo:margin-top="0cm" fo:margin-bottom="0.247cm" style:contextual-spacing="false" fo:line-height="114%" fo:text-align="start" style:justify-single-word="false" fo:text-indent="0cm" style:auto-text-indent="false"/>
      <style:text-properties style:font-name="Liberation Sans"/>
    </style:style>
    <style:style style:name="P26" style:family="paragraph" style:parent-style-name="Table_20_Contents">
      <style:paragraph-properties fo:margin-left="0cm" fo:margin-right="0cm" fo:margin-top="0cm" fo:margin-bottom="0cm" style:contextual-spacing="false" fo:line-height="114%" fo:text-align="start" style:justify-single-word="false" fo:text-indent="0cm" style:auto-text-indent="false"/>
      <style:text-properties style:font-name="Liberation Sans"/>
    </style:style>
    <style:style style:name="P27" style:family="paragraph" style:parent-style-name="Text_20_body">
      <style:paragraph-properties fo:margin-left="0cm" fo:margin-right="0cm" fo:margin-top="0cm" fo:margin-bottom="0.247cm" style:contextual-spacing="false" fo:line-height="114%" fo:text-indent="0cm" style:auto-text-indent="false" fo:padding="0cm" fo:border="none"/>
      <style:text-properties style:font-name="Liberation Sans" officeooo:paragraph-rsid="002c5412"/>
    </style:style>
    <style:style style:name="P28" style:family="paragraph" style:parent-style-name="Heading_20_4">
      <style:text-properties style:font-name="Liberation Sans" officeooo:paragraph-rsid="002c5412"/>
    </style:style>
    <style:style style:name="P29" style:family="paragraph" style:parent-style-name="Standard">
      <style:paragraph-properties fo:margin-left="0cm" fo:margin-right="0cm" fo:text-indent="0cm" style:auto-text-indent="false"/>
      <style:text-properties style:font-name="Liberation Sans"/>
    </style:style>
    <style:style style:name="P30" style:family="paragraph" style:parent-style-name="Text_20_body">
      <style:paragraph-properties fo:margin-left="0cm" fo:margin-right="0cm" fo:text-indent="0cm" style:auto-text-indent="false"/>
      <style:text-properties style:font-name="Liberation Sans"/>
    </style:style>
    <style:style style:name="P31" style:family="paragraph" style:parent-style-name="Standard">
      <style:text-properties style:font-name="Liberation Sans"/>
    </style:style>
    <style:style style:name="P32" style:family="paragraph" style:parent-style-name="Table_20_Contents">
      <style:paragraph-properties fo:margin-left="0cm" fo:margin-right="0cm" fo:margin-top="0.201cm" fo:margin-bottom="0.201cm" style:contextual-spacing="false" fo:line-height="114%" fo:text-align="center" style:justify-single-word="false" fo:text-indent="0cm" style:auto-text-indent="false"/>
      <style:text-properties style:font-name="Liberation Sans" fo:font-weight="bold"/>
    </style:style>
    <style:style style:name="P33" style:family="paragraph" style:parent-style-name="Table_20_Contents">
      <style:paragraph-properties fo:margin-left="0cm" fo:margin-right="0cm" fo:margin-top="0cm" fo:margin-bottom="0.146cm" style:contextual-spacing="false" fo:line-height="114%" fo:text-align="center" style:justify-single-word="false" fo:text-indent="0cm" style:auto-text-indent="false"/>
      <style:text-properties style:font-name="Liberation Sans" fo:font-weight="bold"/>
    </style:style>
    <style:style style:name="P34" style:family="paragraph" style:parent-style-name="Table_20_Contents">
      <style:paragraph-properties fo:margin-left="0cm" fo:margin-right="0cm" fo:margin-top="0cm" fo:margin-bottom="0cm" style:contextual-spacing="false" fo:line-height="114%" fo:text-align="center" style:justify-single-word="false" fo:text-indent="0cm" style:auto-text-indent="false"/>
      <style:text-properties style:font-name="Liberation Sans" fo:font-weight="bold"/>
    </style:style>
    <style:style style:name="P35" style:family="paragraph" style:parent-style-name="Table_20_Contents">
      <style:paragraph-properties fo:margin-left="0cm" fo:margin-right="0cm" fo:margin-top="0cm" fo:margin-bottom="0.247cm" style:contextual-spacing="false" fo:line-height="114%" fo:text-align="center" style:justify-single-word="false" fo:text-indent="0cm" style:auto-text-indent="false"/>
      <style:text-properties style:font-name="Liberation Sans" fo:font-weight="bold"/>
    </style:style>
    <style:style style:name="P36" style:family="paragraph" style:parent-style-name="Text_20_body">
      <style:paragraph-properties fo:margin-left="0cm" fo:margin-right="0cm" fo:margin-top="0cm" fo:margin-bottom="0.247cm" style:contextual-spacing="false" fo:line-height="114%" fo:text-indent="0cm" style:auto-text-indent="false"/>
      <style:text-properties style:font-name="Liberation Sans" fo:font-weight="bold" officeooo:paragraph-rsid="002c5412"/>
    </style:style>
    <style:style style:name="P37" style:family="paragraph" style:parent-style-name="Text_20_body">
      <style:text-properties style:font-name="Liberation Sans"/>
    </style:style>
    <style:style style:name="P38" style:family="paragraph" style:parent-style-name="Heading_20_3">
      <style:paragraph-properties fo:margin-left="0cm" fo:margin-right="0cm" fo:margin-top="0cm" fo:margin-bottom="0.247cm" style:contextual-spacing="false" fo:line-height="114%" fo:text-indent="0cm" style:auto-text-indent="false"/>
      <style:text-properties style:font-name="Liberation Sans" fo:font-size="12pt" style:font-size-asian="12pt" style:font-size-complex="12pt"/>
    </style:style>
    <style:style style:name="P39" style:family="paragraph" style:parent-style-name="Heading_20_4">
      <style:paragraph-properties fo:margin-left="0cm" fo:margin-right="0cm" fo:margin-top="0cm" fo:margin-bottom="0.247cm" style:contextual-spacing="false" fo:line-height="114%" fo:text-indent="0cm" style:auto-text-indent="false"/>
      <style:text-properties style:font-name="Liberation Sans" fo:font-size="12pt" style:font-size-asian="12pt" style:font-size-complex="12pt"/>
    </style:style>
    <style:style style:name="P40" style:family="paragraph" style:parent-style-name="Standard">
      <style:text-properties style:font-name="Liberation Sans" fo:font-size="12pt" style:font-size-asian="12pt" style:font-size-complex="12pt"/>
    </style:style>
    <style:style style:name="P41" style:family="paragraph" style:parent-style-name="Standard">
      <style:paragraph-properties fo:margin-left="4.995cm" fo:text-indent="-4.995cm" style:auto-text-indent="false">
        <style:tab-stops>
          <style:tab-stop style:position="1.794cm"/>
        </style:tab-stops>
      </style:paragraph-properties>
      <style:text-properties style:font-name="Liberation Sans"/>
    </style:style>
    <style:style style:name="P42" style:family="paragraph" style:parent-style-name="Text_20_body">
      <style:paragraph-properties fo:margin-left="4.995cm" fo:text-indent="-4.995cm" style:auto-text-indent="false">
        <style:tab-stops>
          <style:tab-stop style:position="1.794cm"/>
        </style:tab-stops>
      </style:paragraph-properties>
      <style:text-properties style:font-name="Liberation Sans"/>
    </style:style>
    <style:style style:name="P43" style:family="paragraph" style:parent-style-name="Standard">
      <style:paragraph-properties fo:margin-top="0cm" fo:margin-bottom="0.353cm" style:contextual-spacing="false" fo:break-before="page"/>
      <style:text-properties fo:color="#984806" loext:opacity="100%" style:font-name="MathJax_Typewriter" fo:font-size="20pt" fo:font-weight="bold" fo:background-color="transparent" style:font-size-asian="20pt" style:font-weight-asian="bold" style:font-size-complex="20pt">
        <loext:char-complex-color loext:theme-type="accent6" loext:color-type="theme">
          <loext:transformation loext:type="shade" loext:value="4980"/>
        </loext:char-complex-color>
      </style:text-properties>
    </style:style>
    <style:style style:name="P44" style:family="paragraph" style:parent-style-name="Standard">
      <style:text-properties style:font-name="Calibri1"/>
    </style:style>
    <style:style style:name="P45" style:family="paragraph" style:parent-style-name="Text_20_body">
      <style:text-properties style:font-name="Calibri1"/>
    </style:style>
    <style:style style:name="P46" style:family="paragraph" style:parent-style-name="Table_20_Contents">
      <style:paragraph-properties fo:margin-left="0cm" fo:margin-right="0cm" fo:margin-top="0cm" fo:margin-bottom="0cm" style:contextual-spacing="false" fo:line-height="114%" fo:text-align="center" style:justify-single-word="false" fo:text-indent="0cm" style:auto-text-indent="false"/>
    </style:style>
    <style:style style:name="P47" style:family="paragraph" style:parent-style-name="Table_20_Contents">
      <style:paragraph-properties fo:margin-left="0cm" fo:margin-right="0cm" fo:margin-top="0.101cm" fo:margin-bottom="0.101cm" style:contextual-spacing="false" fo:line-height="114%" fo:text-align="center" style:justify-single-word="false" fo:text-indent="0cm" style:auto-text-indent="false"/>
    </style:style>
    <style:style style:name="P48" style:family="paragraph" style:parent-style-name="Text_20_body">
      <style:paragraph-properties fo:margin-left="0cm" fo:margin-right="0cm" fo:margin-top="0cm" fo:margin-bottom="0.247cm" style:contextual-spacing="false" fo:line-height="114%" fo:text-indent="0cm" style:auto-text-indent="false" fo:padding="0cm" fo:border="none"/>
    </style:style>
    <style:style style:name="P49" style:family="paragraph" style:parent-style-name="Table_20_Heading">
      <style:paragraph-properties fo:margin-top="0cm" fo:margin-bottom="0cm" style:contextual-spacing="false"/>
    </style:style>
    <style:style style:name="P50" style:family="paragraph" style:parent-style-name="Heading_20_4">
      <style:paragraph-properties fo:margin-left="0cm" fo:margin-right="0cm" fo:margin-top="0cm" fo:margin-bottom="0.247cm" style:contextual-spacing="false" fo:line-height="114%" fo:text-indent="0cm" style:auto-text-indent="false"/>
      <style:text-properties style:font-name="Google Sans"/>
    </style:style>
    <style:style style:name="P51" style:family="paragraph" style:parent-style-name="Heading_20_4">
      <style:paragraph-properties fo:margin-left="4.995cm" fo:text-indent="-4.995cm" style:auto-text-indent="false">
        <style:tab-stops>
          <style:tab-stop style:position="1.794cm"/>
        </style:tab-stops>
      </style:paragraph-properties>
      <style:text-properties style:font-name="Google Sans"/>
    </style:style>
    <style:style style:name="P52"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style:style>
    <style:style style:name="P53" style:family="paragraph" style:parent-style-name="Frame_20_contents">
      <style:paragraph-properties fo:text-align="end" style:justify-single-word="false"/>
    </style:style>
    <style:style style:name="P54" style:family="paragraph" style:parent-style-name="Frame_20_contents">
      <style:paragraph-properties fo:margin-top="0cm" fo:margin-bottom="0cm" style:contextual-spacing="false" fo:line-height="100%" fo:text-align="center" style:justify-single-word="false"/>
    </style:style>
    <style:style style:name="P55" style:family="paragraph" style:parent-style-name="Frame_20_contents">
      <style:paragraph-properties fo:margin-top="0cm" fo:margin-bottom="0cm" style:contextual-spacing="false" fo:line-height="100%" fo:text-align="center" style:justify-single-word="false"/>
      <style:text-properties officeooo:paragraph-rsid="000c09b6"/>
    </style:style>
    <style:style style:name="P56" style:family="paragraph" style:parent-style-name="Frame_20_contents">
      <style:paragraph-properties fo:margin-top="0cm" fo:margin-bottom="0cm" style:contextual-spacing="false" fo:line-height="100%" fo:text-align="center" style:justify-single-word="false"/>
      <style:text-properties officeooo:rsid="000bf7c1" officeooo:paragraph-rsid="000bf7c1"/>
    </style:style>
    <style:style style:name="P57" style:family="paragraph" style:parent-style-name="Frame_20_contents">
      <style:paragraph-properties fo:margin-top="0cm" fo:margin-bottom="0cm" style:contextual-spacing="false" fo:line-height="100%"/>
      <style:text-properties style:font-name="Consolas" fo:font-size="6pt" fo:font-weight="bold" style:font-size-asian="6pt" style:font-weight-asian="bold" style:font-size-complex="6pt"/>
    </style:style>
    <style:style style:name="P58" style:family="paragraph" style:parent-style-name="Frame_20_contents">
      <style:paragraph-properties fo:margin-top="0cm" fo:margin-bottom="0cm" style:contextual-spacing="false" fo:line-height="100%" fo:text-align="center" style:justify-single-word="false"/>
      <style:text-properties style:font-name="Consolas" fo:font-size="14pt" fo:font-weight="bold" style:font-size-asian="14pt" style:font-weight-asian="bold" style:font-size-complex="12pt"/>
    </style:style>
    <style:style style:name="P59" style:family="paragraph" style:parent-style-name="Heading_20_1" style:list-style-name="WWNum19">
      <style:paragraph-properties fo:margin-left="1.27cm" fo:margin-top="0cm" fo:margin-bottom="0cm" style:contextual-spacing="false" fo:text-indent="-1.27cm" style:auto-text-indent="false" fo:break-before="page"/>
    </style:style>
    <style:style style:name="P60" style:family="paragraph" style:parent-style-name="Heading_20_1" style:list-style-name="WWNum19">
      <style:paragraph-properties fo:margin-left="1.27cm" fo:margin-top="0cm" fo:margin-bottom="0cm" style:contextual-spacing="false" fo:text-indent="-1.27cm" style:auto-text-indent="false" fo:break-before="page"/>
      <style:text-properties style:font-name="MathJax_Typewriter" fo:font-size="16pt" style:font-size-asian="16pt" style:font-size-complex="16pt"/>
    </style:style>
    <style:style style:name="P61" style:family="paragraph" style:parent-style-name="Heading_20_1" style:list-style-name="WWNum19">
      <style:paragraph-properties fo:margin-left="1.27cm" fo:margin-top="0cm" fo:margin-bottom="0cm" style:contextual-spacing="false" fo:text-indent="-1.27cm" style:auto-text-indent="false" fo:break-before="page"/>
      <style:text-properties style:font-name="MathJax_Typewriter"/>
    </style:style>
    <style:style style:name="P62" style:family="paragraph" style:parent-style-name="Heading_20_2" style:list-style-name="WWNum19">
      <style:paragraph-properties fo:margin-left="1.27cm" fo:text-indent="-1.27cm" style:auto-text-indent="false"/>
    </style:style>
    <style:style style:name="P63" style:family="paragraph" style:parent-style-name="Heading_20_2" style:list-style-name="WWNum19">
      <style:paragraph-properties fo:margin-left="1.27cm" fo:text-indent="-1.27cm" style:auto-text-indent="false"/>
      <style:text-properties style:font-name="MathJax_Typewriter"/>
    </style:style>
    <style:style style:name="P64" style:family="paragraph" style:parent-style-name="Heading_20_2" style:list-style-name="WWNum19">
      <style:paragraph-properties fo:margin-left="1.27cm" fo:text-indent="-1.27cm" style:auto-text-indent="false"/>
      <style:text-properties style:font-name="MathJax_Typewriter"/>
    </style:style>
    <style:style style:name="P65" style:family="paragraph" style:parent-style-name="Heading_20_4">
      <style:text-properties style:font-name="Liberation Sans"/>
    </style:style>
    <style:style style:name="P66" style:family="paragraph" style:parent-style-name="Standard">
      <style:paragraph-properties fo:margin-top="0cm" fo:margin-bottom="0cm" style:contextual-spacing="false" fo:line-height="100%" fo:text-align="end" style:justify-single-word="false"/>
    </style:style>
    <style:style style:name="P67" style:family="paragraph" style:parent-style-name="Standard">
      <style:paragraph-properties fo:text-align="start" style:justify-single-word="false"/>
      <style:text-properties fo:color="#984806" loext:opacity="100%" style:font-name="Consolas" fo:font-size="16pt" fo:font-weight="bold" style:font-size-asian="16pt" style:font-weight-asian="bold" style:font-size-complex="14pt" style:font-weight-complex="bold">
        <loext:char-complex-color loext:theme-type="accent6" loext:color-type="theme">
          <loext:transformation loext:type="shade" loext:value="4980"/>
        </loext:char-complex-color>
      </style:text-properties>
    </style:style>
    <style:style style:name="P68" style:family="paragraph" style:parent-style-name="Text_20_body" style:list-style-name="L1">
      <style:paragraph-properties fo:margin-left="0cm" fo:margin-right="0cm" fo:text-indent="0cm" style:auto-text-indent="false"/>
      <style:text-properties style:font-name="Liberation Sans"/>
    </style:style>
    <style:style style:name="P69" style:family="paragraph" style:parent-style-name="Text_20_body" style:list-style-name="L2">
      <style:paragraph-properties fo:margin-left="0cm" fo:margin-right="0cm" fo:margin-top="0cm" fo:margin-bottom="0.247cm" style:contextual-spacing="false" fo:line-height="114%" fo:text-indent="0cm" style:auto-text-indent="false" fo:padding="0cm" fo:border="none"/>
      <style:text-properties style:font-name="Liberation Sans" officeooo:paragraph-rsid="002c5412"/>
    </style:style>
    <style:style style:name="P70" style:family="paragraph" style:parent-style-name="Text_20_body" style:list-style-name="L3">
      <style:paragraph-properties fo:margin-left="0cm" fo:margin-right="0cm" fo:margin-top="0cm" fo:margin-bottom="0.247cm" style:contextual-spacing="false" fo:line-height="114%" fo:text-indent="0cm" style:auto-text-indent="false" fo:padding="0cm" fo:border="none"/>
      <style:text-properties style:font-name="Liberation Sans" officeooo:paragraph-rsid="002c5412"/>
    </style:style>
    <style:style style:name="P71" style:family="paragraph" style:parent-style-name="Text_20_body" style:list-style-name="L4">
      <style:paragraph-properties fo:margin-left="0cm" fo:margin-right="0cm" fo:margin-top="0cm" fo:margin-bottom="0.247cm" style:contextual-spacing="false" fo:line-height="114%" fo:text-indent="0cm" style:auto-text-indent="false" fo:padding="0cm" fo:border="none"/>
      <style:text-properties style:font-name="Liberation Sans" officeooo:paragraph-rsid="002c5412"/>
    </style:style>
    <style:style style:name="P72" style:family="paragraph" style:parent-style-name="Text_20_body" style:list-style-name="L5">
      <style:paragraph-properties fo:margin-left="0cm" fo:margin-right="0cm" fo:margin-top="0cm" fo:margin-bottom="0.247cm" style:contextual-spacing="false" fo:line-height="114%" fo:text-indent="0cm" style:auto-text-indent="false" fo:padding="0cm" fo:border="none"/>
      <style:text-properties style:font-name="Liberation Sans" officeooo:paragraph-rsid="002c5412"/>
    </style:style>
    <style:style style:name="P73" style:family="paragraph" style:parent-style-name="Text_20_body" style:list-style-name="L6">
      <style:paragraph-properties fo:margin-left="0cm" fo:margin-right="0cm" fo:margin-top="0cm" fo:margin-bottom="0.247cm" style:contextual-spacing="false" fo:line-height="114%" fo:text-indent="0cm" style:auto-text-indent="false" fo:padding="0cm" fo:border="none"/>
      <style:text-properties style:font-name="Liberation Sans"/>
    </style:style>
    <style:style style:name="P74" style:family="paragraph" style:parent-style-name="Text_20_body" style:list-style-name="L7">
      <style:paragraph-properties fo:margin-left="0cm" fo:margin-right="0cm" fo:margin-top="0cm" fo:margin-bottom="0.247cm" style:contextual-spacing="false" fo:line-height="114%" fo:text-indent="0cm" style:auto-text-indent="false" fo:padding="0cm" fo:border="none"/>
      <style:text-properties style:font-name="Liberation Sans"/>
    </style:style>
    <style:style style:name="P75" style:family="paragraph" style:parent-style-name="Text_20_body" style:list-style-name="L9">
      <style:paragraph-properties fo:margin-left="0cm" fo:margin-right="0cm" fo:margin-top="0cm" fo:margin-bottom="0.247cm" style:contextual-spacing="false" fo:line-height="114%" fo:text-indent="0cm" style:auto-text-indent="false" fo:padding="0cm" fo:border="none"/>
      <style:text-properties style:font-name="Liberation Sans"/>
    </style:style>
    <style:style style:name="P76" style:family="paragraph" style:parent-style-name="Text_20_body" style:list-style-name="L14">
      <style:paragraph-properties fo:margin-left="0cm" fo:margin-right="0cm" fo:margin-top="0cm" fo:margin-bottom="0.247cm" style:contextual-spacing="false" fo:line-height="114%" fo:text-indent="0cm" style:auto-text-indent="false" fo:padding="0cm" fo:border="none"/>
      <style:text-properties style:font-name="Liberation Sans"/>
    </style:style>
    <style:style style:name="P77" style:family="paragraph" style:parent-style-name="Text_20_body" style:list-style-name="L15">
      <style:paragraph-properties fo:margin-left="0cm" fo:margin-right="0cm" fo:margin-top="0cm" fo:margin-bottom="0.247cm" style:contextual-spacing="false" fo:line-height="114%" fo:text-indent="0cm" style:auto-text-indent="false" fo:padding="0cm" fo:border="none"/>
      <style:text-properties style:font-name="Liberation Sans"/>
    </style:style>
    <style:style style:name="P78" style:family="paragraph" style:parent-style-name="Text_20_body" style:list-style-name="L16">
      <style:paragraph-properties fo:margin-left="0cm" fo:margin-right="0cm" fo:margin-top="0cm" fo:margin-bottom="0.247cm" style:contextual-spacing="false" fo:line-height="114%" fo:text-indent="0cm" style:auto-text-indent="false" fo:padding="0cm" fo:border="none"/>
      <style:text-properties style:font-name="Liberation Sans"/>
    </style:style>
    <style:style style:name="P79" style:family="paragraph" style:parent-style-name="Text_20_body" style:list-style-name="L17">
      <style:paragraph-properties fo:margin-left="0cm" fo:margin-right="0cm" fo:margin-top="0cm" fo:margin-bottom="0.247cm" style:contextual-spacing="false" fo:line-height="114%" fo:text-indent="0cm" style:auto-text-indent="false" fo:padding="0cm" fo:border="none"/>
      <style:text-properties style:font-name="Liberation Sans"/>
    </style:style>
    <style:style style:name="P80" style:family="paragraph" style:parent-style-name="Text_20_body" style:list-style-name="L18">
      <style:paragraph-properties fo:margin-left="0cm" fo:margin-right="0cm" fo:margin-top="0cm" fo:margin-bottom="0.247cm" style:contextual-spacing="false" fo:line-height="114%" fo:text-indent="0cm" style:auto-text-indent="false" fo:padding="0cm" fo:border="none"/>
      <style:text-properties style:font-name="Liberation Sans"/>
    </style:style>
    <style:style style:name="P81" style:family="paragraph" style:parent-style-name="Text_20_body" style:list-style-name="L4">
      <style:paragraph-properties fo:margin-left="0cm" fo:margin-right="0cm" fo:margin-top="0cm" fo:margin-bottom="0.247cm" style:contextual-spacing="false" fo:line-height="114%" fo:text-indent="0cm" style:auto-text-indent="false" fo:padding="0cm" fo:border="none"/>
      <style:text-properties style:font-name="Liberation Sans" fo:font-weight="bold" officeooo:paragraph-rsid="002c5412"/>
    </style:style>
    <style:style style:name="P82" style:family="paragraph" style:parent-style-name="Text_20_body" style:list-style-name="L5">
      <style:paragraph-properties fo:margin-left="0cm" fo:margin-right="0cm" fo:margin-top="0cm" fo:margin-bottom="0.247cm" style:contextual-spacing="false" fo:line-height="114%" fo:text-indent="0cm" style:auto-text-indent="false" fo:padding="0cm" fo:border="none"/>
      <style:text-properties style:font-name="Liberation Sans" fo:font-weight="bold" officeooo:paragraph-rsid="002c5412"/>
    </style:style>
    <style:style style:name="P83" style:family="paragraph" style:parent-style-name="Text_20_body" style:list-style-name="L9">
      <style:paragraph-properties fo:margin-left="0cm" fo:margin-right="0cm" fo:margin-top="0cm" fo:margin-bottom="0.247cm" style:contextual-spacing="false" fo:line-height="114%" fo:text-indent="0cm" style:auto-text-indent="false" fo:padding="0cm" fo:border="none"/>
      <style:text-properties style:font-name="Liberation Sans" fo:font-weight="bold"/>
    </style:style>
    <style:style style:name="P84" style:family="paragraph" style:parent-style-name="Text_20_body" style:list-style-name="L10">
      <style:paragraph-properties fo:margin-left="0cm" fo:margin-right="0cm" fo:margin-top="0cm" fo:margin-bottom="0.247cm" style:contextual-spacing="false" fo:line-height="114%" fo:text-indent="0cm" style:auto-text-indent="false" fo:padding="0cm" fo:border="none"/>
      <style:text-properties style:font-name="Liberation Sans" fo:font-size="12pt" style:font-size-asian="12pt" style:font-size-complex="12pt"/>
    </style:style>
    <style:style style:name="P85" style:family="paragraph" style:parent-style-name="Text_20_body" style:list-style-name="L11">
      <style:paragraph-properties fo:margin-left="0cm" fo:margin-right="0cm" fo:margin-top="0cm" fo:margin-bottom="0.247cm" style:contextual-spacing="false" fo:line-height="114%" fo:text-indent="0cm" style:auto-text-indent="false" fo:padding="0cm" fo:border="none"/>
      <style:text-properties style:font-name="Liberation Sans" fo:font-size="12pt" style:font-size-asian="12pt" style:font-size-complex="12pt"/>
    </style:style>
    <style:style style:name="P86" style:family="paragraph" style:parent-style-name="Text_20_body" style:list-style-name="L12">
      <style:paragraph-properties fo:margin-left="0cm" fo:margin-right="0cm" fo:margin-top="0cm" fo:margin-bottom="0.247cm" style:contextual-spacing="false" fo:line-height="114%" fo:text-indent="0cm" style:auto-text-indent="false" fo:padding="0cm" fo:border="none"/>
      <style:text-properties style:font-name="Liberation Sans" fo:font-size="12pt" style:font-size-asian="12pt" style:font-size-complex="12pt"/>
    </style:style>
    <style:style style:name="P87" style:family="paragraph" style:parent-style-name="Text_20_body" style:list-style-name="L12">
      <style:paragraph-properties fo:margin-left="0cm" fo:margin-right="0cm" fo:margin-top="0cm" fo:margin-bottom="0.247cm" style:contextual-spacing="false" fo:line-height="114%" fo:text-align="start" style:justify-single-word="false" fo:text-indent="0cm" style:auto-text-indent="false" fo:padding="0cm" fo:border="none"/>
      <style:text-properties style:font-name="Liberation Sans" fo:font-size="12pt" style:font-size-asian="12pt" style:font-size-complex="12pt"/>
    </style:style>
    <style:style style:name="P88" style:family="paragraph" style:parent-style-name="Text_20_body" style:list-style-name="L13">
      <style:paragraph-properties fo:margin-left="0cm" fo:margin-right="0cm" fo:margin-top="0cm" fo:margin-bottom="0.247cm" style:contextual-spacing="false" fo:line-height="114%" fo:text-indent="0cm" style:auto-text-indent="false" fo:padding="0cm" fo:border="none"/>
      <style:text-properties style:font-name="Liberation Sans" fo:font-size="12pt" style:font-size-asian="12pt" style:font-size-complex="12pt"/>
    </style:style>
    <style:style style:name="P89" style:family="paragraph" style:parent-style-name="Text_20_body" style:list-style-name="L11">
      <style:paragraph-properties fo:margin-left="0cm" fo:margin-right="0cm" fo:margin-top="0cm" fo:margin-bottom="0.247cm" style:contextual-spacing="false" fo:line-height="114%" fo:text-indent="0cm" style:auto-text-indent="false" fo:padding="0cm" fo:border="none"/>
      <style:text-properties style:font-name="Liberation Sans" fo:font-size="12pt" fo:font-weight="bold" style:font-size-asian="12pt" style:font-size-complex="12pt"/>
    </style:style>
    <style:style style:name="P90" style:family="paragraph" style:parent-style-name="Text_20_body" style:list-style-name="L12">
      <style:paragraph-properties fo:margin-left="0cm" fo:margin-right="0cm" fo:margin-top="0cm" fo:margin-bottom="0.247cm" style:contextual-spacing="false" fo:line-height="114%" fo:text-indent="0cm" style:auto-text-indent="false" fo:padding="0cm" fo:border="none"/>
      <style:text-properties style:font-name="Liberation Sans" fo:font-size="12pt" fo:font-weight="bold" style:font-size-asian="12pt" style:font-size-complex="12pt"/>
    </style:style>
    <style:style style:name="P91" style:family="paragraph" style:parent-style-name="Text_20_body" style:list-style-name="L13">
      <style:paragraph-properties fo:margin-left="0cm" fo:margin-right="0cm" fo:margin-top="0cm" fo:margin-bottom="0.247cm" style:contextual-spacing="false" fo:line-height="114%" fo:text-indent="0cm" style:auto-text-indent="false" fo:padding="0cm" fo:border="none"/>
      <style:text-properties style:font-name="Liberation Sans" fo:font-size="12pt" fo:font-weight="bold" style:font-size-asian="12pt" style:font-size-complex="12pt"/>
    </style:style>
    <style:style style:name="P92" style:family="paragraph" style:parent-style-name="Text_20_body" style:list-style-name="L3">
      <style:paragraph-properties fo:margin-left="0cm" fo:margin-right="0cm" fo:margin-top="0cm" fo:margin-bottom="0.247cm" style:contextual-spacing="false" fo:line-height="114%" fo:text-indent="0cm" style:auto-text-indent="false" fo:padding="0cm" fo:border="none"/>
      <style:text-properties officeooo:paragraph-rsid="002c5412"/>
    </style:style>
    <style:style style:name="P93" style:family="paragraph" style:parent-style-name="Text_20_body" style:list-style-name="L7">
      <style:paragraph-properties fo:margin-left="0cm" fo:margin-right="0cm" fo:margin-top="0cm" fo:margin-bottom="0.247cm" style:contextual-spacing="false" fo:line-height="114%" fo:text-indent="0cm" style:auto-text-indent="false" fo:padding="0cm" fo:border="none"/>
    </style:style>
    <style:style style:name="P94" style:family="paragraph" style:parent-style-name="Text_20_body" style:list-style-name="L8">
      <style:paragraph-properties fo:margin-left="0cm" fo:margin-right="0cm" fo:margin-top="0cm" fo:margin-bottom="0.247cm" style:contextual-spacing="false" fo:line-height="114%" fo:text-indent="0cm" style:auto-text-indent="false" fo:padding="0cm" fo:border="none"/>
    </style:style>
    <style:style style:name="P95" style:family="paragraph" style:parent-style-name="Text_20_body" style:list-style-name="L11">
      <style:paragraph-properties fo:margin-left="0cm" fo:margin-right="0cm" fo:margin-top="0cm" fo:margin-bottom="0.247cm" style:contextual-spacing="false" fo:line-height="114%" fo:text-indent="0cm" style:auto-text-indent="false" fo:padding="0cm" fo:border="none"/>
    </style:style>
    <style:style style:name="P96" style:family="paragraph" style:parent-style-name="Text_20_body" style:list-style-name="L12">
      <style:paragraph-properties fo:margin-left="0cm" fo:margin-right="0cm" fo:margin-top="0cm" fo:margin-bottom="0.247cm" style:contextual-spacing="false" fo:line-height="114%" fo:text-indent="0cm" style:auto-text-indent="false" fo:padding="0cm" fo:border="none"/>
    </style:style>
    <style:style style:name="P97" style:family="paragraph" style:parent-style-name="Text_20_body" style:list-style-name="L13">
      <style:paragraph-properties fo:margin-left="0cm" fo:margin-right="0cm" fo:margin-top="0cm" fo:margin-bottom="0.247cm" style:contextual-spacing="false" fo:line-height="114%" fo:text-indent="0cm" style:auto-text-indent="false" fo:padding="0cm" fo:border="none"/>
    </style:style>
    <style:style style:name="P98" style:family="paragraph" style:parent-style-name="Text_20_body" style:list-style-name="L16">
      <style:paragraph-properties fo:margin-left="0cm" fo:margin-right="0cm" fo:margin-top="0cm" fo:margin-bottom="0.247cm" style:contextual-spacing="false" fo:line-height="114%" fo:text-indent="0cm" style:auto-text-indent="false" fo:padding="0cm" fo:border="none"/>
    </style:style>
    <style:style style:name="P99" style:family="paragraph" style:parent-style-name="Text_20_body" style:list-style-name="L19">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00" style:family="paragraph" style:parent-style-name="Text_20_body" style:list-style-name="L20">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01" style:family="paragraph" style:parent-style-name="Text_20_body" style:list-style-name="L21">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02" style:family="paragraph" style:parent-style-name="Text_20_body" style:list-style-name="L22"/>
    <style:style style:name="P103" style:family="paragraph" style:parent-style-name="Text_20_body" style:list-style-name="L23"/>
    <style:style style:name="P104" style:family="paragraph" style:parent-style-name="Text_20_body" style:list-style-name="L22">
      <style:text-properties style:font-name="Liberation Sans" fo:font-weight="bold"/>
    </style:style>
    <style:style style:name="P105" style:family="paragraph" style:parent-style-name="Text_20_body" style:master-page-name="">
      <loext:graphic-properties draw:fill="none"/>
      <style:paragraph-properties fo:margin-left="0cm" fo:margin-right="0cm" fo:margin-top="0cm" fo:margin-bottom="0.247cm" style:contextual-spacing="false" fo:line-height="115%" fo:text-align="start" style:justify-single-word="false" fo:orphans="2" fo:widows="2" fo:text-indent="0.499cm" style:auto-text-indent="false" style:page-number="auto" fo:background-color="transparent" style:writing-mode="lr-tb">
        <style:tab-stops>
          <style:tab-stop style:position="1.794cm"/>
        </style:tab-stops>
      </style:paragraph-properties>
      <style:text-properties style:font-name="Liberation Sans" officeooo:paragraph-rsid="00ddb291"/>
    </style:style>
    <style:style style:name="P106" style:family="paragraph" style:parent-style-name="Text_20_body">
      <style:text-properties style:font-name="Liberation Sans"/>
    </style:style>
    <style:style style:name="P107" style:family="paragraph" style:parent-style-name="Text_20_body" style:list-style-name="L24"/>
    <style:style style:name="P108" style:family="paragraph">
      <loext:graphic-properties draw:fill="none"/>
      <style:paragraph-properties fo:text-align="start"/>
      <style:text-properties fo:font-size="18pt"/>
    </style:style>
    <style:style style:name="T1" style:family="text">
      <style:text-properties style:font-name="Consolas"/>
    </style:style>
    <style:style style:name="T2" style:family="text">
      <style:text-properties style:font-name="Consolas" fo:font-size="11pt" fo:font-weight="bold" style:font-size-asian="11pt" style:font-weight-asian="bold" style:font-size-complex="20pt"/>
    </style:style>
    <style:style style:name="T3" style:family="text">
      <style:text-properties style:font-name="Consolas" fo:font-size="11pt" fo:font-weight="bold" officeooo:rsid="00942667" style:font-size-asian="11pt" style:font-weight-asian="bold" style:font-size-complex="20pt"/>
    </style:style>
    <style:style style:name="T4" style:family="text">
      <style:text-properties style:font-name="Consolas" fo:font-size="16pt" style:font-size-asian="16pt"/>
    </style:style>
    <style:style style:name="T5" style:family="text">
      <style:text-properties style:font-name="Consolas" fo:font-size="36pt" fo:font-weight="bold" style:font-size-asian="36pt" style:font-weight-asian="bold" style:font-size-complex="20pt"/>
    </style:style>
    <style:style style:name="T6" style:family="text">
      <style:text-properties style:font-name="Consolas" fo:font-size="6pt" fo:font-weight="bold" style:font-size-asian="6pt" style:font-weight-asian="bold" style:font-size-complex="6pt"/>
    </style:style>
    <style:style style:name="T7" style:family="text">
      <style:text-properties style:font-name="Consolas" fo:font-size="22pt" fo:font-weight="bold" style:font-size-asian="22pt" style:font-weight-asian="bold" style:font-size-complex="20pt"/>
    </style:style>
    <style:style style:name="T8" style:family="text">
      <style:text-properties style:font-name="Consolas" fo:font-size="14pt" fo:font-weight="bold" style:font-size-asian="14pt" style:font-weight-asian="bold" style:font-size-complex="12pt"/>
    </style:style>
    <style:style style:name="T9" style:family="text">
      <style:text-properties style:font-name="Consolas" fo:font-size="14pt" fo:font-weight="bold" officeooo:rsid="000bb8b8" style:font-size-asian="14pt" style:font-weight-asian="bold" style:font-size-complex="12pt"/>
    </style:style>
    <style:style style:name="T10" style:family="text">
      <style:text-properties style:font-name="Consolas" fo:font-size="14pt" fo:font-weight="bold" officeooo:rsid="000dd541" style:font-size-asian="14pt" style:font-weight-asian="bold" style:font-size-complex="12pt"/>
    </style:style>
    <style:style style:name="T11" style:family="text">
      <style:text-properties fo:color="#7f7f7f" loext:opacity="100%" style:font-name="Consolas">
        <loext:char-complex-color loext:theme-type="dark1" loext:color-type="theme">
          <loext:transformation loext:type="tint" loext:value="4980"/>
        </loext:char-complex-color>
      </style:text-properties>
    </style:style>
    <style:style style:name="T12" style:family="text">
      <style:text-properties fo:color="#7f7f7f" loext:opacity="100%" style:font-name="Consolas" fo:font-size="11pt" fo:font-weight="bold" style:font-size-asian="11pt" style:font-weight-asian="bold" style:font-size-complex="20pt">
        <loext:char-complex-color loext:theme-type="dark1" loext:color-type="theme">
          <loext:transformation loext:type="tint" loext:value="4980"/>
        </loext:char-complex-color>
      </style:text-properties>
    </style:style>
    <style:style style:name="T13" style:family="text">
      <style:text-properties fo:color="#7f7f7f" loext:opacity="100%" style:font-name="Consolas" fo:font-size="11pt" fo:font-weight="bold" officeooo:rsid="00942667" style:font-size-asian="11pt" style:font-weight-asian="bold" style:font-size-complex="20pt">
        <loext:char-complex-color loext:theme-type="dark1" loext:color-type="theme">
          <loext:transformation loext:type="tint" loext:value="4980"/>
        </loext:char-complex-color>
      </style:text-properties>
    </style:style>
    <style:style style:name="T14" style:family="text">
      <style:text-properties fo:color="#7f7f7f" loext:opacity="100%" style:font-name="Consolas" fo:font-size="7pt" style:font-size-asian="7pt">
        <loext:char-complex-color loext:theme-type="dark1" loext:color-type="theme">
          <loext:transformation loext:type="tint" loext:value="4980"/>
        </loext:char-complex-color>
      </style:text-properties>
    </style:style>
    <style:style style:name="T15" style:family="text">
      <style:text-properties fo:color="#7f7f7f" loext:opacity="100%" style:font-name="Consolas" fo:font-size="22pt" fo:font-weight="bold" style:font-size-asian="22pt" style:font-weight-asian="bold" style:font-size-complex="20pt">
        <loext:char-complex-color loext:theme-type="dark1" loext:color-type="theme">
          <loext:transformation loext:type="tint" loext:value="4980"/>
        </loext:char-complex-color>
      </style:text-properties>
    </style:style>
    <style:style style:name="T16" style:family="text">
      <style:text-properties fo:color="#7f7f7f" loext:opacity="100%" style:font-name="Consolas" fo:font-size="22pt" fo:font-weight="bold" officeooo:rsid="000bf7c1" style:font-size-asian="22pt" style:font-weight-asian="bold" style:font-size-complex="20pt">
        <loext:char-complex-color loext:theme-type="dark1" loext:color-type="theme">
          <loext:transformation loext:type="tint" loext:value="4980"/>
        </loext:char-complex-color>
      </style:text-properties>
    </style:style>
    <style:style style:name="T17" style:family="text">
      <style:text-properties fo:color="#984806" loext:opacity="100%" style:font-name="Consolas" fo:font-size="16pt" fo:font-weight="bold" style:font-size-asian="16pt" style:font-weight-asian="bold" style:font-size-complex="14pt" style:font-weight-complex="bold">
        <loext:char-complex-color loext:theme-type="accent6" loext:color-type="theme">
          <loext:transformation loext:type="shade" loext:value="4980"/>
        </loext:char-complex-color>
      </style:text-properties>
    </style:style>
    <style:style style:name="T18" style:family="text">
      <style:text-properties style:use-window-font-color="true" loext:opacity="0%" fo:font-size="11pt" style:font-size-asian="11pt" style:language-asian="es" style:country-asian="ES">
        <loext:char-complex-color loext:theme-type="dark1" loext:color-type="theme">
          <loext:transformation loext:type="tint" loext:value="2509"/>
        </loext:char-complex-color>
      </style:text-properties>
    </style:style>
    <style:style style:name="T19" style:family="text">
      <style:text-properties text:display="true"/>
    </style:style>
    <style:style style:name="T20" style:family="text">
      <style:text-properties style:use-window-font-color="true" loext:opacity="0%" fo:font-size="11pt" style:font-size-asian="11pt" style:language-asian="es" style:country-asian="ES"/>
    </style:style>
    <style:style style:name="T21" style:family="text">
      <style:text-properties fo:font-weight="bold"/>
    </style:style>
    <style:style style:name="T22" style:family="text">
      <style:text-properties fo:font-weight="bold" officeooo:rsid="0013811a"/>
    </style:style>
    <style:style style:name="T23" style:family="text">
      <style:text-properties fo:font-weight="bold" style:font-weight-asian="bold" style:font-weight-complex="bold"/>
    </style:style>
    <style:style style:name="T24" style:family="text">
      <style:text-properties fo:font-weight="bold" officeooo:rsid="001f8bf2"/>
    </style:style>
    <style:style style:name="T25" style:family="text">
      <style:text-properties fo:font-weight="bold" officeooo:rsid="0025b828"/>
    </style:style>
    <style:style style:name="T26" style:family="text">
      <style:text-properties fo:font-weight="bold" officeooo:rsid="002ad4ab"/>
    </style:style>
    <style:style style:name="T27" style:family="text">
      <style:text-properties fo:font-weight="bold" officeooo:rsid="002f69cb"/>
    </style:style>
    <style:style style:name="T28" style:family="text">
      <style:text-properties fo:font-weight="bold" officeooo:rsid="00313575"/>
    </style:style>
    <style:style style:name="T29" style:family="text">
      <style:text-properties fo:font-weight="bold" officeooo:rsid="003360c1"/>
    </style:style>
    <style:style style:name="T30" style:family="text">
      <style:text-properties fo:font-weight="bold" officeooo:rsid="00378e68"/>
    </style:style>
    <style:style style:name="T31" style:family="text">
      <style:text-properties fo:font-weight="bold" officeooo:rsid="00a241e2"/>
    </style:style>
    <style:style style:name="T32" style:family="text">
      <style:text-properties fo:font-weight="bold" officeooo:rsid="00a374d5"/>
    </style:style>
    <style:style style:name="T33" style:family="text">
      <style:text-properties fo:font-weight="bold" officeooo:rsid="00a3eac3"/>
    </style:style>
    <style:style style:name="T34" style:family="text">
      <style:text-properties fo:font-weight="bold" officeooo:rsid="00a7a6f1"/>
    </style:style>
    <style:style style:name="T35" style:family="text">
      <style:text-properties fo:font-weight="bold" officeooo:rsid="00a93c9a"/>
    </style:style>
    <style:style style:name="T36" style:family="text">
      <style:text-properties fo:font-weight="bold" officeooo:rsid="00ac4141"/>
    </style:style>
    <style:style style:name="T37" style:family="text">
      <style:text-properties fo:font-weight="bold" officeooo:rsid="00ae1767"/>
    </style:style>
    <style:style style:name="T38" style:family="text">
      <style:text-properties fo:font-weight="bold" officeooo:rsid="00bbd5a0"/>
    </style:style>
    <style:style style:name="T39" style:family="text">
      <style:text-properties fo:font-weight="bold" officeooo:rsid="00bffa0c"/>
    </style:style>
    <style:style style:name="T40" style:family="text">
      <style:text-properties fo:font-weight="bold" officeooo:rsid="00c050d6"/>
    </style:style>
    <style:style style:name="T41" style:family="text">
      <style:text-properties fo:font-weight="bold" officeooo:rsid="00c1e1b3"/>
    </style:style>
    <style:style style:name="T42" style:family="text">
      <style:text-properties fo:font-weight="bold" officeooo:rsid="00c55a59"/>
    </style:style>
    <style:style style:name="T43" style:family="text">
      <style:text-properties fo:font-weight="bold" officeooo:rsid="00c6f6ed"/>
    </style:style>
    <style:style style:name="T44" style:family="text">
      <style:text-properties fo:font-weight="bold" officeooo:rsid="00cadb5c"/>
    </style:style>
    <style:style style:name="T45" style:family="text">
      <style:text-properties fo:font-weight="bold" officeooo:rsid="00cb3227"/>
    </style:style>
    <style:style style:name="T46" style:family="text">
      <style:text-properties fo:font-weight="bold" officeooo:rsid="00ccf70d"/>
    </style:style>
    <style:style style:name="T47" style:family="text">
      <style:text-properties fo:font-weight="bold" officeooo:rsid="00cf9720"/>
    </style:style>
    <style:style style:name="T48" style:family="text">
      <style:text-properties fo:font-style="italic"/>
    </style:style>
    <style:style style:name="T49" style:family="text">
      <style:text-properties fo:font-style="italic" style:font-style-asian="italic" style:font-style-complex="italic"/>
    </style:style>
    <style:style style:name="T50" style:family="text">
      <style:text-properties fo:font-style="italic" officeooo:rsid="0020bbdb"/>
    </style:style>
    <style:style style:name="T51" style:family="text">
      <style:text-properties fo:font-style="italic" officeooo:rsid="0025b828"/>
    </style:style>
    <style:style style:name="T52" style:family="text">
      <style:text-properties fo:font-style="italic" officeooo:rsid="002ad4ab"/>
    </style:style>
    <style:style style:name="T53" style:family="text">
      <style:text-properties fo:font-style="italic" fo:font-weight="bold" style:font-style-asian="italic" style:font-style-complex="italic"/>
    </style:style>
    <style:style style:name="T54" style:family="text">
      <style:text-properties fo:font-style="italic" fo:font-weight="bold" officeooo:rsid="00be2be3" style:font-style-asian="italic" style:font-style-complex="italic"/>
    </style:style>
    <style:style style:name="T55" style:family="text">
      <style:text-properties fo:font-style="italic" fo:font-weight="bold" officeooo:rsid="00c6f6ed" style:font-style-asian="italic" style:font-style-complex="italic"/>
    </style:style>
    <style:style style:name="T56" style:family="text">
      <style:text-properties fo:font-style="italic" officeooo:rsid="003c0b02"/>
    </style:style>
    <style:style style:name="T57" style:family="text">
      <style:text-properties fo:font-style="italic" officeooo:rsid="003c806a"/>
    </style:style>
    <style:style style:name="T58" style:family="text">
      <style:text-properties fo:font-style="normal" style:font-style-asian="normal" style:font-style-complex="normal"/>
    </style:style>
    <style:style style:name="T59" style:family="text">
      <style:text-properties fo:font-style="normal" officeooo:rsid="00d003fb" style:font-style-asian="normal" style:font-style-complex="normal"/>
    </style:style>
    <style:style style:name="T60" style:family="text">
      <style:text-properties officeooo:rsid="001a736d"/>
    </style:style>
    <style:style style:name="T61" style:family="text">
      <style:text-properties style:text-line-through-style="none" style:text-line-through-type="none" style:font-name="Liberation Sans" fo:font-size="12pt" fo:font-style="italic" style:text-underline-style="none" fo:font-weight="normal" style:text-blinking="false" style:font-style-asian="italic" style:font-style-complex="italic" loext:padding="0cm" loext:border="none"/>
    </style:style>
    <style:style style:name="T62" style:family="text">
      <style:text-properties style:text-line-through-style="none" style:text-line-through-type="none" style:font-name="Liberation Sans" fo:font-size="12pt" fo:font-style="italic" style:text-underline-style="none" fo:font-weight="normal" officeooo:rsid="00237df4" style:text-blinking="false" style:font-style-asian="italic" style:font-style-complex="italic" loext:padding="0cm" loext:border="none"/>
    </style:style>
    <style:style style:name="T63" style:family="text">
      <style:text-properties officeooo:rsid="00329918" style:font-name-asian="Google Sans Text" style:font-name-complex="Google Sans Text"/>
    </style:style>
    <style:style style:name="T64" style:family="text">
      <style:text-properties officeooo:rsid="00866d88" style:font-name-asian="Google Sans Text" style:font-name-complex="Google Sans Text"/>
    </style:style>
    <style:style style:name="T65" style:family="text">
      <style:text-properties officeooo:rsid="002ddfef"/>
    </style:style>
    <style:style style:name="T66" style:family="text">
      <style:text-properties officeooo:rsid="00329918"/>
    </style:style>
    <style:style style:name="T67" style:family="text">
      <style:text-properties officeooo:rsid="003360c1"/>
    </style:style>
    <style:style style:name="T68" style:family="text">
      <style:text-properties officeooo:rsid="00362fb8"/>
    </style:style>
    <style:style style:name="T69" style:family="text">
      <style:text-properties officeooo:rsid="00378e68"/>
    </style:style>
    <style:style style:name="T70" style:family="text">
      <style:text-properties style:font-name="MathJax_Typewriter"/>
    </style:style>
    <style:style style:name="T71" style:family="text">
      <style:text-properties officeooo:rsid="003f4fad"/>
    </style:style>
    <style:style style:name="T72" style:family="text">
      <style:text-properties officeooo:rsid="0042a122"/>
    </style:style>
    <style:style style:name="T73" style:family="text">
      <style:text-properties officeooo:rsid="004481d6"/>
    </style:style>
    <style:style style:name="T74" style:family="text">
      <style:text-properties style:font-name="Liberation Sans"/>
    </style:style>
    <style:style style:name="T75" style:family="text">
      <style:text-properties style:font-name="Liberation Sans" fo:font-style="italic"/>
    </style:style>
    <style:style style:name="T76" style:family="text">
      <style:text-properties style:font-name="Liberation Sans" fo:font-style="italic" officeooo:rsid="0020bbdb"/>
    </style:style>
    <style:style style:name="T77" style:family="text">
      <style:text-properties style:font-name="Liberation Sans" fo:font-style="italic" style:font-style-asian="italic" style:font-style-complex="italic"/>
    </style:style>
    <style:style style:name="T78" style:family="text">
      <style:text-properties style:font-name="Liberation Sans" fo:font-style="italic" officeooo:rsid="00237df4" style:font-style-asian="italic" style:font-style-complex="italic"/>
    </style:style>
    <style:style style:name="T79" style:family="text">
      <style:text-properties style:font-name="Liberation Sans" fo:font-weight="bold"/>
    </style:style>
    <style:style style:name="T80" style:family="text">
      <style:text-properties style:font-name="Liberation Sans" fo:font-weight="bold" officeooo:rsid="00391fd1"/>
    </style:style>
    <style:style style:name="T81" style:family="text">
      <style:text-properties style:font-name="Liberation Sans" fo:font-weight="bold" officeooo:rsid="0039ea72"/>
    </style:style>
    <style:style style:name="T82" style:family="text">
      <style:text-properties style:font-name="Liberation Sans" fo:font-weight="bold" officeooo:rsid="003a48f4"/>
    </style:style>
    <style:style style:name="T83" style:family="text">
      <style:text-properties style:font-name="Liberation Sans" fo:font-weight="bold" officeooo:rsid="00c55a59"/>
    </style:style>
    <style:style style:name="T84" style:family="text">
      <style:text-properties style:font-name="Liberation Sans" fo:font-weight="bold" officeooo:rsid="00c6f6ed"/>
    </style:style>
    <style:style style:name="T85" style:family="text">
      <style:text-properties style:font-name="Liberation Sans" officeooo:rsid="0050446e"/>
    </style:style>
    <style:style style:name="T86" style:family="text">
      <style:text-properties style:font-name="Liberation Sans" officeooo:rsid="005a30e4"/>
    </style:style>
    <style:style style:name="T87" style:family="text">
      <style:text-properties style:font-name="Liberation Sans" officeooo:rsid="0061a325"/>
    </style:style>
    <style:style style:name="T88" style:family="text">
      <style:text-properties style:font-name="Liberation Sans" fo:font-size="12pt" fo:font-weight="bold" style:font-size-asian="12pt" style:font-size-complex="12pt"/>
    </style:style>
    <style:style style:name="T89" style:family="text">
      <style:text-properties style:font-name="Liberation Sans" fo:font-size="12pt" fo:font-weight="bold" officeooo:rsid="00a3eac3" style:font-size-asian="12pt" style:font-size-complex="12pt"/>
    </style:style>
    <style:style style:name="T90" style:family="text">
      <style:text-properties style:font-name="Liberation Sans" fo:font-size="12pt" fo:font-weight="bold" officeooo:rsid="00aee30c" style:font-size-asian="12pt" style:font-size-complex="12pt"/>
    </style:style>
    <style:style style:name="T91" style:family="text">
      <style:text-properties style:font-name="Liberation Sans" fo:font-size="12pt" style:font-size-asian="12pt" style:font-size-complex="12pt"/>
    </style:style>
    <style:style style:name="T92" style:family="text">
      <style:text-properties style:font-name="Liberation Sans" fo:font-size="12pt" officeooo:rsid="00aba659" style:font-size-asian="12pt" style:font-size-complex="12pt"/>
    </style:style>
    <style:style style:name="T93" style:family="text">
      <style:text-properties style:font-name="Liberation Sans" fo:font-size="12pt" officeooo:rsid="00abe03a" style:font-size-asian="12pt" style:font-size-complex="12pt"/>
    </style:style>
    <style:style style:name="T94" style:family="text">
      <style:text-properties style:font-name="Liberation Sans" fo:font-size="12pt" officeooo:rsid="00ae1767" style:font-size-asian="12pt" style:font-size-complex="12pt"/>
    </style:style>
    <style:style style:name="T95" style:family="text">
      <style:text-properties style:font-name="Liberation Sans" fo:font-size="12pt" fo:font-style="italic" style:font-size-asian="12pt" style:font-style-asian="italic" style:font-size-complex="12pt" style:font-style-complex="italic"/>
    </style:style>
    <style:style style:name="T96" style:family="text">
      <style:text-properties officeooo:rsid="0047fd4e"/>
    </style:style>
    <style:style style:name="T97" style:family="text">
      <style:text-properties officeooo:rsid="0050446e"/>
    </style:style>
    <style:style style:name="T98" style:family="text">
      <style:text-properties officeooo:rsid="0056caca"/>
    </style:style>
    <style:style style:name="T99" style:family="text">
      <style:text-properties officeooo:rsid="005a30e4"/>
    </style:style>
    <style:style style:name="T100" style:family="text">
      <style:text-properties officeooo:rsid="005b3d62"/>
    </style:style>
    <style:style style:name="T101" style:family="text">
      <style:text-properties officeooo:rsid="005cc5c6"/>
    </style:style>
    <style:style style:name="T102" style:family="text">
      <style:text-properties officeooo:rsid="005e8bbb"/>
    </style:style>
    <style:style style:name="T103" style:family="text">
      <style:text-properties officeooo:rsid="005f2879"/>
    </style:style>
    <style:style style:name="T104" style:family="text">
      <style:text-properties officeooo:rsid="0060739c"/>
    </style:style>
    <style:style style:name="T105" style:family="text">
      <style:text-properties officeooo:rsid="0060bf8c"/>
    </style:style>
    <style:style style:name="T106" style:family="text">
      <style:text-properties officeooo:rsid="00610c03"/>
    </style:style>
    <style:style style:name="T107" style:family="text">
      <style:text-properties officeooo:rsid="0061a325"/>
    </style:style>
    <style:style style:name="T108" style:family="text">
      <style:text-properties officeooo:rsid="0061a9f3"/>
    </style:style>
    <style:style style:name="T109" style:family="text">
      <style:text-properties officeooo:rsid="0063a52b"/>
    </style:style>
    <style:style style:name="T110" style:family="text">
      <style:text-properties officeooo:rsid="0063c281"/>
    </style:style>
    <style:style style:name="T111" style:family="text">
      <style:text-properties officeooo:rsid="00648547"/>
    </style:style>
    <style:style style:name="T112" style:family="text">
      <style:text-properties officeooo:rsid="0065b4fb"/>
    </style:style>
    <style:style style:name="T113" style:family="text">
      <style:text-properties fo:font-weight="normal" style:font-weight-asian="normal" style:font-weight-complex="normal"/>
    </style:style>
    <style:style style:name="T114" style:family="text">
      <style:text-properties officeooo:rsid="00a7a6f1"/>
    </style:style>
    <style:style style:name="T115" style:family="text">
      <style:text-properties officeooo:rsid="00aba659"/>
    </style:style>
    <style:style style:name="T116" style:family="text">
      <style:text-properties officeooo:rsid="00abe03a"/>
    </style:style>
    <style:style style:name="T117" style:family="text">
      <style:text-properties officeooo:rsid="00ae1767"/>
    </style:style>
    <style:style style:name="T118" style:family="text">
      <style:text-properties officeooo:rsid="00bbd5a0"/>
    </style:style>
    <style:style style:name="T119" style:family="text">
      <style:text-properties officeooo:rsid="00c55a59"/>
    </style:style>
    <style:style style:name="T120" style:family="text">
      <style:text-properties officeooo:rsid="00c6f6ed"/>
    </style:style>
    <style:style style:name="T121" style:family="text">
      <style:text-properties officeooo:rsid="00cadb5c"/>
    </style:style>
    <style:style style:name="T122" style:family="text">
      <style:text-properties officeooo:rsid="00cb3227"/>
    </style:style>
    <style:style style:name="T123" style:family="text">
      <style:text-properties officeooo:rsid="00cf9720"/>
    </style:style>
    <style:style style:name="T124" style:family="text">
      <style:text-properties style:font-name="Liberation Sans"/>
    </style:style>
    <style:style style:name="T125" style:family="text">
      <style:text-properties style:font-name="Liberation Sans" fo:font-style="italic"/>
    </style:style>
    <style:style style:name="T126" style:family="text">
      <style:text-properties style:font-name="Liberation Sans" fo:font-weight="bold"/>
    </style:style>
    <style:style style:name="T127" style:family="text">
      <style:text-properties officeooo:rsid="00dd73de"/>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06pt solid #000000"/>
    </style:style>
    <style:style style:name="fr2"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0.06pt solid #000000"/>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443cm, 0.942cm, 0.577cm, 0.45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3cm, 0.503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048cm, 0cm, 0.044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style:style style:name="gr1"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40%" draw:contrast="0%" draw:gamma="100%" draw:red="0%" draw:green="0%" draw:blue="0%" fo:clip="rect(0cm, 0cm, 0cm, 0cm)" draw:image-opacity="100%" style:mirror="none" loext:decorative="false" fo:margin-left="0.37cm" fo:margin-right="0.293cm" fo:margin-top="0cm" fo:margin-bottom="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40%" draw:contrast="0%" draw:gamma="100%" draw:red="0%" draw:green="0%" draw:blue="0%" fo:clip="rect(0cm, 0cm, 0cm, 0cm)" draw:image-opacity="100%" style:mirror="none" loext:decorative="false" fo:margin-left="0.37cm" fo:margin-right="0.305cm" fo:margin-top="0cm" fo:margin-bottom="0cm" style:run-through="back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draw:frame draw:style-name="fr7" draw:name="Imagen1" text:anchor-type="char" svg:x="9.834cm" svg:y="0.318cm" svg:width="4.805cm" svg:height="6.212cm" draw:z-index="55"><draw:image xlink:href="Pictures/10000001000000C0000000C0BF7E4599.png" xlink:type="simple" xlink:show="embed" xlink:actuate="onLoad" draw:mime-type="image/png"/></draw:frame><draw:frame draw:style-name="fr1" draw:name="Marco1" text:anchor-type="char" svg:x="1.473cm" svg:y="0.212cm" svg:width="8.477cm" svg:height="6.417cm" draw:z-index="53"><draw:text-box><text:p text:style-name="P54" loext:marker-style-name="T5"><text:span text:style-name="T5">Proyecto</text:span></text:p><text:p text:style-name="P56" loext:marker-style-name="T5"><text:span text:style-name="T5">Temporis</text:span></text:p><text:p text:style-name="P57" loext:marker-style-name="T6"/><text:p text:style-name="P54" loext:marker-style-name="T7"><text:span text:style-name="T16">D</text:span><text:span text:style-name="T15">esarrollo de </text:span><text:span text:style-name="T16">A</text:span><text:span text:style-name="T15">plicaciones </text:span><text:span text:style-name="T16">M</text:span><text:span text:style-name="T15">ultiplataforma</text:span></text:p><text:p text:style-name="Frame_20_contents"/></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Marco2" text:anchor-type="char" svg:x="3.473cm" svg:y="-0.249cm" svg:width="8.424cm" svg:height="3.279cm" draw:z-index="54"><draw:text-box><text:p text:style-name="P55" loext:marker-style-name="T8"><text:span text:style-name="T8">Alumno: </text:span></text:p><text:p text:style-name="P55" loext:marker-style-name="T8"><text:span text:style-name="T9">Kevin Zamora Amela</text:span></text:p><text:p text:style-name="P58" loext:marker-style-name="T8"/><text:p text:style-name="P55" loext:marker-style-name="T8"><text:span text:style-name="T8">Fecha: </text:span></text:p><text:p text:style-name="P55" loext:marker-style-name="T8"><text:span text:style-name="T10">10</text:span><text:span text:style-name="T9">/06/2026</text:span></text:p><text:p text:style-name="P5"/></draw:text-box></draw:frame></text:p>
      <text:p text:style-name="Standard"/>
      <text:p text:style-name="Standard"/>
      <text:p text:style-name="Standard"/>
      <text:p text:style-name="Standard"/>
      <text:p text:style-name="Standard"/>
      <text:p text:style-name="Standard"/>
      <text:p text:style-name="Standard"/>
      <text:p text:style-name="Standard"><draw:frame text:anchor-type="char" draw:z-index="52" draw:name="Imagen 5" draw:style-name="gr1" draw:text-style-name="P108" svg:width="6.905cm" svg:height="2.396cm" svg:x="4.157cm" svg:y="0.766cm"><draw:image xlink:href="Pictures/10000001000002AE000000B55E2BA277.png" xlink:type="simple" xlink:show="embed" xlink:actuate="onLoad" draw:mime-type="image/png"><text:p/></draw:image><svg:desc>LOGOTIPO</svg:desc></draw:frame></text:p>
      <text:table-of-content text:style-name="Sect1" text:protected="true" text:name="Sumario1">
        <text:table-of-content-source text:outline-level="3" text:use-index-marks="false">
          <text:index-title-template text:style-name="Contents_20_Heading">Índice
</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43"><text:bookmark-start text:name="_Toc211418038"/>Índice<text:bookmark-end text:name="_Toc211418038"/></text:p>
            <text:p text:style-name="Standard"/>
          </text:index-title>
          <text:p text:style-name="Contents_20_1" loext:marker-style-name="T20"><text:a xlink:type="simple" xlink:href="#_Toc212808594" text:style-name="Index_20_Link" text:visited-style-name="Index_20_Link">0.<text:span text:style-name="T18"><text:tab/></text:span>Resumen ejecutivo<text:span text:style-name="T19"><text:tab/>3</text:span></text:a></text:p>
          <text:p text:style-name="Contents_20_1" loext:marker-style-name="T20"><text:a xlink:type="simple" xlink:href="#_Toc212808595" text:style-name="Index_20_Link" text:visited-style-name="Index_20_Link">1.<text:span text:style-name="T18"><text:tab/></text:span>Identificación del producto.<text:span text:style-name="T19"><text:tab/>4</text:span></text:a></text:p>
          <text:p text:style-name="Contents_20_2" loext:marker-style-name="T20"><text:a xlink:type="simple" xlink:href="#_Toc212808596" text:style-name="Index_20_Link" text:visited-style-name="Index_20_Link">1.1.<text:span text:style-name="T18"><text:tab/></text:span>Análisis del sector y estructura de la empresa<text:span text:style-name="T19"><text:tab/>4</text:span></text:a></text:p>
          <text:p text:style-name="Contents_20_2" loext:marker-style-name="T20"><text:a xlink:type="simple" xlink:href="#_Toc212808597" text:style-name="Index_20_Link" text:visited-style-name="Index_20_Link">1.2.<text:span text:style-name="T18"><text:tab/></text:span>Estudio de mercado<text:span text:style-name="T19"><text:tab/>4</text:span></text:a></text:p>
          <text:p text:style-name="Contents_20_2" loext:marker-style-name="T20"><text:a xlink:type="simple" xlink:href="#_Toc212808598" text:style-name="Index_20_Link" text:visited-style-name="Index_20_Link">1.3.<text:span text:style-name="T18"><text:tab/></text:span>Innovación, dificultad e investigación<text:span text:style-name="T19"><text:tab/>4</text:span></text:a></text:p>
          <text:p text:style-name="Contents_20_2" loext:marker-style-name="T20"><text:a xlink:type="simple" xlink:href="#_Toc212808599" text:style-name="Index_20_Link" text:visited-style-name="Index_20_Link">1.4.<text:span text:style-name="T18"><text:tab/></text:span>Ayudas y subvenciones<text:span text:style-name="T19"><text:tab/>4</text:span></text:a></text:p>
          <text:p text:style-name="Contents_20_2" loext:marker-style-name="T20"><text:a xlink:type="simple" xlink:href="#_Toc212808600" text:style-name="Index_20_Link" text:visited-style-name="Index_20_Link">1.5.<text:span text:style-name="T18"><text:tab/></text:span>Especificación de requisitos<text:span text:style-name="T19"><text:tab/>4</text:span></text:a></text:p>
          <text:p text:style-name="Contents_20_2" loext:marker-style-name="T20"><text:a xlink:type="simple" xlink:href="#_Toc212808601" text:style-name="Index_20_Link" text:visited-style-name="Index_20_Link">1.6.<text:span text:style-name="T18"><text:tab/></text:span>Casos de uso<text:span text:style-name="T19"><text:tab/>4</text:span></text:a></text:p>
          <text:p text:style-name="Contents_20_2" loext:marker-style-name="T20"><text:a xlink:type="simple" xlink:href="#_Toc212808602" text:style-name="Index_20_Link" text:visited-style-name="Index_20_Link">1.7.<text:span text:style-name="T18"><text:tab/></text:span>Bocetos de interfaz<text:span text:style-name="T19"><text:tab/>5</text:span></text:a></text:p>
          <text:p text:style-name="Contents_20_1" loext:marker-style-name="T20"><text:a xlink:type="simple" xlink:href="#_Toc212808603" text:style-name="Index_20_Link" text:visited-style-name="Index_20_Link">2.<text:span text:style-name="T18"><text:tab/></text:span>Diseño de la aplicación<text:span text:style-name="T19"><text:tab/>5</text:span></text:a></text:p>
          <text:p text:style-name="Contents_20_2" loext:marker-style-name="T20"><text:a xlink:type="simple" xlink:href="#_Toc212808604" text:style-name="Index_20_Link" text:visited-style-name="Index_20_Link">2.1.<text:span text:style-name="T18"><text:tab/></text:span>Estudio de viabilidad<text:span text:style-name="T19"><text:tab/>5</text:span></text:a></text:p>
          <text:p text:style-name="Contents_20_2" loext:marker-style-name="T20"><text:a xlink:type="simple" xlink:href="#_Toc212808605" text:style-name="Index_20_Link" text:visited-style-name="Index_20_Link">2.2.<text:span text:style-name="T18"><text:tab/></text:span>Planificación, ciclo de vida y diagrama Gantt<text:span text:style-name="T19"><text:tab/>5</text:span></text:a></text:p>
          <text:p text:style-name="Contents_20_2" loext:marker-style-name="T20"><text:a xlink:type="simple" xlink:href="#_Toc212808606" text:style-name="Index_20_Link" text:visited-style-name="Index_20_Link">2.3.<text:span text:style-name="T18"><text:tab/></text:span>Entidad Relación<text:span text:style-name="T19"><text:tab/>5</text:span></text:a></text:p>
          <text:p text:style-name="Contents_20_2" loext:marker-style-name="T20"><text:a xlink:type="simple" xlink:href="#_Toc212808607" text:style-name="Index_20_Link" text:visited-style-name="Index_20_Link">2.4.<text:span text:style-name="T18"><text:tab/></text:span>Esquema Relacional<text:span text:style-name="T19"><text:tab/>5</text:span></text:a></text:p>
          <text:p text:style-name="Contents_20_2" loext:marker-style-name="T20"><text:a xlink:type="simple" xlink:href="#_Toc212808608" text:style-name="Index_20_Link" text:visited-style-name="Index_20_Link">2.5.<text:span text:style-name="T18"><text:tab/></text:span>Diagrama de Clases<text:span text:style-name="T19"><text:tab/>5</text:span></text:a></text:p>
          <text:p text:style-name="Contents_20_2" loext:marker-style-name="T20"><text:a xlink:type="simple" xlink:href="#_Toc212808609" text:style-name="Index_20_Link" text:visited-style-name="Index_20_Link">2.6.<text:span text:style-name="T18"><text:tab/></text:span>Diseño de Interfaces<text:span text:style-name="T19"><text:tab/>5</text:span></text:a></text:p>
          <text:p text:style-name="Contents_20_2" loext:marker-style-name="T20"><text:a xlink:type="simple" xlink:href="#_Toc212808610" text:style-name="Index_20_Link" text:visited-style-name="Index_20_Link">2.7.<text:span text:style-name="T18"><text:tab/></text:span>Plan de Pruebas<text:span text:style-name="T19"><text:tab/>6</text:span></text:a></text:p>
          <text:p text:style-name="Contents_20_1" loext:marker-style-name="T20"><text:a xlink:type="simple" xlink:href="#_Toc212808611" text:style-name="Index_20_Link" text:visited-style-name="Index_20_Link">3.<text:span text:style-name="T18"><text:tab/></text:span>Gestión de proyecto - Planificación<text:span text:style-name="T19"><text:tab/>6</text:span></text:a></text:p>
          <text:p text:style-name="Contents_20_2" loext:marker-style-name="T20"><text:a xlink:type="simple" xlink:href="#_Toc212808612" text:style-name="Index_20_Link" text:visited-style-name="Index_20_Link">3.1.<text:span text:style-name="T18"><text:tab/></text:span>Planificación Proyecto - Scrum<text:span text:style-name="T19"><text:tab/>6</text:span></text:a></text:p>
          <text:p text:style-name="Contents_20_1" loext:marker-style-name="T20"><text:a xlink:type="simple" xlink:href="#_Toc212808613" text:style-name="Index_20_Link" text:visited-style-name="Index_20_Link">4.<text:span text:style-name="T18"><text:tab/></text:span>Gestión del proyecto - Seguimiento<text:span text:style-name="T19"><text:tab/>6</text:span></text:a></text:p>
          <text:p text:style-name="Contents_20_2" loext:marker-style-name="T20"><text:a xlink:type="simple" xlink:href="#_Toc212808614" text:style-name="Index_20_Link" text:visited-style-name="Index_20_Link">4.1.<text:span text:style-name="T18"><text:tab/></text:span>Seguimiento Proyecto - Scrum<text:span text:style-name="T19"><text:tab/>6</text:span></text:a></text:p>
          <text:p text:style-name="P8"/>
        </text:index-body>
      </text:table-of-content>
      <text:p text:style-name="P9"/>
      <text:p text:style-name="P9"/>
      <text:list xml:id="list2856342168" text:style-name="WWNum19">
        <text:list-item>
          <text:h text:style-name="P60" text:outline-level="1"><text:bookmark-start text:name="_Toc212808594"/>Resumen ejecutivo<text:bookmark-end text:name="_Toc212808594"/></text:h>
        </text:list-item>
      </text:list>
      <text:h text:style-name="P2" text:outline-level="3">Descripción del proyecto</text:h>
      <text:p text:style-name="P37">El proyecto <text:span text:style-name="T23">Temporis</text:span> consiste en el diseño, desarrollo e implementación de una aplicación móvil nativa para el sistema operativo Android (programada en <text:span text:style-name="T49">Kotlin</text:span> y Java). Su propósito principal es ofrecer una solución integral para la gestión del tiempo operativo, el control de intervalos de concentración y la optimización de la productividad personal y laboral mediante un sistema flexible de temporizadores y contadores personalizados. A nivel de infraestructura de datos, la aplicación delega la persistencia de información y el control perimetral en la suite en la nube de <text:span text:style-name="T49">Google Firebase</text:span> (<text:span text:style-name="T49">Authentication</text:span> y <text:span text:style-name="T49">Cloud Firestore</text:span>).</text:p>
      <text:p text:style-name="P37"/>
      <text:h text:style-name="P3" text:outline-level="3">Qué se espera lograr con la implementación para el usuario final</text:h>
      <text:list text:style-name="L1">
        <text:list-item>
          <text:p text:style-name="P68"><text:span text:style-name="T22">G</text:span><text:span text:style-name="T21">estión eficiente del tiempo:</text:span> Permitir a los usuarios monitorizar con precisión matemática los bloques de tiempo dedicados a tareas u objetivos específicos mediante mecánicas de cuenta regresiva personalizables.</text:p>
        </text:list-item>
        <text:list-item>
          <text:p text:style-name="P68"><text:span text:style-name="T21">Accesibilidad Universal (Inclusión real):</text:span> Proporcionar una interfaz reactiva y dinámica que cumpla con las pautas <text:span text:style-name="T49">WCAG</text:span> (<text:span text:style-name="T58">Web Content Accessibility Guidelines</text:span>), permitiendo la adaptación de la interfaz en tiempo real (escalado de fuentes, alto contraste) para usuarios con diversidad funcional o neurodivergencia.</text:p>
        </text:list-item>
        <text:list-item>
          <text:p text:style-name="P68"><text:span text:style-name="T21">Persistencia y Sincronización:</text:span> Asegurar que los datos del historial de tiempos estén siempre disponibles en tiempo real en cualquier dispositivo, garantizando la resiliencia en entornos con conectividad variable gracias al soporte <text:span text:style-name="T49">offline</text:span> del almacenamiento local indexado.</text:p>
        </text:list-item>
      </text:list>
      <text:p text:style-name="P30"/>
      <text:h text:style-name="P11" text:outline-level="3">Por qué es importante desarrollar esta aplicación</text:h>
      <text:p text:style-name="P30"><text:span text:style-name="T60">E</text:span>l mercado actual del <text:span text:style-name="T49">software</text:span> de productividad cuenta con herramientas robustas, pero adolece de una ineficiencia operativa crítica: la exclusión sistemática de usuarios con capacidades diversas debido a interfaces rígidas y complejas. Como proyecto impulsado por la vivencia de la neurodivergencia (TDA <text:span text:style-name="T96">y Dislexia</text:span>) y el Daño Cerebral Adquirido (DCA), <text:span text:style-name="T21">Temporis</text:span> nace para demostrar que el software de alto rendimiento y la accesibilidad nativa no son mutuamente excluyentes. Su desarrollo es vital para dotar a los entornos corporativos inclusivos y al público general de una herramienta que elimine barreras de usabilidad, transformando el control del tiempo en una experiencia cómoda, intuitiva y justa para todos.</text:p>
      <text:list xml:id="list1115770101937" text:continue-list="list2856342168" text:style-name="WWNum19">
        <text:list-item>
          <text:h text:style-name="P61" text:outline-level="1"><text:bookmark-start text:name="_Toc212808595"/>Identificación del producto.<text:bookmark-end text:name="_Toc212808595"/></text:h>
          <text:list>
            <text:list-item>
              <text:h text:style-name="P63" text:outline-level="2"><text:bookmark-start text:name="_Toc212808596"/>Análisis del sector y estructura de la empresa<text:bookmark-end text:name="_Toc212808596"/></text:h>
            </text:list-item>
          </text:list>
        </text:list-item>
      </text:list>
      <text:p text:style-name="P29">El proyecto se enmarca dentro del sector de las Tecnologías de la Información y la Comunicación (TIC), específicamente en el subsector estratégico del <text:span text:style-name="T21">Desarrollo de Software para la Productividad y la Gestión de Tiempos</text:span>. En este ecosistema, la gestión precisa del tiempo operativo se ha consolidado como la métrica clave para la rentabilidad de las organizaciones modernas.</text:p>
      <text:p text:style-name="P29">Para definir el espectro donde operará e impactará <text:span text:style-name="T21">Temporis</text:span>, se categorizan tres modelos organizacionales diana según sus necesidades específicas, estructuras departamentales e interacción funcional con la herramienta:</text:p>
      <text:h text:style-name="P28" text:outline-level="4">A. <text:span text:style-name="T49">Startup</text:span> de Desarrollo Tecnológico "<text:span text:style-name="T49">CodeFocus</text:span>" (Sector IT - Mediana Empresa)</text:h>
      <text:list text:style-name="L2">
        <text:list-item>
          <text:p text:style-name="P69"><text:span text:style-name="T24">M</text:span><text:span text:style-name="T21">odelo de Negocio:</text:span> Desarrollo de soluciones de software a medida bajo demanda. </text:p>
        </text:list-item>
        <text:list-item>
          <text:p text:style-name="P69"><text:span text:style-name="T24">N</text:span><text:span text:style-name="T21">ecesidad Operativa:</text:span> Control estricto del cómputo de horas por proyecto para garantizar una facturación exacta y auditable al cliente final. </text:p>
        </text:list-item>
      </text:list>
      <text:p text:style-name="P36">Estructura Funcional e Integración:</text:p>
      <text:list text:style-name="L3">
        <text:list-item>
          <text:p text:style-name="P70"><text:span text:style-name="T50">D</text:span><text:span text:style-name="T48">irección (CEO):</text:span> Define los objetivos de rentabilidad anual del negocio. </text:p>
        </text:list-item>
        <text:list-item>
          <text:p text:style-name="P70"><text:span text:style-name="T50">G</text:span><text:span text:style-name="T48">estión de Proyectos (PM):</text:span> Supervisa plazos e hitos; utiliza las métricas de <text:span text:style-name="T21">Temporis</text:span> para contrastar el tiempo estimado frente al tiempo de desarrollo real. </text:p>
        </text:list-item>
        <text:list-item>
          <text:p text:style-name="P92"><text:span text:style-name="T76">D</text:span><text:span text:style-name="T75">esarrollo (IT):</text:span><text:span text:style-name="T74"> Programadores que ejecutan el código; emplean la aplicación nativa para mantener el enfoque (</text:span><text:span text:style-name="T78">E</text:span><text:span text:style-name="T77">j. Técnica Pomodoro: </text:span><text:span text:style-name="T78">Método de gestión del tiempo que mejora la concentración y evita la fatiga mental</text:span><text:span text:style-name="T77">. Consiste en dividir el trabajo en intervalos ininterrumpidos de 25 minutos </text:span><text:span text:style-name="T78">[</text:span><text:span text:style-name="T77">llamados </text:span><text:span text:style-name="Emphasis"><text:span text:style-name="T61">pomodoros</text:span></text:span><text:span text:style-name="Emphasis"><text:span text:style-name="T62">]</text:span></text:span><text:span text:style-name="T77"> seguidos de descansos breves, con pausas más largas tras cuatro ciclos completados</text:span><text:span text:style-name="T74">) y persistir sus bloques de trabajo en la nube. </text:span></text:p>
        </text:list-item>
        <text:list-item>
          <text:p text:style-name="P70"><text:span text:style-name="T50">A</text:span><text:span text:style-name="T48">dministración:</text:span> Extrae de manera automatizada los registros temporales consolidados para emitir facturas precisas.</text:p>
        </text:list-item>
      </text:list>
      <text:h text:style-name="P28" text:outline-level="4">B. Academia de Formación "<text:span text:style-name="T49">E-Learn Innovate</text:span>" (Sector Educativo - Microempresa/Autónomos)</text:h>
      <text:list text:style-name="L4">
        <text:list-item>
          <text:p text:style-name="P71"><text:span text:style-name="T25">M</text:span><text:span text:style-name="T21">odelo de Negocio:</text:span> Plataforma de capacitación virtual y tutorías personalizadas. </text:p>
        </text:list-item>
        <text:list-item>
          <text:p text:style-name="P71"><text:span text:style-name="T25">N</text:span><text:span text:style-name="T21">ecesidad Operativa:</text:span> Fomentar hábitos de estudio eficientes, estructurados y saludables en un alumnado heterogéneo. </text:p>
        </text:list-item>
        <text:list-item>
          <text:p text:style-name="P81">Estructura Funcional e Integración:</text:p>
          <text:list>
            <text:list-item>
              <text:p text:style-name="P71"><text:span text:style-name="T51">C</text:span><text:span text:style-name="T48">oordinación Académica:</text:span> Diseña los planes de estudio y prescribe el uso de <text:span text:style-name="T21">Temporis</text:span> para la segmentación de contenidos en bloques de enfoque de 45 minutos. </text:p>
            </text:list-item>
            <text:list-item>
              <text:p text:style-name="P71"><text:soft-page-break/><text:span text:style-name="T51">D</text:span><text:span text:style-name="T48">epartamento de Tutorías:</text:span> Utiliza la configuración de accesibilidad dinámica de la aplicación para guiar a estudiantes con barreras visuales o cognitivas. </text:p>
            </text:list-item>
            <text:list-item>
              <text:p text:style-name="P71"><text:span text:style-name="T51">S</text:span><text:span text:style-name="T48">oporte Técnico:</text:span> Integra las guías y flujos de la aplicación en el manual de bienvenida del alumno. </text:p>
            </text:list-item>
          </text:list>
        </text:list-item>
      </text:list>
      <text:h text:style-name="P28" text:outline-level="4"><text:span text:style-name="T113"/></text:h>
      <text:h text:style-name="P28" text:outline-level="4">C. Centro de Inclusión Laboral "<text:span text:style-name="T49">IntegraTech</text:span>" (Sector Social - Gran Empresa / Centro Especial de Empleo)</text:h>
      <text:list text:style-name="L5">
        <text:list-item>
          <text:p text:style-name="P72"><text:span text:style-name="T26">M</text:span><text:span text:style-name="T21">odelo de Negocio:</text:span> Servicios de externalización (<text:span text:style-name="T48">outsourcing</text:span>) de procesos de datos gestionados por personal con diversidad funcional. </text:p>
        </text:list-item>
        <text:list-item>
          <text:p text:style-name="P72"><text:span text:style-name="T26">N</text:span><text:span text:style-name="T21">ecesidad Operativa:</text:span> Herramientas de producción adaptadas al 100% que garanticen la igualdad de condiciones en el puesto de trabajo. </text:p>
        </text:list-item>
        <text:list-item>
          <text:p text:style-name="P82">Estructura Funcional e Integración:</text:p>
          <text:list>
            <text:list-item>
              <text:p text:style-name="P72"><text:span text:style-name="T52">U</text:span><text:span text:style-name="T48">nidad de Apoyo a la Inclusión:</text:span> Especialistas y psicólogos que adaptan los terminales; configuran el Alto Contraste y el Tamaño de Fuente dentro de <text:span text:style-name="T21">Temporis</text:span> según la necesidad del operario. </text:p>
            </text:list-item>
            <text:list-item>
              <text:p text:style-name="P72"><text:span text:style-name="T52">O</text:span><text:span text:style-name="T48">peraciones (Núcleo de Servicios):</text:span> Los trabajadores monitorizan el rendimiento y autogestionan sus descansos obligatorios. </text:p>
            </text:list-item>
            <text:list-item>
              <text:p text:style-name="P72"><text:span text:style-name="T52">R</text:span><text:span text:style-name="T48">ecursos Humanos:</text:span> Valora la seguridad del <text:span text:style-name="T49">Login</text:span> <text:span text:style-name="T49">Biométrico</text:span> para proteger datos sensibles de clientes y facilitar el acceso a usuarios con dificultades motoras.</text:p>
            </text:list-item>
          </text:list>
        </text:list-item>
      </text:list>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list xml:id="list1115336243802" text:continue-list="list1115770101937" text:style-name="WWNum19">
        <text:list-item>
          <text:list>
            <text:list-item>
              <text:h text:style-name="P63" text:outline-level="2"><text:bookmark-start text:name="_Toc212808597"/><text:soft-page-break/>Estudio de mercado<text:bookmark-end text:name="_Toc212808597"/></text:h>
            </text:list-item>
          </text:list>
        </text:list-item>
      </text:list>
      <text:p text:style-name="P37"><text:span text:style-name="T65">E</text:span>l estudio de mercado se ha estructurado mediante la técnica de <text:span text:style-name="T48">Benchmarking</text:span> y el diagnóstico estratégico para identificar el hueco de mercado óptimo del producto. </text:p>
      <text:h text:style-name="P12" text:outline-level="4">Evaluación de la Competencia (<text:span text:style-name="T49">Benchmarking</text:span>)</text:h>
      <table:table table:name="DAFO" table:style-name="DAFO" table:template-name="Elegant">
        <table:table-column table:style-name="DAFO.A" table:number-columns-repeated="3"/>
        <table:table-row>
          <table:table-cell table:style-name="DAFO.A1" office:value-type="string">
            <text:p text:style-name="P46"><text:span text:style-name="Strong_20_Emphasis"><text:span text:style-name="T74">Solución Competidora</text:span></text:span></text:p>
          </table:table-cell>
          <table:table-cell table:style-name="DAFO.A1" office:value-type="string">
            <text:p text:style-name="P46"><text:span text:style-name="Strong_20_Emphasis"><text:span text:style-name="T74">Fortalezas Estratégicas</text:span></text:span></text:p>
          </table:table-cell>
          <table:table-cell table:style-name="DAFO.A1" office:value-type="string">
            <text:p text:style-name="P46"><text:span text:style-name="Strong_20_Emphasis"><text:span text:style-name="T74">Debilidades Críticas</text:span></text:span></text:p>
          </table:table-cell>
        </table:table-row>
        <table:table-row>
          <table:table-cell table:style-name="DAFO.A2" office:value-type="string">
            <text:p text:style-name="P32">Toggl Trac<text:span text:style-name="T63">k</text:span></text:p>
          </table:table-cell>
          <table:table-cell table:style-name="DAFO.A2" office:value-type="string">
            <text:p text:style-name="P17"><text:span text:style-name="T67">E</text:span>cosistema multiplataforma muy maduro; herramientas corporativas completas. </text:p>
          </table:table-cell>
          <table:table-cell table:style-name="DAFO.A2" office:value-type="string">
            <text:p text:style-name="P17"><text:span text:style-name="T68">I</text:span>nterfaz excesivamente densa y compleja; accesibilidad nativa nula o muy limitada. </text:p>
          </table:table-cell>
        </table:table-row>
        <table:table-row>
          <table:table-cell table:style-name="DAFO.A2" office:value-type="string">
            <text:p text:style-name="P32">Fores<text:span text:style-name="T63">t</text:span></text:p>
          </table:table-cell>
          <table:table-cell table:style-name="DAFO.A2" office:value-type="string">
            <text:p text:style-name="P17"><text:span text:style-name="T67">E</text:span>xcelente nivel de gamificación; gancho psicológico de retención. </text:p>
          </table:table-cell>
          <table:table-cell table:style-name="DAFO.A2" office:value-type="string">
            <text:p text:style-name="P17"><text:span text:style-name="T68">E</text:span>nfoque marcadamente lúdico; ineficaz para entornos corporativos o industriales formales. </text:p>
          </table:table-cell>
        </table:table-row>
        <table:table-row>
          <table:table-cell table:style-name="DAFO.A2" office:value-type="string">
            <text:p text:style-name="P32">Clocki<text:span text:style-name="T66">f</text:span><text:span text:style-name="T68">y</text:span></text:p>
          </table:table-cell>
          <table:table-cell table:style-name="DAFO.A2" office:value-type="string">
            <text:p text:style-name="P17"><text:span text:style-name="T67">M</text:span>odelo gratuito y flexible para la gestión de equipos de trabajo. </text:p>
          </table:table-cell>
          <table:table-cell table:style-name="DAFO.A2" office:value-type="string">
            <text:p text:style-name="P17"><text:span text:style-name="T68">P</text:span>rivacidad de datos cuestionable; dependencia absoluta de conexión a internet continua. </text:p>
          </table:table-cell>
        </table:table-row>
        <table:table-row>
          <table:table-cell table:style-name="DAFO.A5" office:value-type="string">
            <text:p text:style-name="P32">TEMPORI<text:span text:style-name="T64">S</text:span></text:p>
          </table:table-cell>
          <table:table-cell table:style-name="DAFO.A5" office:value-type="string">
            <text:p text:style-name="P17"><text:span text:style-name="T29">A</text:span><text:span text:style-name="T21">ccesibilidad nativa profunda, seguridad biométrica integrada y simplicidad conceptual extrema</text:span>. </text:p>
          </table:table-cell>
          <table:table-cell table:style-name="DAFO.A5" office:value-type="string">
            <text:p text:style-name="P17"><text:span text:style-name="T68">P</text:span>roducto de nueva marca en fase de despliegue inicial de Mínimo Producto Viable (MVP). </text:p>
          </table:table-cell>
        </table:table-row>
      </table:table>
      <text:p text:style-name="P13"/>
      <text:h text:style-name="P4" text:outline-level="4">Matriz de Diagnóstico DAFO</text:h>
      <text:list text:style-name="L6">
        <text:list-item>
          <text:p text:style-name="P73"><text:span text:style-name="T27">D</text:span><text:span text:style-name="T21">ebilidades (D):</text:span> Marca nueva sin <text:span text:style-name="T71">experiencia ni presencia</text:span> previa en tiendas de aplicaciones; equipo de desarrollo unificado en un único desarrollador. </text:p>
        </text:list-item>
        <text:list-item>
          <text:p text:style-name="P73"><text:span text:style-name="T27">A</text:span><text:span text:style-name="T21">menazas (A):</text:span> Presencia de competidores consolidados con presupuestos masivos de marketing; alta velocidad de actualización de las APIs de accesibilidad base en Android. </text:p>
        </text:list-item>
        <text:list-item>
          <text:p text:style-name="P73"><text:span text:style-name="T28">F</text:span><text:span text:style-name="T21">ortalezas (F):</text:span> Arquitectura orientada al 100% a la inclusión (normativas WCAG); integración nativa reactiva con la suite de Google Firebase; bajo consumo de memoria y recursos en el dispositivo móvil. </text:p>
        </text:list-item>
        <text:list-item>
          <text:p text:style-name="P73"><text:span text:style-name="T28">O</text:span><text:span text:style-name="T21">portunidades (O):</text:span> Adopción masiva del teletrabajo y la autogestión de tareas; endurecimiento de las normativas legales internacionales de inclusión laboral; auge en el consumo de aplicaciones de bienestar y salud mental. </text:p>
        </text:list-item>
      </text:list>
      <text:p text:style-name="P45"/>
      <text:list xml:id="list1115142459837" text:continue-list="list1115336243802" text:style-name="WWNum19">
        <text:list-item>
          <text:list>
            <text:list-item>
              <text:h text:style-name="P63" text:outline-level="2"><text:bookmark-start text:name="_Toc212808598"/><text:soft-page-break/>Innovación, dificultad e investigación<text:bookmark-end text:name="_Toc212808598"/></text:h>
            </text:list-item>
          </text:list>
        </text:list-item>
      </text:list>
      <text:p text:style-name="P13"><text:span text:style-name="T69">E</text:span>l valor técnico e innovador de <text:span text:style-name="T21">Temporis</text:span> se sustenta sobre la resolución de problemas complejos de ingeniería de <text:span text:style-name="T49">software</text:span> para plataformas móviles. </text:p>
      <text:p text:style-name="P13"/>
      <text:h text:style-name="P12" text:outline-level="4">Innovación y Propuesta de Valor Único</text:h>
      <text:p text:style-name="P25"><text:span text:style-name="T69">A</text:span> diferencia de los enfoques tradicionales que delegan la accesibilidad en las capas de configuración global del sistema operativo, <text:span text:style-name="T21">Temporis</text:span> integra las pautas de accesibilidad en el núcleo reactivo de la aplicación. Destaca su <text:span text:style-name="T21">Diseño Reactivo de Interfaz</text:span>, capaz de reajustar los coeficientes de contraste térmico y escalas tipográficas en tiempo real mediante <text:span text:style-name="T49">sliders</text:span> internos, así como la capacidad de detectar dinámicamente el despliegue del teclado virtual para asegurar que ningún campo de control de tiempos quede oculto o inaccesible al usuario. </text:p>
      <text:p text:style-name="P25"/>
      <text:h text:style-name="P12" text:outline-level="4">Dificultad Técnica y Retos Superados</text:h>
      <text:list text:style-name="L7">
        <text:list-item>
          <text:p text:style-name="P74"><text:span text:style-name="T30">S</text:span><text:span text:style-name="T21">incronización </text:span><text:span text:style-name="T53">Cloud</text:span><text:span text:style-name="T21"> Concurrente:</text:span> Control de estados reactivos e hilos asíncronos para evitar condiciones de carrera al pausar o inicializar contadores, garantizando la consistencia inmediata en la base de datos distribuida <text:span text:style-name="T49">NoSQL</text:span>. </text:p>
        </text:list-item>
        <text:list-item>
          <text:p text:style-name="P93"><text:span text:style-name="T80">A</text:span><text:span text:style-name="T79">bstracción de Capa Biométrica:</text:span><text:span text:style-name="T74"> Implementación avanzada de la </text:span><text:span text:style-name="T77">API </text:span><text:span text:style-name="Source_20_Text"><text:span text:style-name="T77">BiometricPrompt</text:span></text:span><text:span text:style-name="T74"> de Android para gestionar de forma segura múltiples niveles de </text:span><text:span text:style-name="T77">hardware</text:span><text:span text:style-name="T74"> criptográfico (reconocimiento facial, sensor dactilar) a través de distintas </text:span><text:span text:style-name="T77">API-levels</text:span><text:span text:style-name="T74"> del sistema operativo. </text:span></text:p>
        </text:list-item>
        <text:list-item>
          <text:p text:style-name="P93"><text:span text:style-name="T81">P</text:span><text:span text:style-name="T79">rocesamiento Gráfico Avanzado:</text:span><text:span text:style-name="T74"> Manipulación del motor de renderizado de la librería de terceros </text:span><text:span text:style-name="Source_20_Text"><text:span text:style-name="T77">MPAndroidChart</text:span></text:span><text:span text:style-name="T74"> para construir una matriz de contribución anual (rejilla indexada de 12 meses por 7 días) mediante estructuras de datos de tipo </text:span><text:span text:style-name="Source_20_Text"><text:span text:style-name="T77">BarEntry</text:span></text:span><text:span text:style-name="T74"> apiladas y formateadores personalizados (</text:span><text:span text:style-name="Source_20_Text"><text:span text:style-name="T77">ValueFormatter</text:span></text:span><text:span text:style-name="T74">) para la internacionalización de datos. </text:span></text:p>
        </text:list-item>
      </text:list>
      <text:p text:style-name="P48"><text:span text:style-name="T74"/></text:p>
      <text:h text:style-name="P12" text:outline-level="4">Líneas de Investigación Aplicadas</text:h>
      <text:list text:style-name="L8">
        <text:list-item>
          <text:p text:style-name="P94"><text:span text:style-name="T82">A</text:span><text:span text:style-name="T79">rquitectura limpia MVVM:</text:span><text:span text:style-name="T74"> Migración de la lógica imperativa basada en </text:span><text:span text:style-name="Source_20_Text"><text:span text:style-name="T77">findViewById</text:span></text:span><text:span text:style-name="T74"> hacia un desacoplamiento estricto empleando la arquitectura </text:span><text:span text:style-name="T75">Model-View-ViewModel</text:span><text:span text:style-name="T74"> con </text:span><text:span text:style-name="Source_20_Text"><text:span text:style-name="T77">ViewBinding</text:span></text:span><text:span text:style-name="T74">, asegurando la escalabilidad del mantenimiento del código. </text:span></text:p>
        </text:list-item>
        <text:list-item>
          <text:p text:style-name="P94"><text:span text:style-name="T82">S</text:span><text:span text:style-name="T79">eguridad Perimetral NoSQL:</text:span><text:span text:style-name="T74"> Diseño analítico de colecciones documentales y reglas de escritura/lectura perimetrales (</text:span><text:span text:style-name="T75">Firebase Security Rules</text:span><text:span text:style-name="T74">) basadas en </text:span><text:span text:style-name="T77">tokens</text:span><text:span text:style-name="T74"> criptográficos (</text:span><text:span text:style-name="Source_20_Text"><text:span text:style-name="T70">request.auth.uid</text:span></text:span><text:span text:style-name="T74">). </text:span></text:p>
        </text:list-item>
      </text:list>
      <text:p text:style-name="P44"/>
      <text:p text:style-name="P44"/>
      <text:list xml:id="list1116051273924" text:continue-list="list1115142459837" text:style-name="WWNum19">
        <text:list-item>
          <text:list>
            <text:list-item>
              <text:h text:style-name="P63" text:outline-level="2"><text:bookmark-start text:name="_Toc212808599"/><text:soft-page-break/>Ayudas y subvenciones<text:bookmark-end text:name="_Toc212808599"/></text:h>
            </text:list-item>
          </text:list>
        </text:list-item>
      </text:list>
      <text:p text:style-name="P13"><text:span text:style-name="T72">L</text:span>a viabilidad financiera y el despliegue a gran escala de <text:span text:style-name="T21">Temporis</text:span> en el mercado laboral se asienta sobre tres programas de financiación institucional plenamente alineados con la naturaleza del software: </text:p>
      <text:p text:style-name="P13"/>
      <text:list text:style-name="L9">
        <text:list-item>
          <text:p text:style-name="P83">Programa Kit Digital (Fondos Next Generation EU - Red.es):</text:p>
          <text:list>
            <text:list-item>
              <text:p text:style-name="P75"><text:span text:style-name="T56">A</text:span><text:span text:style-name="T48">plicación:</text:span> Orientado a microempresas y autónomos que deseen adoptar la aplicación para la digitalización de sus métricas de rendimiento interno bajo la categoría de "Gestión de Procesos" o "<text:span text:style-name="T49">Business Intelligence</text:span>". Financia la implantación de la solución móvil a través de los bonos digitales estipulados. </text:p>
            </text:list-item>
          </text:list>
        </text:list-item>
      </text:list>
      <text:p text:style-name="P16"/>
      <text:list text:continue-numbering="true" text:style-name="L9">
        <text:list-item>
          <text:p text:style-name="P83">Ayudas NEOTEC (Centro para el Desarrollo Tecnológico Industrial - CDTI):</text:p>
          <text:list>
            <text:list-item>
              <text:p text:style-name="P75"><text:span text:style-name="T57">A</text:span><text:span text:style-name="T48">plicación:</text:span> Dirigido a la consolidación de Empresas de Base Tecnológica (EBT). <text:span text:style-name="T21">Temporis</text:span> califica para este fondo de subvención gracias a su esfuerzo de investigación en el desarrollo de accesibilidad dinámica interna y seguridad bancaria biométrica, destinando el capital a la fase de I+D para el cumplimiento estricto de normativas de accesibilidad a nivel internacional. </text:p>
            </text:list-item>
          </text:list>
        </text:list-item>
      </text:list>
      <text:p text:style-name="P16"/>
      <text:list text:continue-numbering="true" text:style-name="L9">
        <text:list-item>
          <text:p text:style-name="P83">Ayudas para la Digitalización del Sector Social (Fondos Autonómicos/Europeos):</text:p>
          <text:list>
            <text:list-item>
              <text:p text:style-name="P75"><text:span text:style-name="T57">A</text:span><text:span text:style-name="T48">plicación:</text:span> Convocatorias específicas destinadas a entidades del tercer sector y Centros Especiales de Empleo. Permite subvencionar de un 50% a un 80% del coste total del despliegue corporativo personalizado de <text:span text:style-name="T21">Temporis</text:span> en las flotas de dispositivos móviles de las organizaciones, garantizando que cumplan con sus políticas corporativas de igualdad y adaptación real del puesto de trabajo. </text:p>
            </text:list-item>
          </text:list>
        </text:list-item>
      </text:list>
      <text:p text:style-name="P31"/>
      <text:p text:style-name="P31"/>
      <text:p text:style-name="P31"/>
      <text:p text:style-name="P31"/>
      <text:p text:style-name="P31"/>
      <text:p text:style-name="P31"/>
      <text:p text:style-name="P31"/>
      <text:list text:continue-list="list1116051273924" text:style-name="WWNum19">
        <text:list-item>
          <text:list>
            <text:list-item>
              <text:h text:style-name="P63" text:outline-level="2"><text:bookmark-start text:name="_Toc212808600"/><text:soft-page-break/>Especificación de requisitos<text:bookmark-end text:name="_Toc212808600"/></text:h>
            </text:list-item>
          </text:list>
        </text:list-item>
      </text:list>
      <text:p text:style-name="P13"><text:span text:style-name="T73">E</text:span>l marco de desarrollo de <text:span text:style-name="T21">Temporis</text:span> se sustenta sobre una matriz de requisitos que garantiza tanto la operatividad técnica del sistema (servicios y reacciones ante entradas) como las restricciones de diseño, mantenibilidad y usabilidad universal necesarias para un entorno inclusivo. </text:p>
      <text:h text:style-name="P38" text:outline-level="3">Requisitos Funcionales (RF)</text:h>
      <table:table table:name="RequisitosFuncionales" table:style-name="RequisitosFuncionales" table:template-name="Elegant">
        <table:table-column table:style-name="RequisitosFuncionales.A"/>
        <table:table-column table:style-name="RequisitosFuncionales.B"/>
        <table:table-column table:style-name="RequisitosFuncionales.C"/>
        <table:table-header-rows>
          <table:table-row>
            <table:table-cell table:style-name="RequisitosFuncionales.A1" office:value-type="string">
              <text:p text:style-name="P49"><text:span text:style-name="Strong_20_Emphasis"><text:span text:style-name="T74">ID</text:span></text:span></text:p>
            </table:table-cell>
            <table:table-cell table:style-name="RequisitosFuncionales.A1" office:value-type="string">
              <text:p text:style-name="P49"><text:span text:style-name="Strong_20_Emphasis"><text:span text:style-name="T74">Requisito Funcional</text:span></text:span></text:p>
            </table:table-cell>
            <table:table-cell table:style-name="RequisitosFuncionales.A1" office:value-type="string">
              <text:p text:style-name="P46"><text:span text:style-name="Strong_20_Emphasis"><text:span text:style-name="T74">Descripción Detallada</text:span></text:span></text:p>
            </table:table-cell>
          </table:table-row>
        </table:table-header-rows>
        <table:table-row table:style-name="RequisitosFuncionales.2">
          <table:table-cell table:style-name="RequisitosFuncionales.A2" office:value-type="string">
            <text:p text:style-name="P34">RF-01</text:p>
          </table:table-cell>
          <table:table-cell table:style-name="RequisitosFuncionales.B2" office:value-type="string">
            <text:p text:style-name="P20"><text:span text:style-name="T97">G</text:span>estión de Usuarios (Auth) </text:p>
          </table:table-cell>
          <table:table-cell table:style-name="RequisitosFuncionales.B2" office:value-type="string">
            <text:p text:style-name="P23"><text:span text:style-name="T97">E</text:span>l sistema proporcionará los servicios de registro, inicio de sesión y recuperación de credenciales mediante el proveedor nativo "<text:span text:style-name="T49">Email/Password</text:span>" y la integración de Google "<text:span text:style-name="T49">Sign-In</text:span>" a través de la infraestructura de <text:span text:style-name="T49">Firebase Auth</text:span>. </text:p>
          </table:table-cell>
        </table:table-row>
        <table:table-row table:style-name="RequisitosFuncionales.2">
          <table:table-cell table:style-name="RequisitosFuncionales.A2" office:value-type="string">
            <text:p text:style-name="P34">RF-02</text:p>
          </table:table-cell>
          <table:table-cell table:style-name="RequisitosFuncionales.B2" office:value-type="string">
            <text:p text:style-name="P20"><text:span text:style-name="T97">A</text:span>cceso Biométrico </text:p>
          </table:table-cell>
          <table:table-cell table:style-name="RequisitosFuncionales.B2" office:value-type="string">
            <text:p text:style-name="P47"><text:span text:style-name="T85">L</text:span><text:span text:style-name="T74">a aplicación permitirá la autenticación del usuario mediante </text:span><text:span text:style-name="T77">hardware</text:span><text:span text:style-name="T74"> criptográfico del dispositivo (huella dactilar o reconocimiento facial) utilizando la </text:span><text:span text:style-name="T77">API</text:span><text:span text:style-name="T74"> </text:span><text:span text:style-name="Source_20_Text"><text:span text:style-name="T77">BiometricPrompt</text:span></text:span><text:span text:style-name="T74">, tras haber completado con éxito un primer inicio de sesión manual. </text:span></text:p>
          </table:table-cell>
        </table:table-row>
        <table:table-row table:style-name="RequisitosFuncionales.2">
          <table:table-cell table:style-name="RequisitosFuncionales.A2" office:value-type="string">
            <text:p text:style-name="P34">RF-03</text:p>
          </table:table-cell>
          <table:table-cell table:style-name="RequisitosFuncionales.B2" office:value-type="string">
            <text:p text:style-name="P20"><text:span text:style-name="T98">C</text:span>RUD de Temporizadores </text:p>
          </table:table-cell>
          <table:table-cell table:style-name="RequisitosFuncionales.B2" office:value-type="string">
            <text:p text:style-name="P23"><text:span text:style-name="T98">E</text:span>l usuario dispondrá de la capacidad de crear, visualizar, editar y eliminar de forma lógica temporizadores personalizados, definiendo propiedades de nomenclatura y duración en bloques de tiempo. </text:p>
          </table:table-cell>
        </table:table-row>
        <table:table-row table:style-name="RequisitosFuncionales.2">
          <table:table-cell table:style-name="RequisitosFuncionales.A2" office:value-type="string">
            <text:p text:style-name="P34">RF-04</text:p>
          </table:table-cell>
          <table:table-cell table:style-name="RequisitosFuncionales.B2" office:value-type="string">
            <text:p text:style-name="P20"><text:span text:style-name="T98">P</text:span>ersistencia "<text:span text:style-name="T49">Cloud</text:span>" </text:p>
          </table:table-cell>
          <table:table-cell table:style-name="RequisitosFuncionales.B2" office:value-type="string">
            <text:p text:style-name="P23"><text:span text:style-name="T98">T</text:span>odas las colecciones de datos referentes a los contadores se sincronizarán en tiempo real de manera asíncrona con <text:span text:style-name="T49">Firebase Firestore</text:span> para asegurar la integridad de datos multidispositivo. </text:p>
          </table:table-cell>
        </table:table-row>
        <table:table-row table:style-name="RequisitosFuncionales.2">
          <table:table-cell table:style-name="RequisitosFuncionales.A2" office:value-type="string">
            <text:p text:style-name="P34">RF-05</text:p>
          </table:table-cell>
          <table:table-cell table:style-name="RequisitosFuncionales.B2" office:value-type="string">
            <text:p text:style-name="P20"><text:span text:style-name="T99">G</text:span>estión de Perfil </text:p>
          </table:table-cell>
          <table:table-cell table:style-name="RequisitosFuncionales.B2" office:value-type="string">
            <text:p text:style-name="P26"><text:span text:style-name="T99">E</text:span>l sistema permitirá la actualización de los metadatos del perfil de usuario (nombre público, descripción) y el almacenamiento físico de imágenes de perfil integradas con <text:span text:style-name="T49">Firebase Storage</text:span>. </text:p>
          </table:table-cell>
        </table:table-row>
        <table:table-row table:style-name="RequisitosFuncionales.2">
          <table:table-cell table:style-name="RequisitosFuncionales.A2" office:value-type="string">
            <text:p text:style-name="P34">RF-06</text:p>
          </table:table-cell>
          <table:table-cell table:style-name="RequisitosFuncionales.B2" office:value-type="string">
            <text:p text:style-name="P20"><text:span text:style-name="T99">V</text:span>isualización Analítica </text:p>
          </table:table-cell>
          <table:table-cell table:style-name="RequisitosFuncionales.B2" office:value-type="string">
            <text:p text:style-name="P46"><text:span text:style-name="T86">E</text:span><text:span text:style-name="T74">l sistema procesará los históricos de tiempos completados para generar una matriz de contribución anual (</text:span><text:span text:style-name="T75">heatmap</text:span><text:span text:style-name="T74">) indexada por meses y días de la semana mediante el motor gráfico de </text:span><text:span text:style-name="Source_20_Text"><text:span text:style-name="T77">MPAndroidChart</text:span></text:span><text:span text:style-name="T74">. </text:span></text:p>
          </table:table-cell>
        </table:table-row>
        <table:table-row table:style-name="RequisitosFuncionales.2">
          <table:table-cell table:style-name="RequisitosFuncionales.A2" office:value-type="string">
            <text:p text:style-name="P34">RF-07</text:p>
          </table:table-cell>
          <table:table-cell table:style-name="RequisitosFuncionales.B2" office:value-type="string">
            <text:p text:style-name="P20"><text:span text:style-name="T99">I</text:span>nternacionalización (i18n) </text:p>
          </table:table-cell>
          <table:table-cell table:style-name="RequisitosFuncionales.B2" office:value-type="string">
            <text:p text:style-name="P20"><text:span text:style-name="T99">L</text:span>a interfaz gráfica de usuario adaptará de manera dinámica sus recursos de texto independientes del sistema según la selección del usuario entre las localizaciones soportadas: Castellano, Catalán/Valenciano e Inglés. </text:p>
          </table:table-cell>
        </table:table-row>
        <table:table-row table:style-name="RequisitosFuncionales.2">
          <table:table-cell table:style-name="RequisitosFuncionales.A9" office:value-type="string">
            <text:p text:style-name="P34">RF-08</text:p>
          </table:table-cell>
          <table:table-cell table:style-name="RequisitosFuncionales.B9" office:value-type="string">
            <text:p text:style-name="P18"><text:span text:style-name="T100">C</text:span>ierre de Sesión Automático </text:p>
          </table:table-cell>
          <table:table-cell table:style-name="RequisitosFuncionales.B9" office:value-type="string">
            <text:p text:style-name="P15"><text:span text:style-name="T100">P</text:span>or criterios de seguridad perimetral, el sistema monitorizará la inactividad del hilo principal de la UI, procediendo al cierre automático del <text:span text:style-name="T49">token</text:span> de sesión tras 30 minutos consecutivos sin interacción. </text:p>
          </table:table-cell>
        </table:table-row>
      </table:table>
      <text:h text:style-name="P38" text:outline-level="3"><text:soft-page-break/>Requisitos No Funcionales (RNF)</text:h>
      <table:table table:name="RequisitosNoFuncionales" table:style-name="RequisitosNoFuncionales" table:template-name="Elegant">
        <table:table-column table:style-name="RequisitosNoFuncionales.A"/>
        <table:table-column table:style-name="RequisitosNoFuncionales.B"/>
        <table:table-column table:style-name="RequisitosNoFuncionales.C"/>
        <table:table-column table:style-name="RequisitosNoFuncionales.D"/>
        <table:table-header-rows>
          <table:table-row>
            <table:table-cell table:style-name="RequisitosNoFuncionales.A1" office:value-type="string">
              <text:p text:style-name="P6"><text:span text:style-name="Strong_20_Emphasis"><text:span text:style-name="T74">ID</text:span></text:span></text:p>
            </table:table-cell>
            <table:table-cell table:style-name="RequisitosNoFuncionales.A1" office:value-type="string">
              <text:p text:style-name="P6"><text:span text:style-name="Strong_20_Emphasis"><text:span text:style-name="T74">Requisito No Funcional</text:span></text:span></text:p>
            </table:table-cell>
            <table:table-cell table:style-name="RequisitosNoFuncionales.A1" office:value-type="string">
              <text:p text:style-name="P6"><text:span text:style-name="Strong_20_Emphasis"><text:span text:style-name="T74">Categoría</text:span></text:span></text:p>
            </table:table-cell>
            <table:table-cell table:style-name="RequisitosNoFuncionales.A1" office:value-type="string">
              <text:p text:style-name="P46"><text:span text:style-name="Strong_20_Emphasis"><text:span text:style-name="T74">Descripción Detallada</text:span></text:span></text:p>
            </table:table-cell>
          </table:table-row>
        </table:table-header-rows>
        <table:table-row table:style-name="RequisitosNoFuncionales.2">
          <table:table-cell table:style-name="RequisitosNoFuncionales.A2" office:value-type="string">
            <text:p text:style-name="P33">RNF-01</text:p>
          </table:table-cell>
          <table:table-cell table:style-name="RequisitosNoFuncionales.B2" office:value-type="string">
            <text:p text:style-name="P19"><text:span text:style-name="T101">A</text:span>ccesibilidad Universal </text:p>
          </table:table-cell>
          <table:table-cell table:style-name="RequisitosNoFuncionales.B2" office:value-type="string">
            <text:p text:style-name="P19"><text:span text:style-name="T101">U</text:span>sabilidad </text:p>
          </table:table-cell>
          <table:table-cell table:style-name="RequisitosNoFuncionales.B2" office:value-type="string">
            <text:p text:style-name="P21"><text:span text:style-name="T101">E</text:span>l sistema admitirá la mutación de la interfaz mediante <text:span text:style-name="T49">sliders</text:span> de escalado tipográfico dinámico (hasta un límite de 30sp) y la permutación a una paleta cromática de alto contraste, garantizando la ausencia de solapamiento de capas (<text:span text:style-name="T48">overlap</text:span>) o pérdida de funcionalidad. </text:p>
          </table:table-cell>
        </table:table-row>
        <table:table-row table:style-name="RequisitosNoFuncionales.2">
          <table:table-cell table:style-name="RequisitosNoFuncionales.A2" office:value-type="string">
            <text:p text:style-name="P34">RNF-02</text:p>
          </table:table-cell>
          <table:table-cell table:style-name="RequisitosNoFuncionales.B2" office:value-type="string">
            <text:p text:style-name="P19"><text:span text:style-name="T102">A</text:span>rquitectura MVVM </text:p>
          </table:table-cell>
          <table:table-cell table:style-name="RequisitosNoFuncionales.B2" office:value-type="string">
            <text:p text:style-name="P19"><text:span text:style-name="T102">M</text:span>antenibilidad </text:p>
          </table:table-cell>
          <table:table-cell table:style-name="RequisitosNoFuncionales.B2" office:value-type="string">
            <text:p text:style-name="P22"><text:span text:style-name="T107">E</text:span>l código fuente de la aplicación móvil se estructurará bajo el patrón arquitectónico <text:span text:style-name="T48">Model-View-ViewModel</text:span>, garantizando el desacoplamiento estricto entre la lógica de persistencia/negocio y los componentes de la interfaz de usuario. </text:p>
          </table:table-cell>
        </table:table-row>
        <table:table-row table:style-name="RequisitosNoFuncionales.2">
          <table:table-cell table:style-name="RequisitosNoFuncionales.A2" office:value-type="string">
            <text:p text:style-name="P34">RNF-03</text:p>
          </table:table-cell>
          <table:table-cell table:style-name="RequisitosNoFuncionales.B2" office:value-type="string">
            <text:p text:style-name="P19"><text:span text:style-name="T103">S</text:span>eguridad de Datos </text:p>
          </table:table-cell>
          <table:table-cell table:style-name="RequisitosNoFuncionales.B2" office:value-type="string">
            <text:p text:style-name="P19"><text:span text:style-name="T103">S</text:span>eguridad </text:p>
          </table:table-cell>
          <table:table-cell table:style-name="RequisitosNoFuncionales.B2" office:value-type="string">
            <text:p text:style-name="P47"><text:span text:style-name="T87">L</text:span><text:span text:style-name="T74">as reglas de seguridad de datos perimetrales (</text:span><text:span text:style-name="T75">Firebase Security Rules</text:span><text:span text:style-name="T74">) interceptarán las consultas sobre Firestore, denegando de forma nativa cualquier lectura o escritura cuyo token (</text:span><text:span text:style-name="Source_20_Text"><text:span text:style-name="T74">request.auth.uid</text:span></text:span><text:span text:style-name="T74">) no coincida con el identificador del propietario del documento. </text:span></text:p>
          </table:table-cell>
        </table:table-row>
        <table:table-row table:style-name="RequisitosNoFuncionales.2">
          <table:table-cell table:style-name="RequisitosNoFuncionales.A2" office:value-type="string">
            <text:p text:style-name="P34">RNF-04</text:p>
          </table:table-cell>
          <table:table-cell table:style-name="RequisitosNoFuncionales.B2" office:value-type="string">
            <text:p text:style-name="P19"><text:span text:style-name="T104">D</text:span>iseño Reactivo (UI) </text:p>
          </table:table-cell>
          <table:table-cell table:style-name="RequisitosNoFuncionales.B2" office:value-type="string">
            <text:p text:style-name="P19"><text:span text:style-name="T104">U</text:span>X </text:p>
          </table:table-cell>
          <table:table-cell table:style-name="RequisitosNoFuncionales.B2" office:value-type="string">
            <text:p text:style-name="P21"><text:span text:style-name="T108">L</text:span>a maquetación de las vistas monitorizará el estado del teclado virtual del dispositivo para reajustar de forma proporcional el tamaño de los contenedores de <text:span text:style-name="T49">scroll</text:span>, evitando la obstrucción física de campos de entrada (<text:span text:style-name="T48">inputs</text:span>). </text:p>
          </table:table-cell>
        </table:table-row>
        <table:table-row table:style-name="RequisitosNoFuncionales.2">
          <table:table-cell table:style-name="RequisitosNoFuncionales.A2" office:value-type="string">
            <text:p text:style-name="P34">RNF-05</text:p>
          </table:table-cell>
          <table:table-cell table:style-name="RequisitosNoFuncionales.B2" office:value-type="string">
            <text:p text:style-name="P19"><text:span text:style-name="T105">T</text:span>iempo de Respuesta </text:p>
          </table:table-cell>
          <table:table-cell table:style-name="RequisitosNoFuncionales.B2" office:value-type="string">
            <text:p text:style-name="P19"><text:span text:style-name="T106">R</text:span>endimiento </text:p>
          </table:table-cell>
          <table:table-cell table:style-name="RequisitosNoFuncionales.B2" office:value-type="string">
            <text:p text:style-name="P21"><text:span text:style-name="T109">L</text:span>as consultas iniciales de sincronización de colecciones documentales con la nube tras la validación del usuario no excederán un umbral crítico de 3 segundos bajo condiciones estándar de red (4G o Wi-Fi). </text:p>
          </table:table-cell>
        </table:table-row>
        <table:table-row table:style-name="RequisitosNoFuncionales.2">
          <table:table-cell table:style-name="RequisitosNoFuncionales.A2" office:value-type="string">
            <text:p text:style-name="P34">RNF-06</text:p>
          </table:table-cell>
          <table:table-cell table:style-name="RequisitosNoFuncionales.B2" office:value-type="string">
            <text:p text:style-name="P19"><text:span text:style-name="T110">C</text:span>ompatibilidad </text:p>
          </table:table-cell>
          <table:table-cell table:style-name="RequisitosNoFuncionales.B2" office:value-type="string">
            <text:p text:style-name="P19"><text:span text:style-name="T110">P</text:span>ortabilidad </text:p>
          </table:table-cell>
          <table:table-cell table:style-name="RequisitosNoFuncionales.B2" office:value-type="string">
            <text:p text:style-name="P21"><text:span text:style-name="T110">E</text:span>l paquete de distribución de la aplicación garantizará la compatibilidad regresiva con el sistema operativo Android desde la versión 7.0 (<text:span text:style-name="T49">API level 24 Nougat</text:span>) en adelante. </text:p>
          </table:table-cell>
        </table:table-row>
        <table:table-row table:style-name="RequisitosNoFuncionales.2">
          <table:table-cell table:style-name="RequisitosNoFuncionales.A8" office:value-type="string">
            <text:p text:style-name="P34">RNF-07</text:p>
          </table:table-cell>
          <table:table-cell table:style-name="RequisitosNoFuncionales.B8" office:value-type="string">
            <text:p text:style-name="P18"><text:span text:style-name="T111">M</text:span>odo Oscuro </text:p>
          </table:table-cell>
          <table:table-cell table:style-name="RequisitosNoFuncionales.B8" office:value-type="string">
            <text:p text:style-name="P18"><text:span text:style-name="T111">E</text:span>stética / Salud </text:p>
          </table:table-cell>
          <table:table-cell table:style-name="RequisitosNoFuncionales.B8" office:value-type="string">
            <text:p text:style-name="P24"><text:span text:style-name="T112">L</text:span>a aplicación implementará un mapeo de estilos oscuros nativos adaptables que heredarán de forma automatizada las directrices de visualización configuradas a nivel global en el sistema operativo del terminal. </text:p>
          </table:table-cell>
        </table:table-row>
      </table:table>
      <text:list xml:id="list1115272084785" text:continue-numbering="true" text:style-name="WWNum19">
        <text:list-item>
          <text:list>
            <text:list-item>
              <text:h text:style-name="P63" text:outline-level="2"><text:bookmark-start text:name="_Toc212808601"/><text:soft-page-break/>Casos de uso<text:bookmark-end text:name="_Toc212808601"/></text:h>
            </text:list-item>
          </text:list>
        </text:list-item>
      </text:list>
      <text:h text:style-name="P38" text:outline-level="3">Identificación de Actores</text:h>
      <text:list text:style-name="L10">
        <text:list-item>
          <text:p text:style-name="P84"><text:span text:style-name="T31">U</text:span><text:span text:style-name="T21">suario (Actor Principal):</text:span> Sujeto que interactúa de forma directa con la aplicación móvil para el control de su tiempo operativo. Puede operar bajo un estado autenticado (acceso completo a la persistencia) o en un estado de navegación informativa preliminar. </text:p>
        </text:list-item>
        <text:list-item>
          <text:p text:style-name="P84"><text:span text:style-name="T31">S</text:span><text:span text:style-name="T21">istema </text:span><text:span text:style-name="T53">Firebase</text:span><text:span text:style-name="T21"> (Actor Secundario):</text:span> Infraestructura externa encargada de proporcionar servicios asíncronos distribuidos de bases de datos <text:span text:style-name="T49">NoSQL</text:span>, autenticación federada y almacenamiento de archivos binarios. </text:p>
        </text:list-item>
        <text:list-item>
          <text:p text:style-name="P84"><text:span text:style-name="T32">S</text:span><text:span text:style-name="T21">istema Biométrico del Dispositivo (Actor Secundario):</text:span> Capa integrada de <text:span text:style-name="T49">hardware</text:span> y abstracción de software (<text:span text:style-name="T49">Android Biometric Framework</text:span>) encargada de realizar la verificación biométrica de la identidad local del usuario. </text:p>
        </text:list-item>
      </text:list>
      <text:h text:style-name="P38" text:outline-level="3">Especificación Detallada de Casos de Uso Críticos</text:h>
      <text:h text:style-name="P39" text:outline-level="4">CU-01: Gestión de Temporizadores (CRUD)</text:h>
      <text:list text:style-name="L11">
        <text:list-item>
          <text:p text:style-name="P85"><text:span text:style-name="T33">D</text:span><text:span text:style-name="T21">escripción:</text:span> Permite al usuario interactuar de manera integral con sus contadores personalizados. </text:p>
        </text:list-item>
        <text:list-item>
          <text:p text:style-name="P85"><text:span text:style-name="T33">A</text:span><text:span text:style-name="T21">ctores:</text:span> Usuario (Principal), <text:span text:style-name="T49">Firebase Firestore</text:span> (Secundario). </text:p>
        </text:list-item>
        <text:list-item>
          <text:p text:style-name="P95"><text:span text:style-name="T89">P</text:span><text:span text:style-name="T88">recondiciones:</text:span><text:span text:style-name="T91"> El usuario debe poseer un token de sesión activo y validado por la plataforma (</text:span><text:span text:style-name="Source_20_Text"><text:span text:style-name="T91">request.auth.uid</text:span></text:span><text:span text:style-name="T91"> válido). </text:span></text:p>
        </text:list-item>
        <text:list-item>
          <text:p text:style-name="P89">Flujo Principal:</text:p>
          <text:list>
            <text:list-item>
              <text:p text:style-name="P85"><text:span text:style-name="T114">E</text:span>l usuario accede al fragmento o sección principal de Temporizadores. </text:p>
            </text:list-item>
            <text:list-item>
              <text:p text:style-name="P85"><text:span text:style-name="T114">E</text:span>l usuario activa el control para agregar o editar un temporizador específico. </text:p>
            </text:list-item>
            <text:list-item>
              <text:p text:style-name="P85"><text:span text:style-name="T114">E</text:span>l sistema despliega el formulario para la introducción de las variables de nombre y duración. </text:p>
            </text:list-item>
            <text:list-item>
              <text:p text:style-name="P85"><text:span text:style-name="T114">E</text:span>l usuario confirma los cambios en la interfaz. </text:p>
            </text:list-item>
            <text:list-item>
              <text:p text:style-name="P85"><text:span text:style-name="T114">E</text:span>l sistema valida estructuralmente los tipos de datos y los envía de manera asíncrona a Firebase Firestore. </text:p>
            </text:list-item>
            <text:list-item>
              <text:p text:style-name="P85"><text:span text:style-name="T114">L</text:span>a base de datos emite una confirmación que actualiza en tiempo real la lista observable de la interfaz. </text:p>
            </text:list-item>
          </text:list>
        </text:list-item>
        <text:list-item>
          <text:p text:style-name="P85"><text:span text:style-name="T34">F</text:span><text:span text:style-name="T21">lujo Alternativo (Eliminación de Registro):</text:span> El usuario pulsa la opción de borrado sobre una tarjeta; el sistema intercepta la petición, solicita confirmación de seguridad y procesa la eliminación física del documento en la colección de la nube. </text:p>
        </text:list-item>
        <text:list-item>
          <text:p text:style-name="P85"><text:span text:style-name="T35">P</text:span><text:span text:style-name="T21">ostcondiciones:</text:span> Las mutaciones aplicadas sobre la colección se propagan de forma persistente a cualquier sesión activa del usuario. </text:p>
        </text:list-item>
      </text:list>
      <text:h text:style-name="P39" text:outline-level="4"><text:soft-page-break/>CU-02: Autenticación de Usuario (Multimodal)</text:h>
      <text:list text:style-name="L12">
        <text:list-item>
          <text:p text:style-name="P86"><text:span text:style-name="T35">D</text:span><text:span text:style-name="T21">escripción:</text:span> Garantiza el acceso securizado a los paneles de datos mediante validación de credenciales estándar o acceso avanzado. </text:p>
        </text:list-item>
        <text:list-item>
          <text:p text:style-name="P86"><text:span text:style-name="T35">A</text:span><text:span text:style-name="T21">ctores:</text:span> Usuario (Principal), <text:span text:style-name="T49">Firebase Auth</text:span> y Sistema Biométrico del Dispositivo (Secundarios). </text:p>
        </text:list-item>
        <text:list-item>
          <text:p text:style-name="P86"><text:span text:style-name="T35">P</text:span><text:span text:style-name="T21">reconditions:</text:span> La aplicación debe estar inicializada con conectividad de red. Para la rama alterna biométrica, el terminal debe disponer de <text:span text:style-name="T49">hardware</text:span> compatible y el usuario debe haber autorizado la persistencia local de la clave en el panel de ajustes. </text:p>
        </text:list-item>
        <text:list-item>
          <text:p text:style-name="P90">Flujo Principal:</text:p>
          <text:list>
            <text:list-item>
              <text:p text:style-name="P86"><text:span text:style-name="T115">E</text:span>l usuario inicia la aplicación en el terminal. </text:p>
            </text:list-item>
            <text:list-item>
              <text:p text:style-name="P96"><text:span text:style-name="T92">S</text:span><text:span text:style-name="T91">i no existe un token de sesión previo almacenado, el sistema restringe el acceso a las vistas de producción (</text:span><text:span text:style-name="Source_20_Text"><text:span text:style-name="T91">Temporizadores</text:span></text:span><text:span text:style-name="T91">, </text:span><text:span text:style-name="Source_20_Text"><text:span text:style-name="T91">Estadísticas</text:span></text:span><text:span text:style-name="T91">, </text:span><text:span text:style-name="Source_20_Text"><text:span text:style-name="T91">Perfil</text:span></text:span><text:span text:style-name="T91">) redirigiendo al usuario hacia el módulo de acceso. </text:span></text:p>
            </text:list-item>
            <text:list-item>
              <text:p text:style-name="P86"><text:span text:style-name="T115">E</text:span>l usuario proporciona sus credenciales mediante texto (Email/Password) o selecciona la autenticación federada con Google. </text:p>
            </text:list-item>
            <text:list-item>
              <text:p text:style-name="P86"><text:span text:style-name="T115">E</text:span>l sistema valida los datos de la solicitud contra la <text:span text:style-name="T49">API de Firebase Auth</text:span>. </text:p>
            </text:list-item>
          </text:list>
        </text:list-item>
        <text:list-item>
          <text:p text:style-name="P90">Flujo Alternativo (Extensión por Validación Biométrica):</text:p>
          <text:list>
            <text:list-item text:start-value="1">
              <text:p text:style-name="P96"><text:span text:style-name="T93">A</text:span><text:span text:style-name="T91">l intentar el reingreso al sistema, si la bandera biométrica local está activa, el sistema despliega el componente nativo </text:span><text:span text:style-name="Source_20_Text"><text:span text:style-name="T95">BiometricPrompt</text:span></text:span><text:span text:style-name="T91">. </text:span></text:p>
            </text:list-item>
            <text:list-item>
              <text:p text:style-name="P86"><text:span text:style-name="T116">E</text:span>l usuario interactúa con el sensor dactilar o de reconocimiento facial del dispositivo. </text:p>
            </text:list-item>
            <text:list-item>
              <text:p text:style-name="P87"><text:span text:style-name="T116">T</text:span>ras la validación del <text:span text:style-name="T49">hardware</text:span>, el sistema omite el paso de contraseña tradicional e inicia sesión directamente. </text:p>
            </text:list-item>
          </text:list>
        </text:list-item>
        <text:list-item>
          <text:p text:style-name="P86"><text:span text:style-name="T36">P</text:span><text:span text:style-name="T21">ostcondiciones:</text:span> El sistema genera un entorno seguro de trabajo, concediendo un <text:span text:style-name="T49">token</text:span> de acceso criptográfico válido para las consultas a la base de datos. </text:p>
        </text:list-item>
      </text:list>
      <text:h text:style-name="P39" text:outline-level="4">CU-03: Ajuste de Accesibilidad Dinámica</text:h>
      <text:list text:style-name="L13">
        <text:list-item>
          <text:p text:style-name="P88"><text:span text:style-name="T37">D</text:span><text:span text:style-name="T21">escripción:</text:span> Permite la reconfiguración estética, de legibilidad y usabilidad estructural de los componentes gráficos en tiempo real. </text:p>
        </text:list-item>
        <text:list-item>
          <text:p text:style-name="P88"><text:span text:style-name="T37">A</text:span><text:span text:style-name="T21">ctores:</text:span> Usuario (Principal). </text:p>
        </text:list-item>
        <text:list-item>
          <text:p text:style-name="P88"><text:span text:style-name="T37">P</text:span><text:span text:style-name="T21">recondiciones:</text:span> Ninguna (módulo accesible de forma global independiente del estado de la autenticación). </text:p>
        </text:list-item>
        <text:list-item>
          <text:p text:style-name="P91">Flujo Principal:</text:p>
          <text:list>
            <text:list-item>
              <text:p text:style-name="P88"><text:span text:style-name="T117">E</text:span>l usuario navega hacia el módulo de Ajustes de Accesibilidad dentro del sistema de pestañas. </text:p>
            </text:list-item>
            <text:list-item>
              <text:p text:style-name="P88"><text:soft-page-break/><text:span text:style-name="T117">E</text:span>l usuario modifica el control deslizante (<text:span text:style-name="T48">Slider</text:span>) destinado a la escala tipográfica. </text:p>
            </text:list-item>
            <text:list-item>
              <text:p text:style-name="P97"><text:span text:style-name="T94">E</text:span><text:span text:style-name="T91">l sistema intercepta el evento de entrada, re-calcula el objeto dinámico </text:span><text:span text:style-name="Source_20_Text"><text:span text:style-name="T95">Configuration</text:span></text:span><text:span text:style-name="T91"> del contexto global de la aplicación y propaga el nuevo tamaño en unidades </text:span><text:span text:style-name="Source_20_Text"><text:span text:style-name="T95">sp</text:span></text:span><text:span text:style-name="T91"> a todos los contenedores de texto de manera inmediata. </text:span></text:p>
            </text:list-item>
            <text:list-item>
              <text:p text:style-name="P88"><text:span text:style-name="T117">E</text:span>l usuario conmuta el interruptor de Alto Contraste. </text:p>
            </text:list-item>
            <text:list-item>
              <text:p text:style-name="P88"><text:span text:style-name="T117">E</text:span>l sistema aplica una paleta cromática optimizada que reajusta los ratios de contraste térmico a valores superiores a la relación estándar 4.5:1. </text:p>
            </text:list-item>
          </text:list>
        </text:list-item>
        <text:list-item>
          <text:p text:style-name="P97"><text:span text:style-name="T90">P</text:span><text:span text:style-name="T88">ostcondiciones:</text:span><text:span text:style-name="T91"> Los coeficientes modificados por el usuario se escriben de manera persistente en el fichero local </text:span><text:span text:style-name="Source_20_Text"><text:span text:style-name="T95">SharedPreferences</text:span></text:span><text:span text:style-name="T91"> de la aplicación, asegurando que los estilos sean heredados en todos los inicios de ciclo futuros de la plataforma móviles. </text:span></text:p>
        </text:list-item>
      </text:list>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list xml:id="list1114230874943" text:continue-list="list1115272084785" text:style-name="WWNum19">
        <text:list-item>
          <text:list>
            <text:list-item>
              <text:h text:style-name="P62" text:outline-level="2"><text:bookmark-start text:name="_Toc212808602"/><text:soft-page-break/>Bocetos de interfaz<text:bookmark-end text:name="_Toc212808602"/></text:h>
            </text:list-item>
          </text:list>
        </text:list-item>
      </text:list>
      <text:p text:style-name="P13"><text:span text:style-name="T118">L</text:span>a fase de prototipado de <text:span text:style-name="T21">Temporis</text:span> se ha estructurado utilizando la herramienta de diseño de alta fidelidad <text:span text:style-name="T49">Figma</text:span>, tomando como referencia directa las pautas de experiencia de usuario establecidas en la guía de estilos de <text:span text:style-name="T21">Material Design 3</text:span>, adaptándolas rigurosamente a las normativas de inclusión universal. </text:p>
      <text:h text:style-name="P14" text:outline-level="3">Estructura y Disposición de las Vistas</text:h>
      <text:p text:style-name="P13"><text:span text:style-name="T118">L</text:span>a arquitectura visual está diseñada mediante un enfoque modular lineal con el fin de reducir drásticamente la sobrecarga cognitiva del usuario, estructurando el recorrido en cuatro grandes bloques lógicos: </text:p>
      <text:list text:style-name="L14">
        <text:list-item>
          <text:p text:style-name="P76"><text:span text:style-name="T38">B</text:span><text:span text:style-name="T21">loque de Control de Acceso (</text:span><text:span text:style-name="T53">Onboarding</text:span><text:span text:style-name="T21">):</text:span> Formado por una sucesión limpia de pantallas que abarcan el renderizado de carga (<text:span text:style-name="T48">Splash Screen</text:span>), la vista de <text:span text:style-name="T49">Login</text:span> centralizada y la interfaz de registro de nuevos usuarios. Estos contenedores emplean campos de texto amplios y botones interactivos sobredimensionados para facilitar el apuntamiento físico y la comodidad táctil. </text:p>
        </text:list-item>
        <text:list-item>
          <text:p text:style-name="P76"><text:span text:style-name="T54">D</text:span><text:span text:style-name="T53">ashboard</text:span><text:span text:style-name="T21"> Operativo (Gestión de Tiempos):</text:span> Corresponde al núcleo transaccional de la aplicación. Se estructura mediante un sistema adaptativo de <text:span text:style-name="T21">Tarjetas de Actividad (</text:span><text:span text:style-name="T53">Cards</text:span><text:span text:style-name="T21">)</text:span> independientes. Cada tarjeta encapsula un temporizador que muestra de manera clara el flujo del tiempo restante mediante una cuenta regresiva, optimizando el espacio en pantalla. Los botones de control analógico de los temporizadores (<text:span text:style-name="T48">Play/Pause</text:span>, <text:span text:style-name="T48">Actualizar</text:span> y <text:span text:style-name="T48">Borrar</text:span>) se posicionan directamente embebidos en el interior de cada tarjeta para proporcionar retroalimentación (<text:span text:style-name="T48">feedback</text:span>) visual instantánea tras la pulsación táctil. </text:p>
        </text:list-item>
        <text:list-item>
          <text:p text:style-name="P76"><text:span text:style-name="T39">P</text:span><text:span text:style-name="T21">anel de Analítica Avanzada (Estadísticas):</text:span> Diseñado bajo un patrón de visualización de alta densidad de información estructurada. Su elemento central es una cuadrícula de contribución anual (<text:span text:style-name="T48">Heatmap</text:span> de actividad) que emplea una degradación cromática de colores muy contrastados para permitir al usuario auditar de un solo vistazo rápido sus patrones de constancia temporal y cumplimiento de objetivos. </text:p>
        </text:list-item>
        <text:list-item>
          <text:p text:style-name="P76"><text:span text:style-name="T40">C</text:span><text:span text:style-name="T21">entro de Configuración y Perfil de Usuario:</text:span> Diseñado mediante menús lineales limpios con iconos descriptivos planos de alto contraste. Esta disposición simplifica la navegación secuencial, garantizando una compatibilidad absoluta al ser procesada por lectores de pantalla nativos (como <text:span text:style-name="T49">TalkBack</text:span>) o sistemas de navegación asistida por hardware externo. </text:p>
        </text:list-item>
      </text:list>
      <text:h text:style-name="P14" text:outline-level="3">Decisiones de Diseño Justificadas para la Accesibilidad Real</text:h>
      <text:list text:style-name="L15">
        <text:list-item>
          <text:p text:style-name="P77"><text:span text:style-name="T41">R</text:span><text:span text:style-name="T21">atio de Contraste Óptimo:</text:span> Selección estricta de paletas de color con un ratio mínimo de contraste de <text:span text:style-name="T21">4.5:1</text:span> entre el texto/icono y el fondo, neutralizando las dificultades de legibilidad en condiciones de baja luminosidad ambiental o para usuarios con debilidad visual. </text:p>
        </text:list-item>
        <text:list-item>
          <text:p text:style-name="P77"><text:span text:style-name="T41">D</text:span><text:span text:style-name="T21">imensionamiento de Objetos Táctiles:</text:span> Todos los elementos interactivos o botones de control (como los disparadores de los contadores) se han diseñado <text:soft-page-break/>con un área de contacto mínima garantizada de <text:span text:style-name="T21">48x48 dp</text:span>, mitigando errores de pulsación accidental en usuarios con movilidad reducida o dificultades motoras finas. </text:p>
        </text:list-item>
        <text:list-item>
          <text:p text:style-name="P77"><text:span text:style-name="T41">F</text:span><text:span text:style-name="T21">lujo de Interacción Simplificado:</text:span> Reducción del número de pasos necesarios para la activación de un temporizador en el sistema, disminuyendo la barrera de entrada para perfiles con diversidad cognitiva o déficit de atención. </text:p>
        </text:list-item>
      </text:list>
      <text:p text:style-name="Standard"/>
      <text:p text:style-name="Standard"/>
      <text:p text:style-name="Standard"/>
      <text:p text:style-name="Standard"/>
      <text:p text:style-name="P9"/>
      <text:list xml:id="list1115921660753" text:continue-list="list1114230874943" text:style-name="WWNum19">
        <text:list-item>
          <text:h text:style-name="P61" text:outline-level="1"><text:bookmark-start text:name="_Toc212808603"/>Diseño de la aplicación<text:bookmark-end text:name="_Toc212808603"/></text:h>
          <text:list>
            <text:list-item>
              <text:h text:style-name="P63" text:outline-level="2"><text:bookmark-start text:name="_Toc212808604"/>Estudio de viabilidad<text:bookmark-end text:name="_Toc212808604"/></text:h>
            </text:list-item>
          </text:list>
        </text:list-item>
      </text:list>
      <text:p text:style-name="P42"><text:span text:style-name="T119">E</text:span>l análisis de viabilidad evalúa la infraestructura, el esfuerzo humano y la proyección financiera requerida para mitigar los riesgos latentes durante la construcción de <text:span text:style-name="T21">Temporis</text:span>. </text:p>
      <text:h text:style-name="P12" text:outline-level="4">A. Viabilidad de Tiempos y Esfuerzo Operativo</text:h>
      <text:p text:style-name="P13"><text:span text:style-name="T119">E</text:span>l proyecto se ha dimensionado bajo una estimación técnica global de <text:span text:style-name="T21">420 horas/persona</text:span> de trabajo efectivo, distribuidas estratégicamente en cuatro fases metodológicas: </text:p>
      <text:list text:style-name="L16">
        <text:list-item>
          <text:p text:style-name="P78"><text:span text:style-name="T42">F</text:span><text:span text:style-name="T21">ase de Definición y Modelado (60h):</text:span> Extracción de requisitos de ingeniería, prototipado de alta fidelidad en Figma y diseño lógico de la arquitectura de persistencia. </text:p>
        </text:list-item>
        <text:list-item>
          <text:p text:style-name="P78"><text:span text:style-name="T42">F</text:span><text:span text:style-name="T21">ase de Infraestructura Cloud (100h):</text:span> Aprovisionamiento y securización de la suite de <text:span text:style-name="T49">Google Firebase</text:span> (módulos de <text:span text:style-name="T49">Auth, Cloud Firestore y Storage</text:span>) junto al desarrollo de los algoritmos de sincronización asíncrona. </text:p>
        </text:list-item>
        <text:list-item>
          <text:p text:style-name="P98"><text:span text:style-name="T83">F</text:span><text:span text:style-name="T79">ase de Desarrollo del Núcleo Analítico (160h):</text:span><text:span text:style-name="T74"> Construcción del motor CRUD de temporizadores, integración del </text:span><text:span text:style-name="T77">hardware</text:span><text:span text:style-name="T74"> criptográfico mediante la API biométrica y el renderizado matricial de </text:span><text:span text:style-name="Source_20_Text"><text:span text:style-name="T77">MPAndroidChart</text:span></text:span><text:span text:style-name="T74">. </text:span></text:p>
        </text:list-item>
        <text:list-item>
          <text:p text:style-name="P98"><text:span text:style-name="T84">F</text:span><text:span text:style-name="T79">ase de Inclusión y Calidad (100h):</text:span><text:span text:style-name="T74"> Programación de la lógica reactiva de accesibilidad (escalado dinámico de fuentes </text:span><text:span text:style-name="Source_20_Text"><text:span text:style-name="T74">sp</text:span></text:span><text:span text:style-name="T74"> y permuta de alto contraste) combinado con test de usabilidad controlados. </text:span></text:p>
        </text:list-item>
      </text:list>
      <text:h text:style-name="P12" text:outline-level="4">B. Viabilidad de Recursos Humanos (Roles definidos)</text:h>
      <text:p text:style-name="P13"><text:span text:style-name="T120">A</text:span> pesar de ser un proyecto de ejecución individual, la estructura operativa emula un equipo de ingeniería de software para acotar las responsabilidades funcionales: </text:p>
      <text:list text:style-name="L17">
        <text:list-item>
          <text:p text:style-name="P79"><text:span text:style-name="T43">D</text:span><text:span text:style-name="T21">esarrollador Android Senior / Full-Stack (Dedicación: 100%):</text:span> Responsable de la codificación de la lógica de negocio en lenguajes Kotlin/Java y la orquestación de servicios en la nube. </text:p>
        </text:list-item>
        <text:list-item>
          <text:p text:style-name="P79"><text:span text:style-name="T43">E</text:span><text:span text:style-name="T21">specialista en Accesibilidad y UX (Dedicación: 25%):</text:span> Consultor técnico encargado de auditar y garantizar el cumplimiento estricto de las directrices internacionales WCAG. </text:p>
        </text:list-item>
        <text:list-item>
          <text:p text:style-name="P79"><text:span text:style-name="T43">Q</text:span><text:span text:style-name="T21">A Tester (Dedicación: 25%):</text:span> Encargado de la ejecución del plan de pruebas, ensayos de estrés de conectividad y validación estricta de requisitos funcionales. </text:p>
        </text:list-item>
      </text:list>
      <text:h text:style-name="P12" text:outline-level="4">C. Infraestructura Tecnológica</text:h>
      <text:list text:style-name="L18">
        <text:list-item>
          <text:p text:style-name="P80"><text:span text:style-name="T55">H</text:span><text:span text:style-name="T53">ardware</text:span><text:span text:style-name="T21">:</text:span> Estaciones de trabajo equipadas con procesadores Intel i7, un mínimo de 16 GB de memoria RAM y terminales físicos Android de diversas gamas para validar la respuesta de los sensores biométricos. </text:p>
        </text:list-item>
        <text:list-item>
          <text:p text:style-name="P80"><text:soft-page-break/><text:span text:style-name="T55">S</text:span><text:span text:style-name="T53">oftware y SaaS</text:span><text:span text:style-name="T21">:</text:span> Entorno de Desarrollo Integrado (IDE) Android Studio, Figma para maquetación, y GitHub como repositorio central de control de versiones distribuido. </text:p>
        </text:list-item>
        <text:list-item>
          <text:p text:style-name="P80"><text:span text:style-name="T43">E</text:span><text:span text:style-name="T21">cosistema </text:span><text:span text:style-name="T53">Cloud</text:span><text:span text:style-name="T21">:</text:span> Implementación inicial sobre el plan gratuito <text:span text:style-name="T48">Firebase Spark Plan</text:span>, diseñado para migrar de forma elástica hacia el plan de pago por consumo <text:span text:style-name="T48">Blaze Plan</text:span> en fases de producción masiva. </text:p>
        </text:list-item>
      </text:list>
      <text:h text:style-name="P12" text:outline-level="4">D. Estudio Financiero (Presupuesto Anual)</text:h>
      <table:table table:name="EstudioFinanciero" table:style-name="EstudioFinanciero" table:template-name="Elegant">
        <table:table-column table:style-name="EstudioFinanciero.A" table:number-columns-repeated="3"/>
        <table:table-header-rows>
          <table:table-row>
            <table:table-cell table:style-name="EstudioFinanciero.A1" office:value-type="string">
              <text:p text:style-name="P7"><text:span text:style-name="Strong_20_Emphasis"><text:span text:style-name="T74">Concepto de Gasto</text:span></text:span></text:p>
            </table:table-cell>
            <table:table-cell table:style-name="EstudioFinanciero.A1" office:value-type="string">
              <text:p text:style-name="P7"><text:span text:style-name="Strong_20_Emphasis"><text:span text:style-name="T74">Descripción y Desglose Técnico</text:span></text:span></text:p>
            </table:table-cell>
            <table:table-cell table:style-name="EstudioFinanciero.A1" office:value-type="string">
              <text:p text:style-name="P46"><text:span text:style-name="Strong_20_Emphasis"><text:span text:style-name="T74">Coste Estimado</text:span></text:span></text:p>
            </table:table-cell>
          </table:table-row>
        </table:table-header-rows>
        <table:table-row>
          <table:table-cell table:style-name="EstudioFinanciero.A2" office:value-type="string">
            <text:p text:style-name="P35">Sueldos y Salarios</text:p>
          </table:table-cell>
          <table:table-cell table:style-name="EstudioFinanciero.A2" office:value-type="string">
            <text:p text:style-name="P18">Cómputo de ingeniería de desarrollo (420 horas a un coste de 25€/h)</text:p>
          </table:table-cell>
          <table:table-cell table:style-name="EstudioFinanciero.A2" office:value-type="string">
            <text:p text:style-name="P18">10.500 €</text:p>
          </table:table-cell>
        </table:table-row>
        <table:table-row>
          <table:table-cell table:style-name="EstudioFinanciero.A2" office:value-type="string">
            <text:p text:style-name="P35">Equipamiento</text:p>
          </table:table-cell>
          <table:table-cell table:style-name="EstudioFinanciero.A2" office:value-type="string">
            <text:p text:style-name="P18">Amortización de <text:span text:style-name="T49">hardware</text:span> de desarrollo y licencias operativas</text:p>
          </table:table-cell>
          <table:table-cell table:style-name="EstudioFinanciero.A2" office:value-type="string">
            <text:p text:style-name="P18">2.500 €</text:p>
          </table:table-cell>
        </table:table-row>
        <table:table-row>
          <table:table-cell table:style-name="EstudioFinanciero.A2" office:value-type="string">
            <text:p text:style-name="P35">Infraestructura Cloud</text:p>
          </table:table-cell>
          <table:table-cell table:style-name="EstudioFinanciero.A2" office:value-type="string">
            <text:p text:style-name="P18">Consumos estimados de transferencia de datos en <text:span text:style-name="T49">Firebase</text:span> y <text:span text:style-name="T49">hosting</text:span></text:p>
          </table:table-cell>
          <table:table-cell table:style-name="EstudioFinanciero.A2" office:value-type="string">
            <text:p text:style-name="P18">300 €</text:p>
          </table:table-cell>
        </table:table-row>
        <table:table-row>
          <table:table-cell table:style-name="EstudioFinanciero.A2" office:value-type="string">
            <text:p text:style-name="P35">Marketing y Lanzamiento</text:p>
          </table:table-cell>
          <table:table-cell table:style-name="EstudioFinanciero.A2" office:value-type="string">
            <text:p text:style-name="P18">Campañas de posicionamiento ASO en <text:span text:style-name="T49">Google Play Store</text:span> y difusión</text:p>
          </table:table-cell>
          <table:table-cell table:style-name="EstudioFinanciero.A2" office:value-type="string">
            <text:p text:style-name="P18">1.200 €</text:p>
          </table:table-cell>
        </table:table-row>
        <table:table-row>
          <table:table-cell table:style-name="EstudioFinanciero.A6" office:value-type="string">
            <text:p text:style-name="P35">TOTAL INVERSIÓN INICIAL</text:p>
          </table:table-cell>
          <table:table-cell table:style-name="EstudioFinanciero.A6" office:value-type="string">
            <text:p text:style-name="P35">Presupuesto consolidado para el ciclo de lanzamiento del proyecto</text:p>
          </table:table-cell>
          <table:table-cell table:style-name="EstudioFinanciero.A6" office:value-type="string">
            <text:p text:style-name="P35">14.500 €</text:p>
          </table:table-cell>
        </table:table-row>
      </table:table>
      <text:p text:style-name="P41"/>
      <text:p text:style-name="P41"/>
      <text:p text:style-name="P41"/>
      <text:p text:style-name="P41"/>
      <text:p text:style-name="P41"/>
      <text:p text:style-name="P41"/>
      <text:p text:style-name="P41"/>
      <text:p text:style-name="P41"/>
      <text:list xml:id="list1116249763149" text:continue-list="list1115921660753" text:style-name="WWNum19">
        <text:list-item>
          <text:list>
            <text:list-item>
              <text:h text:style-name="P62" text:outline-level="2"><text:bookmark-start text:name="_Toc212808605"/><text:soft-page-break/>Planificación, ciclo de vida y diagrama Gantt<text:bookmark-end text:name="_Toc212808605"/></text:h>
            </text:list-item>
          </text:list>
        </text:list-item>
      </text:list>
      <text:h text:style-name="P51" text:outline-level="4">A. Ciclo de Vida Seleccionado: Modelo Incremental</text:h>
      <text:p text:style-name="P52"><text:span text:style-name="T121">P</text:span>ara el desarrollo del ecosistema <text:span text:style-name="T21">Temporis</text:span> se ha seleccionado de manera justificada un <text:span text:style-name="T21">Modelo de Ciclo de Vida Incremental</text:span>. </text:p>
      <text:list text:style-name="L19">
        <text:list-item>
          <text:p text:style-name="P99"><text:span text:style-name="T44">J</text:span><text:span text:style-name="T21">ustificación técnica:</text:span> Este enfoque permite fragmentar el producto en bloques funcionales que se integran y prueban de manera progresiva. Dado que la arquitectura maneja datos privados del usuario, es <text:span text:style-name="T121">prioritario</text:span> asegurar una base robusta y se<text:span text:style-name="T121">gur</text:span>a en las capas de autenticación <text:span text:style-name="T49">cloud</text:span> (Fase 2) antes de proceder al despliegue de las lógicas complejas de temporizadores asíncronos (Fase 3). </text:p>
        </text:list-item>
        <text:list-item>
          <text:p text:style-name="P99"><text:span text:style-name="T45">M</text:span><text:span text:style-name="T21">itigación de riesgos:</text:span> Se reduce drásticamente la aparición de errores críticos en cascada durante las fases finales de entrega, garantizando entregables estables y funcionales que se alinean de manera exacta con los hitos del calendario académico. </text:p>
        </text:list-item>
      </text:list>
      <text:h text:style-name="P50" text:outline-level="4">B. Alcance y Exclusiones del Proyecto</text:h>
      <text:list text:style-name="L20">
        <text:list-item>
          <text:p text:style-name="P100"><text:span text:style-name="T45">A</text:span><text:span text:style-name="T21">lcance Funcional:</text:span> Sistema de autenticación de seguridad, operaciones CRUD completas sobre temporizadores persistentes, matriz analítica de uso anual, <text:span text:style-name="T122">con </text:span>tema<text:span text:style-name="T122">cas</text:span> automática<text:span text:style-name="T122">s</text:span> y <text:span text:style-name="T122">con</text:span> menús de accesibilidad avanzada. </text:p>
        </text:list-item>
        <text:list-item>
          <text:p text:style-name="P100"><text:span text:style-name="T46">E</text:span><text:span text:style-name="T21">xclusiones (Fuera de Alcance):</text:span> Con el objetivo de blindar la viabilidad del proyecto dentro del marco temporal estipulado, quedan explícitamente excluidos del desarrollo el diseño de una versión nativa para dispositivos <text:span text:style-name="T48">smartwatches</text:span> (Wear OS) y la sincronización bidireccional con calendarios corporativos de terceros (<text:span text:style-name="T49">Google Calendar</text:span> u <text:span text:style-name="T49">Outlook</text:span>). </text:p>
        </text:list-item>
      </text:list>
      <text:h text:style-name="P50" text:outline-level="4">C. Fases y Plazos de Ejecución (Diagrama de Gantt)</text:h>
      <text:p text:style-name="P52"><text:span text:style-name="T123">L</text:span>a planificación temporal contempla una secuencia de <text:span text:style-name="T21">30 tareas críticas</text:span> ejecutadas a lo largo de un marco temporal que abarca desde febrero de 2025 hasta junio de 2026, divididas en cuatro bloques lógicos: </text:p>
      <text:list text:style-name="L21">
        <text:list-item>
          <text:p text:style-name="P101"><text:span text:style-name="T47">F</text:span><text:span text:style-name="T21">ase de Inicio y Diseño (Febrero 2025 - Abril 2025):</text:span> Tareas 1 a 5. Comprende la inicialización del entorno, arquitectura de navegación y diseño UI/UX de alta fidelidad orientada a la accesibilidad. </text:p>
        </text:list-item>
        <text:list-item>
          <text:p text:style-name="P101"><text:span text:style-name="T47">F</text:span><text:span text:style-name="T21">ase de Desarrollo del Núcleo (Mayo 2025 - Octubre 2025):</text:span> Tareas 6 a 16. Implementación secuencial de los servicios de Login, recuperación de credenciales, vistas de perfil y modelado de datos de los temporizadores. </text:p>
        </text:list-item>
        <text:list-item>
          <text:p text:style-name="P101"><text:soft-page-break/><text:span text:style-name="T47">F</text:span><text:span text:style-name="T21">ase de Análisis y Calidad (Noviembre 2025 - Abril 2026):</text:span> Tareas 17 a 26. Consolidación de las operaciones CRUD, analíticas avanzadas y un bloque crítico de <text:span text:style-name="T21">21 días de </text:span><text:span text:style-name="T53">Debugging</text:span><text:span text:style-name="T21"> intensivo</text:span><text:span text:style-name="T113">,</text:span> para garantizar la estabilidad del <text:span text:style-name="T49">software </text:span><text:span text:style-name="T59">y a su vez, para documentar nuestro proyecto adecuadamente</text:span>. </text:p>
        </text:list-item>
        <text:list-item>
          <text:p text:style-name="P101"><text:span text:style-name="T47">F</text:span><text:span text:style-name="T21">ase de Cierre (Mayo 2026 - Junio 2026):</text:span> Tareas 27 a 30. Optimización de rendimiento, consolidación de la memoria técnica del manual y preparación de la defensa pública del proyecto ante el tribunal. </text:p>
        </text:list-item>
      </text:list>
      <text:p text:style-name="P10"><draw:frame draw:style-name="fr6" draw:name="Imagen2" text:anchor-type="char" svg:x="0.741cm" svg:y="0cm" svg:width="15.9cm" svg:height="9.571cm" draw:z-index="56"><draw:image xlink:href="Pictures/10000000000004C5000002DF7003DE6E.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text:continue-list="list1116249763149" text:style-name="WWNum19">
        <text:list-item>
          <text:list>
            <text:list-item>
              <text:h text:style-name="P62" text:outline-level="2"><text:bookmark-start text:name="_Toc212808606"/><text:soft-page-break/>Entidad Relación<text:bookmark-end text:name="_Toc212808606"/></text:h>
            </text:list-item>
          </text:list>
        </text:list-item>
      </text:list>
      <text:p text:style-name="P10"><draw:frame draw:style-name="fr6" draw:name="Imagen3" text:anchor-type="char" svg:x="0cm" svg:y="0.242cm" svg:width="16.607cm" svg:height="11.183cm" draw:z-index="57"><draw:image xlink:href="Pictures/10000000000005F8000004054A336375.png" xlink:type="simple" xlink:show="embed" xlink:actuate="onLoad" draw:mime-type="image/png"/></draw:frame><draw:frame draw:style-name="fr5" draw:name="Imagen4" text:anchor-type="char" svg:x="0cm" svg:y="11.423cm" svg:width="16.521cm" svg:height="9.61cm" draw:z-index="58"><draw:image xlink:href="Pictures/1000000000000664000003C17751F3C7.png" xlink:type="simple" xlink:show="embed" xlink:actuate="onLoad" draw:mime-type="image/png"/></draw:frame></text:p>
      <text:p text:style-name="P10"/>
      <text:p text:style-name="P10"/>
      <text:list xml:id="list1114702575836" text:continue-numbering="true" text:style-name="WWNum19">
        <text:list-item>
          <text:list>
            <text:list-item>
              <text:h text:style-name="P63" text:outline-level="2"><text:bookmark-start text:name="_Toc212808607"/><text:soft-page-break/>Esquema Relacional<text:bookmark-end text:name="_Toc212808607"/></text:h>
            </text:list-item>
          </text:list>
        </text:list-item>
      </text:list>
      <text:p text:style-name="P105"><draw:frame draw:style-name="fr4" draw:name="Imagen1 Copia 1" text:anchor-type="char" svg:x="-0.067cm" svg:y="0.019cm" svg:width="17.463cm" svg:height="5.759cm" draw:z-index="59"><draw:image xlink:href="Pictures/1000000000000AA20000039713682EBA.png" xlink:type="simple" xlink:show="embed" xlink:actuate="onLoad" draw:mime-type="image/png"/></draw:frame>El Esquema Relacional de <text:span text:style-name="T127">nuestra</text:span> aplicación <text:span text:style-name="T48">Temporis</text:span> representa la estructura lógica y la normalización de los almacenes de datos. Aunque el sistema se despliega sobre un entorno NoSQL (<text:span text:style-name="T49">Firebase Firestore</text:span>), este modelado relacional garantiza una arquitectura robusta, definiendo con precisión las restricciones de integridad y las dependencias referenciales que gobiernan el software.</text:p>
      <text:h text:style-name="P65" text:outline-level="4">Definición de Tablas y Atributos</text:h>
      <text:list text:style-name="L22">
        <text:list-item>
          <text:p text:style-name="P104">USUARIO</text:p>
          <text:list>
            <text:list-item>
              <text:p text:style-name="P102"><text:span text:style-name="Source_20_Text"><text:span text:style-name="T74">uid (PK)</text:span></text:span><text:span text:style-name="T74"> : </text:span><text:span text:style-name="T75">String</text:span><text:span text:style-name="T74"> — Identificador único global provisto por el servicio de Firebase Authentication.</text:span></text:p>
            </text:list-item>
            <text:list-item>
              <text:p text:style-name="P102"><text:span text:style-name="Source_20_Text"><text:span text:style-name="T74">username</text:span></text:span><text:span text:style-name="T74"> : </text:span><text:span text:style-name="T75">String</text:span><text:span text:style-name="T74"> — Nombre único de cuenta del usuario en el sistema.</text:span></text:p>
            </text:list-item>
            <text:list-item>
              <text:p text:style-name="P102"><text:span text:style-name="Source_20_Text"><text:span text:style-name="T74">displayName</text:span></text:span><text:span text:style-name="T74"> : </text:span><text:span text:style-name="T75">String</text:span><text:span text:style-name="T74"> — Nombre público descriptivo para la visualización en la interfaz.</text:span></text:p>
            </text:list-item>
            <text:list-item>
              <text:p text:style-name="P102"><text:span text:style-name="Source_20_Text"><text:span text:style-name="T74">email</text:span></text:span><text:span text:style-name="T74"> : </text:span><text:span text:style-name="T75">String</text:span><text:span text:style-name="T74"> — Dirección de correo electrónico asociada y validada.</text:span></text:p>
            </text:list-item>
            <text:list-item>
              <text:p text:style-name="P102"><text:span text:style-name="Source_20_Text"><text:span text:style-name="T74">profilePhotoUrl</text:span></text:span><text:span text:style-name="T74"> : </text:span><text:span text:style-name="T75">String</text:span><text:span text:style-name="T74"> — Enlace directo al almacenamiento en la nube de la imagen de perfil.</text:span></text:p>
            </text:list-item>
            <text:list-item>
              <text:p text:style-name="P102"><text:span text:style-name="Source_20_Text"><text:span text:style-name="T74">qrCode</text:span></text:span><text:span text:style-name="T74"> : </text:span><text:span text:style-name="T75">String</text:span><text:span text:style-name="T74"> — Cadena codificada que representa el identificador de acceso rápido.</text:span></text:p>
            </text:list-item>
          </text:list>
        </text:list-item>
        <text:list-item>
          <text:p text:style-name="P104">TEMPORIZADOR</text:p>
          <text:list>
            <text:list-item>
              <text:p text:style-name="P102"><text:span text:style-name="Source_20_Text"><text:span text:style-name="T74">id (PK)</text:span></text:span><text:span text:style-name="T74"> : </text:span><text:span text:style-name="T75">String</text:span><text:span text:style-name="T74"> — Identificador único del documento dentro de la colección.</text:span></text:p>
            </text:list-item>
            <text:list-item>
              <text:p text:style-name="P102"><text:span text:style-name="Source_20_Text"><text:span text:style-name="T74">name</text:span></text:span><text:span text:style-name="T74"> : </text:span><text:span text:style-name="T75">String</text:span><text:span text:style-name="T74"> — Título asignado por el usuario al temporizador configurado.</text:span></text:p>
            </text:list-item>
            <text:list-item>
              <text:p text:style-name="P102"><text:span text:style-name="Source_20_Text"><text:span text:style-name="T74">duration</text:span></text:span><text:span text:style-name="T74"> : </text:span><text:span text:style-name="T75">Number</text:span><text:span text:style-name="T74"> — Tiempo total establecido expresado en segundos.</text:span></text:p>
            </text:list-item>
            <text:list-item>
              <text:p text:style-name="P102"><text:span text:style-name="Source_20_Text"><text:span text:style-name="T74">isActive</text:span></text:span><text:span text:style-name="T74"> : </text:span><text:span text:style-name="T75">Boolean</text:span><text:span text:style-name="T74"> — Estado lógico de conmutación del temporizador en la vista.</text:span></text:p>
            </text:list-item>
            <text:list-item>
              <text:p text:style-name="P102"><text:span text:style-name="Source_20_Text"><text:span text:style-name="T74">createdAt</text:span></text:span><text:span text:style-name="T74"> : </text:span><text:span text:style-name="T75">Timestamp</text:span><text:span text:style-name="T74"> — Fecha y hora exacta de la inicialización física del objeto.</text:span></text:p>
            </text:list-item>
            <text:list-item>
              <text:p text:style-name="P102"><text:soft-page-break/><text:span text:style-name="Source_20_Text"><text:span text:style-name="T74">uid (FK)</text:span></text:span><text:span text:style-name="T74"> : </text:span><text:span text:style-name="T75">String</text:span><text:span text:style-name="T74"> — Clave foránea que referencia de forma estricta a </text:span><text:span text:style-name="Source_20_Text"><text:span text:style-name="T74">USUARIO(uid)</text:span></text:span><text:span text:style-name="T74">.</text:span></text:p>
            </text:list-item>
          </text:list>
        </text:list-item>
        <text:list-item>
          <text:p text:style-name="P104">REGISTRO_TIEMPO</text:p>
          <text:list>
            <text:list-item>
              <text:p text:style-name="P102"><text:span text:style-name="Source_20_Text"><text:span text:style-name="T74">id (PK)</text:span></text:span><text:span text:style-name="T74"> : </text:span><text:span text:style-name="T75">String</text:span><text:span text:style-name="T74"> — Código de identificación persistente e inequívoco de la sesión.</text:span></text:p>
            </text:list-item>
            <text:list-item>
              <text:p text:style-name="P102"><text:span text:style-name="Source_20_Text"><text:span text:style-name="T74">timerId (FK)</text:span></text:span><text:span text:style-name="T74"> : </text:span><text:span text:style-name="T75">String</text:span><text:span text:style-name="T74"> — Clave foránea de vinculación referencial hacia </text:span><text:span text:style-name="Source_20_Text"><text:span text:style-name="T74">TEMPORIZADOR(id)</text:span></text:span><text:span text:style-name="T74">.</text:span></text:p>
            </text:list-item>
            <text:list-item>
              <text:p text:style-name="P102"><text:span text:style-name="Source_20_Text"><text:span text:style-name="T74">date</text:span></text:span><text:span text:style-name="T74"> : </text:span><text:span text:style-name="T75">Date</text:span><text:span text:style-name="T74"> — Registro temporal de la fecha de ejecución de la cuenta atrás.</text:span></text:p>
            </text:list-item>
            <text:list-item>
              <text:p text:style-name="P102"><text:span text:style-name="Source_20_Text"><text:span text:style-name="T74">duration</text:span></text:span><text:span text:style-name="T74"> : </text:span><text:span text:style-name="T75">Number</text:span><text:span text:style-name="T74"> — Tiempo neto consumido y guardado durante la sesión.</text:span></text:p>
            </text:list-item>
            <text:list-item>
              <text:p text:style-name="P102"><text:span text:style-name="Source_20_Text"><text:span text:style-name="T74">category</text:span></text:span><text:span text:style-name="T74"> : </text:span><text:span text:style-name="T75">String</text:span><text:span text:style-name="T74"> — Etiqueta clasificatoria de la actividad.</text:span></text:p>
            </text:list-item>
            <text:list-item>
              <text:p text:style-name="P102"><text:span text:style-name="Source_20_Text"><text:span text:style-name="T74">description</text:span></text:span><text:span text:style-name="T74"> : </text:span><text:span text:style-name="T75">String</text:span><text:span text:style-name="T74"> — Anotación opcional del progreso o comentarios del usuario.</text:span></text:p>
            </text:list-item>
          </text:list>
        </text:list-item>
        <text:list-item>
          <text:p text:style-name="P104">PUBLICACION</text:p>
          <text:list>
            <text:list-item>
              <text:p text:style-name="P102"><text:span text:style-name="Source_20_Text"><text:span text:style-name="T74">id (PK)</text:span></text:span><text:span text:style-name="T74"> : </text:span><text:span text:style-name="T75">String</text:span><text:span text:style-name="T74"> — Identificador indexado de la entrada informativa o noticia.</text:span></text:p>
            </text:list-item>
            <text:list-item>
              <text:p text:style-name="P102"><text:span text:style-name="Source_20_Text"><text:span text:style-name="T74">title</text:span></text:span><text:span text:style-name="T74"> : </text:span><text:span text:style-name="T75">String</text:span><text:span text:style-name="T74"> — Encabezado principal del contenido interactivo.</text:span></text:p>
            </text:list-item>
            <text:list-item>
              <text:p text:style-name="P102"><text:span text:style-name="Source_20_Text"><text:span text:style-name="T74">content</text:span></text:span><text:span text:style-name="T74"> : </text:span><text:span text:style-name="T75">String</text:span><text:span text:style-name="T74"> — Cuerpo de texto y estructura interna de la publicación.</text:span></text:p>
            </text:list-item>
            <text:list-item>
              <text:p text:style-name="P102"><text:span text:style-name="Source_20_Text"><text:span text:style-name="T74">imageUrl</text:span></text:span><text:span text:style-name="T74"> : </text:span><text:span text:style-name="T75">String</text:span><text:span text:style-name="T74"> — Almacenamiento local de la imagen de portada asociada.</text:span></text:p>
            </text:list-item>
            <text:list-item>
              <text:p text:style-name="P102"><text:span text:style-name="Source_20_Text"><text:span text:style-name="T74">webUrl</text:span></text:span><text:span text:style-name="T74"> : </text:span><text:span text:style-name="T75">String</text:span><text:span text:style-name="T74"> — Enlace externo hipervínculado para la extensión informativa.</text:span></text:p>
            </text:list-item>
            <text:list-item>
              <text:p text:style-name="P102"><text:span text:style-name="Source_20_Text"><text:span text:style-name="T74">createdAt</text:span></text:span><text:span text:style-name="T74"> : </text:span><text:span text:style-name="T75">Timestamp</text:span><text:span text:style-name="T74"> — Registro cronológico de su inserción en el sistema.</text:span></text:p>
            </text:list-item>
          </text:list>
        </text:list-item>
      </text:list>
      <text:h text:style-name="P65" text:outline-level="4">Restricciones de Integridad y Dependencias</text:h>
      <text:list text:style-name="L23">
        <text:list-item>
          <text:p text:style-name="P103"><text:span text:style-name="T79">Relación Usuario - Temporizador (1:N):</text:span><text:span text:style-name="T74"> Cada perfil de usuario puede poseer un conjunto ramificado de temporizadores configurados. La integridad referencial dicta que no puede existir una tupla en </text:span><text:span text:style-name="Source_20_Text"><text:span text:style-name="T74">TEMPORIZADOR</text:span></text:span><text:span text:style-name="T74"> cuyo campo </text:span><text:span text:style-name="Source_20_Text"><text:span text:style-name="T74">uid (FK)</text:span></text:span><text:span text:style-name="T74"> no corresponda a un registro persistido en </text:span><text:span text:style-name="Source_20_Text"><text:span text:style-name="T74">USUARIO</text:span></text:span><text:span text:style-name="T74">. Una operación de borrado de un usuario desencadenará la eliminación en cascada de sus temporizadores vinculados para evitar datos huérfanos.</text:span></text:p>
        </text:list-item>
        <text:list-item>
          <text:p text:style-name="P103"><text:span text:style-name="T79">Relación Temporizador - Registro de Tiempo (1:N):</text:span><text:span text:style-name="T74"> La ejecución finalizada de un temporizador genera una entrada analítica indexada. El campo </text:span><text:span text:style-name="Source_20_Text"><text:span text:style-name="T74">timerId (FK)</text:span></text:span><text:span text:style-name="T74"> garantiza la trazabilidad con la entidad base. Para la salvaguarda de métricas históricas de rendimiento global, si un temporizador operativo es eliminado por el usuario, el sistema permite la persistencia de las filas analíticas de </text:span><text:soft-page-break/><text:span text:style-name="Source_20_Text"><text:span text:style-name="T74">REGISTRO_TIEMPO</text:span></text:span><text:span text:style-name="T74"> mediante la desvinculación o anonimización de la clave externa, reteniendo el valor analítico puro de las horas registradas.</text:span></text:p>
        </text:list-item>
        <text:list-item>
          <text:p text:style-name="P103"><text:span text:style-name="T79">Entidad Desacoplada Publicación:</text:span><text:span text:style-name="T74"> Opera como un flujo de contenido de lectura global inyectado centralmente desde el panel de administración. No posee dependencias directas con usuarios específicos, optimizando las consultas concurrentes e independientes de la red de noticias.</text:span></text:p>
        </text:list-item>
      </text:list>
      <text:p text:style-name="Text_20_body"><text:span text:style-name="T74"/></text:p>
      <text:list xml:id="list1116062169379" text:continue-list="list1114702575836" text:style-name="WWNum19">
        <text:list-item>
          <text:list>
            <text:list-item>
              <text:h text:style-name="P62" text:outline-level="2"><text:bookmark-start text:name="_Toc212808608"/>Diagrama de Clases<text:bookmark-end text:name="_Toc212808608"/></text:h>
            </text:list-item>
          </text:list>
        </text:list-item>
      </text:list>
      <text:p text:style-name="P37">El Diagrama de Clases de <text:span text:style-name="T48">Temporis</text:span> modela la estructura estática orientada a objetos de la lógica de negocio del software. Las clases representadas se corresponden directamente con el mapa de abstracciones del código fuente desarrollado en <text:span text:style-name="T49">Java</text:span> y <text:span text:style-name="T49">Kotlin</text:span>.</text:p>
      <text:p text:style-name="Standard"><draw:frame draw:style-name="fr3" draw:name="Imagen5" text:anchor-type="char" svg:width="16.607cm" svg:height="7.2cm" draw:z-index="60"><draw:image xlink:href="Pictures/1000000000000A8F0000049493577A67.png" xlink:type="simple" xlink:show="embed" xlink:actuate="onLoad" draw:mime-type="image/png"/></draw:frame></text:p>
      <text:h text:style-name="P65" text:outline-level="4">Descripción de Clases e Interoperabilidad</text:h>
      <text:list text:style-name="L24">
        <text:list-item>
          <text:p text:style-name="P107"><text:span text:style-name="Source_20_Text"><text:span text:style-name="T79">User.java</text:span></text:span><text:span text:style-name="T79"> (Encapsulamiento de Credenciales):</text:span><text:span text:style-name="T74"> Encargada de gestionar la entidad del usuario activo en el hilo de ejecución local. Define en ámbito privado (</text:span><text:span text:style-name="Source_20_Text"><text:span text:style-name="T74">-</text:span></text:span><text:span text:style-name="T74">) los campos de autenticación e identidad y expone métodos públicos (</text:span><text:span text:style-name="Source_20_Text"><text:span text:style-name="T74">+</text:span></text:span><text:span text:style-name="T74">) para la mutación y consulta segura de estados.</text:span></text:p>
        </text:list-item>
        <text:list-item>
          <text:p text:style-name="P107"><text:span text:style-name="Source_20_Text"><text:span text:style-name="T79">Timer.java</text:span></text:span><text:span text:style-name="T79"> (Núcleo de Control):</text:span><text:span text:style-name="T74"> Representa estructuralmente la abstracción del temporizador nativo. Almacena de forma estricta el atributo </text:span><text:span text:style-name="Source_20_Text"><text:span text:style-name="T74">uid</text:span></text:span><text:span text:style-name="T74"> como variable de enlace hacia la clase propietaria </text:span><text:span text:style-name="Source_20_Text"><text:span text:style-name="T74">User.java</text:span></text:span><text:span text:style-name="T74">. Implementa de manera nativa los métodos </text:span><text:span text:style-name="Source_20_Text"><text:span text:style-name="T74">hashCode()</text:span></text:span><text:span text:style-name="T74"> y </text:span><text:span text:style-name="Source_20_Text"><text:span text:style-name="T74">equals()</text:span></text:span><text:span text:style-name="T74"> para optimizar las operaciones de comparación de objetos en las colecciones y adaptadores de la interfaz de usuario.</text:span></text:p>
        </text:list-item>
        <text:list-item>
          <text:p text:style-name="P107"><text:span text:style-name="Source_20_Text"><text:span text:style-name="T79">TimeRegister.java</text:span></text:span><text:span text:style-name="T79"> (Entidad Analítica Unificada):</text:span><text:span text:style-name="T74"> En estricta concordancia con el refactor de optimización de código, esta clase unifica por completo la lógica funcional de persistencia histórica. Alberga el campo </text:span><text:span text:style-name="Source_20_Text"><text:span text:style-name="T74">timerId</text:span></text:span><text:span text:style-name="T74"> (mapeado de forma interna como </text:span><text:span text:style-name="Source_20_Text"><text:span text:style-name="T74">counterId</text:span></text:span><text:span text:style-name="T74"> en la arquitectura física de herencia de variables si fuese </text:span><text:soft-page-break/><text:span text:style-name="T74">estrictamente necesario por compatibilidad de código heredado) para trazar la analítica. Implementa la función modular </text:span><text:span text:style-name="Source_20_Text"><text:span text:style-name="T74">toMap()</text:span></text:span><text:span text:style-name="T74"> para facilitar la transformación directa del objeto a colecciones clave-valor compatibles con los métodos nativos de inserción asíncrona de Firebase Firestore.</text:span></text:p>
        </text:list-item>
        <text:list-item>
          <text:p text:style-name="P107"><text:span text:style-name="Source_20_Text"><text:span text:style-name="T79">Post.kt</text:span></text:span><text:span text:style-name="T79"> (Interoperabilidad de Lenguajes):</text:span><text:span text:style-name="T74"> Esta entidad está modelada bajo la sintaxis nativa de una </text:span><text:span text:style-name="T75">Data Class</text:span><text:span text:style-name="T74"> en Kotlin. Cuenta con la anotación </text:span><text:span text:style-name="Source_20_Text"><text:span text:style-name="T74">@Keep</text:span></text:span><text:span text:style-name="T74"> de Android Jetpack para prevenir la ofuscación de código durante la compilación y el empaquetado del APK en modo de optimización. Este módulo expone de forma directa la completa interoperabilidad técnica del proyecto entre componentes Java y Kotlin sobre una misma máquina virtual de Android.</text:span></text:p>
        </text:list-item>
      </text:list>
      <text:p text:style-name="Standard"/>
      <text:p text:style-name="Standard"/>
      <text:p text:style-name="Standard"/>
      <text:p text:style-name="Standard"/>
      <text:list text:continue-list="list1116062169379" text:style-name="WWNum19">
        <text:list-item>
          <text:list>
            <text:list-item>
              <text:h text:style-name="P62" text:outline-level="2"><text:bookmark-start text:name="_Toc212808609"/>Diseño de Interfaces<text:bookmark-end text:name="_Toc212808609"/></text:h>
            </text:list-item>
          </text:list>
        </text:list-item>
      </text:list>
      <text:p text:style-name="Standard"/>
      <text:p text:style-name="Standard"/>
      <text:p text:style-name="Standard"/>
      <text:p text:style-name="Standard"/>
      <text:p text:style-name="Standard"/>
      <text:p text:style-name="Standard"/>
      <text:p text:style-name="Standard"/>
      <text:list text:continue-numbering="true" text:style-name="WWNum19">
        <text:list-item>
          <text:list>
            <text:list-item>
              <text:h text:style-name="P62" text:outline-level="2"><text:bookmark-start text:name="_Toc212808610"/>Plan de Pruebas<text:bookmark-end text:name="_Toc212808610"/></text:h>
            </text:list-item>
          </text:list>
        </text:list-item>
      </text:list>
      <text:p text:style-name="Standard"/>
      <text:p text:style-name="Standard"/>
      <text:p text:style-name="Standard"/>
      <text:p text:style-name="Standard"/>
      <text:p text:style-name="Standard"/>
      <text:p text:style-name="Standard"/>
      <text:p text:style-name="Standard"><text:soft-page-break/></text:p>
      <text:p text:style-name="P67" loext:marker-style-name="T17"><text:bookmark-start text:name="_Toc212808611"/></text:p>
      <text:list text:continue-numbering="true" text:style-name="WWNum19">
        <text:list-item>
          <text:h text:style-name="P59" text:outline-level="1">Gestión de proyecto - Planificación<text:bookmark-end text:name="_Toc212808611"/></text:h>
        </text:list-item>
      </text:list>
      <text:p text:style-name="P10"/>
      <text:list text:continue-numbering="true" text:style-name="WWNum19">
        <text:list-item>
          <text:list>
            <text:list-item>
              <text:h text:style-name="P62" text:outline-level="2"><text:bookmark-start text:name="_Toc212808612"/>Planificación Proyecto - Scrum<text:bookmark-end text:name="_Toc212808612"/></text:h>
            </text:list-item>
          </text:list>
        </text:list-item>
      </text:list>
      <text:p text:style-name="P10"/>
      <text:p text:style-name="P10"/>
      <text:p text:style-name="P10"/>
      <text:p text:style-name="P10"/>
      <text:p text:style-name="P10"/>
      <text:p text:style-name="P10"/>
      <text:p text:style-name="P10"/>
      <text:p text:style-name="P67" loext:marker-style-name="T17"><text:bookmark-start text:name="_Toc212808613"/></text:p>
      <text:list text:continue-numbering="true" text:style-name="WWNum19">
        <text:list-item>
          <text:h text:style-name="P59" text:outline-level="1">Gestión del proyecto - Seguimiento<text:bookmark-end text:name="_Toc212808613"/></text:h>
        </text:list-item>
      </text:list>
      <text:p text:style-name="P10"/>
      <text:list text:continue-numbering="true" text:style-name="WWNum19">
        <text:list-item>
          <text:list>
            <text:list-item>
              <text:h text:style-name="P62" text:outline-level="2"><text:bookmark-start text:name="_Toc212808614"/>Seguimiento Proyecto - Scrum<text:bookmark-end text:name="_Toc212808614"/></text:h>
            </text:list-item>
          </text:list>
        </text:list-item>
      </text:list>
      <text:p text:style-name="P10"/>
      <text:p text:style-name="Standard"/>
      <text:p text:style-name="Standard"/>
      <text:p text:style-name="Standard"/>
      <text:p text:style-name="Standard"/>
      <text:p text:style-name="Standard"/>
      <text:p text:style-name="P10"/>
      <text:p text:style-name="P10"/>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thJax_Typewriter" svg:font-family="MathJax_Typewriter" style:font-family-generic="modern"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s" fo:country="ES"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justify" style:justify-single-word="false" fo:orphans="2" fo:widows="2" style:writing-mode="lr-tb"/>
      <style:text-properties fo:color="#404040" loext:opacity="100%" fo:font-size="12pt" style:font-size-asian="12pt">
        <loext:char-complex-color loext:theme-type="dark1" loext:color-type="theme">
          <loext:transformation loext:type="tint" loext:value="2509"/>
        </loext:char-complex-color>
      </style:text-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cm" fo:margin-bottom="0cm" style:contextual-spacing="false" fo:keep-together="always" fo:padding-left="0cm" fo:padding-right="0cm" fo:padding-top="0cm" fo:padding-bottom="0.035cm" fo:border-left="none" fo:border-right="none" fo:border-top="none" fo:border-bottom="0.99pt solid #31849b" fo:keep-with-next="always"/>
      <style:text-properties fo:color="#984806" loext:opacity="100%" style:font-name="Consolas" fo:font-family="Consolas" style:font-family-generic="roman" style:font-pitch="variable" fo:font-size="16pt" fo:font-weight="bold" style:font-name-asian="Calibri2" style:font-family-asian="Calibri" style:font-family-generic-asian="system" style:font-pitch-asian="variable" style:font-size-asian="16pt" style:font-weight-asian="bold" style:font-name-complex="DejaVu Sans" style:font-family-complex="'DejaVu Sans'" style:font-family-generic-complex="system" style:font-pitch-complex="variable" style:font-size-complex="14pt" style:font-weight-complex="bold">
        <loext:char-complex-color loext:theme-type="accent6" loext:color-type="theme">
          <loext:transformation loext:type="shade" loext:value="4980"/>
        </loext:char-complex-color>
      </style:text-properties>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353cm" fo:margin-bottom="0cm" style:contextual-spacing="false" fo:keep-together="always" fo:keep-with-next="always"/>
      <style:text-properties fo:color="#984806" loext:opacity="100%" style:font-name="Consolas" fo:font-family="Consolas" style:font-family-generic="roman" style:font-pitch="variable" fo:font-size="13pt" fo:font-weight="bold" style:font-name-asian="Calibri2"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loext:char-complex-color loext:theme-type="accent6" loext:color-type="theme">
          <loext:transformation loext:type="shade" loext:value="4980"/>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top="0cm" fo:margin-bottom="0.353cm" style:contextual-spacing="true"/>
    </style:style>
    <style:style style:name="No_20_Spacing" style:display-name="No Spacing" style:family="paragraph">
      <loext:graphic-properties draw:fill="solid" draw:fill-color="#fafafa"/>
      <style:paragraph-properties fo:margin-top="0cm" fo:margin-bottom="0.353cm" style:contextual-spacing="false" fo:line-height="115%" fo:text-align="justify" style:justify-single-word="false" fo:orphans="2" fo:widows="2" fo:background-color="#fafafa" fo:padding-left="0.141cm" fo:padding-right="0.141cm" fo:padding-top="0.035cm" fo:padding-bottom="0.035cm" fo:border-left="2.24pt solid #95b3d7" fo:border-right="0.99pt solid #95b3d7" fo:border-top="0.99pt solid #95b3d7" fo:border-bottom="0.99pt solid #95b3d7" style:shadow="none" style:writing-mode="lr-tb"/>
      <style:text-properties fo:color="#595959" loext:opacity="100%" fo:font-size="18pt" style:font-size-asian="18pt">
        <loext:char-complex-color loext:theme-type="dark1" loext:color-type="theme">
          <loext:transformation loext:type="tint" loext:value="3490"/>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text-align="start" style:justify-single-word="false"/>
      <style:text-properties fo:color="#365f91" loext:opacity="100%" style:font-name="Cambria" fo:font-family="Cambria" style:font-family-generic="roman" style:font-pitch="variable" fo:font-size="14pt" style:font-size-asian="14pt">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tab-stops>
          <style:tab-stop style:position="1cm"/>
          <style:tab-stop style:position="15.503cm" style:type="right" style:leader-style="dotted" style:leader-text="."/>
        </style:tab-stops>
      </style:paragraph-properties>
      <style:text-properties fo:font-weight="bold" style:font-weight-asian="bold"/>
    </style:style>
    <style:style style:name="Balloon_20_Text" style:display-name="Balloon Text" style:family="paragraph" style:parent-style-name="Standard" loext:linked-style-name="Texto_20_de_20_globo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paragraph-properties fo:margin-top="0.494cm" fo:margin-bottom="0.494cm" style:contextual-spacing="false" fo:line-height="100%" fo:text-align="start" style:justify-single-word="false"/>
      <style:text-properties style:use-window-font-color="true" loext:opacity="0%" style:font-name="Times New Roman" fo:font-family="'Times New Roman'" style:font-family-generic="roman" style:font-pitch="variable"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font-size-complex="12pt">
        <loext:char-complex-color loext:theme-type="dark1" loext:color-type="theme">
          <loext:transformation loext:type="tint" loext:value="2509"/>
        </loext:char-complex-color>
      </style:text-properties>
    </style:style>
    <style:style style:name="Contents_20_2" style:display-name="Contents 2" style:family="paragraph" style:parent-style-name="Standard" style:next-style-name="Standard" style:auto-update="true" style:class="index">
      <style:paragraph-properties fo:margin-left="0.423cm" fo:margin-top="0cm" fo:margin-bottom="0.176cm" style:contextual-spacing="false">
        <style:tab-stops>
          <style:tab-stop style:position="1.251cm"/>
          <style:tab-stop style:position="15.503cm" style:type="right" style:leader-style="dotted" style:leader-tex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1_20_Car" style:display-name="Título 1 Car" style:family="text" style:parent-style-name="Default_20_Paragraph_20_Font">
      <style:text-properties fo:color="#984806" loext:opacity="100%" style:font-name="Consolas" fo:font-family="Consolas" style:font-family-generic="roman" style:font-pitch="variable" fo:font-size="16pt" fo:font-weight="bold" style:font-name-asian="Calibri2" style:font-family-asian="Calibri" style:font-family-generic-asian="system" style:font-pitch-asian="variable" style:font-size-asian="16pt" style:font-weight-asian="bold" style:font-name-complex="DejaVu Sans" style:font-family-complex="'DejaVu Sans'" style:font-family-generic-complex="system" style:font-pitch-complex="variable" style:font-size-complex="14pt" style:font-weight-complex="bold">
        <loext:char-complex-color loext:theme-type="accent6" loext:color-type="theme">
          <loext:transformation loext:type="shade" loext:value="4980"/>
        </loext:char-complex-color>
      </style:text-properties>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Texto_20_de_20_globo_20_Car" style:display-name="Texto de globo Car" style:family="text" style:parent-style-name="Default_20_Paragraph_20_Font" loext:linked-style-name="Balloon_20_Text">
      <style:text-properties fo:color="#404040" loext:opacity="100%" style:font-name="Tahoma" fo:font-family="Tahoma" style:font-family-generic="roman" style:font-pitch="variable" fo:font-size="8pt" style:font-size-asian="8pt" style:font-name-complex="Tahoma1" style:font-family-complex="Tahoma" style:font-family-generic-complex="system" style:font-pitch-complex="variable" style:font-size-complex="8pt">
        <loext:char-complex-color loext:theme-type="dark1" loext:color-type="theme">
          <loext:transformation loext:type="tint" loext:value="2509"/>
        </loext:char-complex-color>
      </style:text-properties>
    </style:style>
    <style:style style:name="Título_20_2_20_Car" style:display-name="Título 2 Car" style:family="text" style:parent-style-name="Default_20_Paragraph_20_Font">
      <style:text-properties fo:color="#984806" loext:opacity="100%" style:font-name="Consolas" fo:font-family="Consolas" style:font-family-generic="roman" style:font-pitch="variable" fo:font-size="13pt" fo:font-weight="bold" style:font-name-asian="Calibri2"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loext:char-complex-color loext:theme-type="accent6" loext:color-type="theme">
          <loext:transformation loext:type="shade" loext:value="4980"/>
        </loext:char-complex-color>
      </style:text-properties>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36" style:display-name="ListLabel 236" style:family="text">
      <style:text-properties style:font-name-complex="Courier New"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style style:name="ListLabel_20_263" style:display-name="ListLabel 263" style:family="text">
      <style:text-properties style:font-name-complex="Courier New"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style style:name="ListLabel_20_266" style:display-name="ListLabel 266" style:family="text">
      <style:text-properties style:font-name-complex="Courier New"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style style:name="ListLabel_20_269" style:display-name="ListLabel 269" style:family="text">
      <style:text-properties style:font-name-complex="Courier New" style:font-family-complex="'Courier New'" style:font-family-generic-complex="system" style:font-pitch-complex="variable"/>
    </style:style>
    <style:style style:name="ListLabel_20_270" style:display-name="ListLabel 270" style:family="text"/>
    <style:style style:name="ListLabel_20_271" style:display-name="ListLabel 271" style:family="text"/>
    <style:style style:name="ListLabel_20_272" style:display-name="ListLabel 272" style:family="text">
      <style:text-properties style:font-name-complex="Courier New" style:font-family-complex="'Courier New'" style:font-family-generic-complex="system" style:font-pitch-complex="variable"/>
    </style:style>
    <style:style style:name="ListLabel_20_273" style:display-name="ListLabel 273" style:family="text"/>
    <style:style style:name="ListLabel_20_274" style:display-name="ListLabel 274" style:family="text"/>
    <style:style style:name="ListLabel_20_275" style:display-name="ListLabel 275" style:family="text">
      <style:text-properties style:font-name-complex="Courier New" style:font-family-complex="'Courier New'" style:font-family-generic-complex="system" style:font-pitch-complex="variable"/>
    </style:style>
    <style:style style:name="ListLabel_20_276" style:display-name="ListLabel 276" style:family="text"/>
    <style:style style:name="ListLabel_20_277" style:display-name="ListLabel 277" style:family="text"/>
    <style:style style:name="ListLabel_20_278" style:display-name="ListLabel 278" style:family="text">
      <style:text-properties style:font-name-complex="Courier New" style:font-family-complex="'Courier New'" style:font-family-generic-complex="system" style:font-pitch-complex="variable"/>
    </style:style>
    <style:style style:name="ListLabel_20_279" style:display-name="ListLabel 279" style:family="text"/>
    <style:style style:name="ListLabel_20_280" style:display-name="ListLabel 280" style:family="text"/>
    <style:style style:name="ListLabel_20_281" style:display-name="ListLabel 281" style:family="text">
      <style:text-properties style:font-name-complex="Courier New" style:font-family-complex="'Courier New'" style:font-family-generic-complex="system" style:font-pitch-complex="variable"/>
    </style:style>
    <style:style style:name="ListLabel_20_282" style:display-name="ListLabel 282" style:family="text"/>
    <style:style style:name="ListLabel_20_283" style:display-name="ListLabel 283" style:family="text"/>
    <style:style style:name="ListLabel_20_284" style:display-name="ListLabel 284" style:family="text">
      <style:text-properties style:font-name-complex="Courier New" style:font-family-complex="'Courier New'" style:font-family-generic-complex="system" style:font-pitch-complex="variable"/>
    </style:style>
    <style:style style:name="ListLabel_20_285" style:display-name="ListLabel 285" style:family="text"/>
    <style:style style:name="ListLabel_20_286" style:display-name="ListLabel 286" style:family="text"/>
    <style:style style:name="ListLabel_20_287" style:display-name="ListLabel 287" style:family="text">
      <style:text-properties style:font-name-complex="Courier New" style:font-family-complex="'Courier New'" style:font-family-generic-complex="system" style:font-pitch-complex="variable"/>
    </style:style>
    <style:style style:name="ListLabel_20_288" style:display-name="ListLabel 288" style:family="text"/>
    <style:style style:name="ListLabel_20_289" style:display-name="ListLabel 28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90" style:display-name="ListLabel 290" style:family="text">
      <style:text-properties style:font-name-complex="Courier New" style:font-family-complex="'Courier New'" style:font-family-generic-complex="system" style:font-pitch-complex="variable"/>
    </style:style>
    <style:style style:name="ListLabel_20_291" style:display-name="ListLabel 291" style:family="text"/>
    <style:style style:name="ListLabel_20_292" style:display-name="ListLabel 292" style:family="text"/>
    <style:style style:name="ListLabel_20_293" style:display-name="ListLabel 293" style:family="text">
      <style:text-properties style:font-name-complex="Courier New" style:font-family-complex="'Courier New'" style:font-family-generic-complex="system" style:font-pitch-complex="variable"/>
    </style:style>
    <style:style style:name="ListLabel_20_294" style:display-name="ListLabel 294" style:family="text"/>
    <style:style style:name="ListLabel_20_295" style:display-name="ListLabel 295" style:family="text"/>
    <style:style style:name="ListLabel_20_296" style:display-name="ListLabel 296" style:family="text">
      <style:text-properties style:font-name-complex="Courier New" style:font-family-complex="'Courier New'" style:font-family-generic-complex="system" style:font-pitch-complex="variable"/>
    </style:style>
    <style:style style:name="ListLabel_20_297" style:display-name="ListLabel 297" style:family="text"/>
    <style:style style:name="ListLabel_20_298" style:display-name="ListLabel 298"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99" style:display-name="ListLabel 299" style:family="text">
      <style:text-properties style:font-name-complex="Courier New" style:font-family-complex="'Courier New'" style:font-family-generic-complex="system" style:font-pitch-complex="variable"/>
    </style:style>
    <style:style style:name="ListLabel_20_300" style:display-name="ListLabel 300" style:family="text"/>
    <style:style style:name="ListLabel_20_301" style:display-name="ListLabel 301" style:family="text"/>
    <style:style style:name="ListLabel_20_302" style:display-name="ListLabel 302" style:family="text">
      <style:text-properties style:font-name-complex="Courier New" style:font-family-complex="'Courier New'" style:font-family-generic-complex="system" style:font-pitch-complex="variable"/>
    </style:style>
    <style:style style:name="ListLabel_20_303" style:display-name="ListLabel 303" style:family="text"/>
    <style:style style:name="ListLabel_20_304" style:display-name="ListLabel 304" style:family="text"/>
    <style:style style:name="ListLabel_20_305" style:display-name="ListLabel 305" style:family="text">
      <style:text-properties style:font-name-complex="Courier New" style:font-family-complex="'Courier New'" style:font-family-generic-complex="system" style:font-pitch-complex="variable"/>
    </style:style>
    <style:style style:name="ListLabel_20_306" style:display-name="ListLabel 306" style:family="text"/>
    <style:style style:name="ListLabel_20_307" style:display-name="ListLabel 307" style:family="text"/>
    <style:style style:name="ListLabel_20_308" style:display-name="ListLabel 308" style:family="text">
      <style:text-properties style:font-name-complex="Courier New" style:font-family-complex="'Courier New'" style:font-family-generic-complex="system" style:font-pitch-complex="variable"/>
    </style:style>
    <style:style style:name="ListLabel_20_309" style:display-name="ListLabel 309" style:family="text"/>
    <style:style style:name="ListLabel_20_310" style:display-name="ListLabel 310" style:family="text"/>
    <style:style style:name="ListLabel_20_311" style:display-name="ListLabel 311" style:family="text">
      <style:text-properties style:font-name-complex="Courier New" style:font-family-complex="'Courier New'" style:font-family-generic-complex="system" style:font-pitch-complex="variable"/>
    </style:style>
    <style:style style:name="ListLabel_20_312" style:display-name="ListLabel 312" style:family="text"/>
    <style:style style:name="ListLabel_20_313" style:display-name="ListLabel 313" style:family="text"/>
    <style:style style:name="ListLabel_20_314" style:display-name="ListLabel 314" style:family="text">
      <style:text-properties style:font-name-complex="Courier New" style:font-family-complex="'Courier New'" style:font-family-generic-complex="system" style:font-pitch-complex="variable"/>
    </style:style>
    <style:style style:name="ListLabel_20_315" style:display-name="ListLabel 315" style:family="text"/>
    <style:style style:name="ListLabel_20_316" style:display-name="ListLabel 316" style:family="text"/>
    <style:style style:name="ListLabel_20_317" style:display-name="ListLabel 317" style:family="text">
      <style:text-properties style:font-name-complex="Courier New" style:font-family-complex="'Courier New'" style:font-family-generic-complex="system" style:font-pitch-complex="variable"/>
    </style:style>
    <style:style style:name="ListLabel_20_318" style:display-name="ListLabel 318" style:family="text"/>
    <style:style style:name="ListLabel_20_319" style:display-name="ListLabel 319" style:family="text"/>
    <style:style style:name="ListLabel_20_320" style:display-name="ListLabel 320" style:family="text">
      <style:text-properties style:font-name-complex="Courier New" style:font-family-complex="'Courier New'" style:font-family-generic-complex="system" style:font-pitch-complex="variable"/>
    </style:style>
    <style:style style:name="ListLabel_20_321" style:display-name="ListLabel 321" style:family="text"/>
    <style:style style:name="ListLabel_20_322" style:display-name="ListLabel 322" style:family="text"/>
    <style:style style:name="ListLabel_20_323" style:display-name="ListLabel 323" style:family="text">
      <style:text-properties style:font-name-complex="Courier New" style:font-family-complex="'Courier New'" style:font-family-generic-complex="system" style:font-pitch-complex="variable"/>
    </style:style>
    <style:style style:name="ListLabel_20_324" style:display-name="ListLabel 324" style:family="text"/>
    <style:style style:name="ListLabel_20_325" style:display-name="ListLabel 325" style:family="text"/>
    <style:style style:name="ListLabel_20_326" style:display-name="ListLabel 326" style:family="text">
      <style:text-properties style:font-name-complex="Courier New" style:font-family-complex="'Courier New'" style:font-family-generic-complex="system" style:font-pitch-complex="variable"/>
    </style:style>
    <style:style style:name="ListLabel_20_327" style:display-name="ListLabel 327" style:family="text"/>
    <style:style style:name="ListLabel_20_328" style:display-name="ListLabel 328" style:family="text"/>
    <style:style style:name="ListLabel_20_329" style:display-name="ListLabel 329" style:family="text">
      <style:text-properties style:font-name-complex="Courier New" style:font-family-complex="'Courier New'" style:font-family-generic-complex="system" style:font-pitch-complex="variable"/>
    </style:style>
    <style:style style:name="ListLabel_20_330" style:display-name="ListLabel 330" style:family="text"/>
    <style:style style:name="ListLabel_20_331" style:display-name="ListLabel 331" style:family="text"/>
    <style:style style:name="ListLabel_20_332" style:display-name="ListLabel 332" style:family="text">
      <style:text-properties style:font-name-complex="Courier New" style:font-family-complex="'Courier New'" style:font-family-generic-complex="system" style:font-pitch-complex="variable"/>
    </style:style>
    <style:style style:name="ListLabel_20_333" style:display-name="ListLabel 333" style:family="text"/>
    <style:style style:name="ListLabel_20_334" style:display-name="ListLabel 334" style:family="text"/>
    <style:style style:name="ListLabel_20_335" style:display-name="ListLabel 335" style:family="text">
      <style:text-properties style:font-name-complex="Courier New" style:font-family-complex="'Courier New'" style:font-family-generic-complex="system" style:font-pitch-complex="variable"/>
    </style:style>
    <style:style style:name="ListLabel_20_336" style:display-name="ListLabel 336" style:family="text"/>
    <style:style style:name="ListLabel_20_337" style:display-name="ListLabel 337" style:family="text"/>
    <style:style style:name="ListLabel_20_338" style:display-name="ListLabel 338" style:family="text">
      <style:text-properties style:font-name-complex="Courier New" style:font-family-complex="'Courier New'" style:font-family-generic-complex="system" style:font-pitch-complex="variable"/>
    </style:style>
    <style:style style:name="ListLabel_20_339" style:display-name="ListLabel 339" style:family="text"/>
    <style:style style:name="ListLabel_20_340" style:display-name="ListLabel 340" style:family="text"/>
    <style:style style:name="ListLabel_20_341" style:display-name="ListLabel 341" style:family="text">
      <style:text-properties style:font-name-complex="Courier New" style:font-family-complex="'Courier New'" style:font-family-generic-complex="system" style:font-pitch-complex="variable"/>
    </style:style>
    <style:style style:name="ListLabel_20_342" style:display-name="ListLabel 342" style:family="text"/>
    <style:style style:name="ListLabel_20_343" style:display-name="ListLabel 343" style:family="text"/>
    <style:style style:name="ListLabel_20_344" style:display-name="ListLabel 344" style:family="text">
      <style:text-properties style:font-name-complex="Courier New" style:font-family-complex="'Courier New'" style:font-family-generic-complex="system" style:font-pitch-complex="variable"/>
    </style:style>
    <style:style style:name="ListLabel_20_345" style:display-name="ListLabel 345" style:family="text"/>
    <style:style style:name="ListLabel_20_346" style:display-name="ListLabel 346" style:family="text"/>
    <style:style style:name="ListLabel_20_347" style:display-name="ListLabel 347" style:family="text">
      <style:text-properties style:font-name-complex="Courier New" style:font-family-complex="'Courier New'" style:font-family-generic-complex="system" style:font-pitch-complex="variable"/>
    </style:style>
    <style:style style:name="ListLabel_20_348" style:display-name="ListLabel 348" style:family="text"/>
    <style:style style:name="ListLabel_20_349" style:display-name="ListLabel 349" style:family="text"/>
    <style:style style:name="ListLabel_20_350" style:display-name="ListLabel 350" style:family="text">
      <style:text-properties style:font-name-complex="Courier New" style:font-family-complex="'Courier New'" style:font-family-generic-complex="system" style:font-pitch-complex="variable"/>
    </style:style>
    <style:style style:name="ListLabel_20_351" style:display-name="ListLabel 351" style:family="text"/>
    <style:style style:name="ListLabel_20_352" style:display-name="ListLabel 352" style:family="text"/>
    <style:style style:name="ListLabel_20_353" style:display-name="ListLabel 353" style:family="text">
      <style:text-properties style:font-name-complex="Courier New" style:font-family-complex="'Courier New'" style:font-family-generic-complex="system" style:font-pitch-complex="variable"/>
    </style:style>
    <style:style style:name="ListLabel_20_354" style:display-name="ListLabel 354" style:family="text"/>
    <style:style style:name="ListLabel_20_355" style:display-name="ListLabel 355" style:family="text"/>
    <style:style style:name="ListLabel_20_356" style:display-name="ListLabel 356" style:family="text">
      <style:text-properties style:font-name-complex="Courier New" style:font-family-complex="'Courier New'" style:font-family-generic-complex="system" style:font-pitch-complex="variable"/>
    </style:style>
    <style:style style:name="ListLabel_20_357" style:display-name="ListLabel 357" style:family="text"/>
    <style:style style:name="ListLabel_20_358" style:display-name="ListLabel 358" style:family="text"/>
    <style:style style:name="ListLabel_20_359" style:display-name="ListLabel 359" style:family="text">
      <style:text-properties style:font-name-complex="Courier New" style:font-family-complex="'Courier New'" style:font-family-generic-complex="system" style:font-pitch-complex="variable"/>
    </style:style>
    <style:style style:name="ListLabel_20_360" style:display-name="ListLabel 360" style:family="text"/>
    <style:style style:name="ListLabel_20_361" style:display-name="ListLabel 361" style:family="text"/>
    <style:style style:name="ListLabel_20_362" style:display-name="ListLabel 362" style:family="text">
      <style:text-properties style:font-name-complex="Courier New" style:font-family-complex="'Courier New'" style:font-family-generic-complex="system" style:font-pitch-complex="variable"/>
    </style:style>
    <style:style style:name="ListLabel_20_363" style:display-name="ListLabel 363" style:family="text"/>
    <style:style style:name="ListLabel_20_364" style:display-name="ListLabel 364" style:family="text"/>
    <style:style style:name="ListLabel_20_365" style:display-name="ListLabel 365" style:family="text">
      <style:text-properties style:font-name-complex="Courier New" style:font-family-complex="'Courier New'" style:font-family-generic-complex="system" style:font-pitch-complex="variable"/>
    </style:style>
    <style:style style:name="ListLabel_20_366" style:display-name="ListLabel 366" style:family="text"/>
    <style:style style:name="ListLabel_20_367" style:display-name="ListLabel 367" style:family="text"/>
    <style:style style:name="ListLabel_20_368" style:display-name="ListLabel 368" style:family="text">
      <style:text-properties style:font-name-complex="Courier New" style:font-family-complex="'Courier New'" style:font-family-generic-complex="system" style:font-pitch-complex="variable"/>
    </style:style>
    <style:style style:name="ListLabel_20_369" style:display-name="ListLabel 369" style:family="text"/>
    <style:style style:name="ListLabel_20_370" style:display-name="ListLabel 370" style:family="text"/>
    <style:style style:name="ListLabel_20_371" style:display-name="ListLabel 371" style:family="text">
      <style:text-properties style:font-name-complex="Courier New" style:font-family-complex="'Courier New'" style:font-family-generic-complex="system" style:font-pitch-complex="variable"/>
    </style:style>
    <style:style style:name="ListLabel_20_372" style:display-name="ListLabel 372" style:family="text"/>
    <style:style style:name="ListLabel_20_373" style:display-name="ListLabel 373" style:family="text"/>
    <style:style style:name="ListLabel_20_374" style:display-name="ListLabel 374" style:family="text">
      <style:text-properties style:font-name-complex="Courier New" style:font-family-complex="'Courier New'" style:font-family-generic-complex="system" style:font-pitch-complex="variable"/>
    </style:style>
    <style:style style:name="ListLabel_20_375" style:display-name="ListLabel 375" style:family="text"/>
    <style:style style:name="ListLabel_20_376" style:display-name="ListLabel 376" style:family="text"/>
    <style:style style:name="ListLabel_20_377" style:display-name="ListLabel 377" style:family="text">
      <style:text-properties style:font-name-complex="Courier New" style:font-family-complex="'Courier New'" style:font-family-generic-complex="system" style:font-pitch-complex="variable"/>
    </style:style>
    <style:style style:name="ListLabel_20_378" style:display-name="ListLabel 378" style:family="text"/>
    <style:style style:name="ListLabel_20_379" style:display-name="ListLabel 379" style:family="text"/>
    <style:style style:name="ListLabel_20_380" style:display-name="ListLabel 380" style:family="text">
      <style:text-properties style:font-name-complex="Courier New" style:font-family-complex="'Courier New'" style:font-family-generic-complex="system" style:font-pitch-complex="variable"/>
    </style:style>
    <style:style style:name="ListLabel_20_381" style:display-name="ListLabel 381" style:family="text"/>
    <style:style style:name="ListLabel_20_382" style:display-name="ListLabel 382" style:family="text"/>
    <style:style style:name="ListLabel_20_383" style:display-name="ListLabel 383" style:family="text">
      <style:text-properties style:font-name-complex="Courier New" style:font-family-complex="'Courier New'" style:font-family-generic-complex="system" style:font-pitch-complex="variable"/>
    </style:style>
    <style:style style:name="ListLabel_20_384" style:display-name="ListLabel 384" style:family="text"/>
    <style:style style:name="ListLabel_20_385" style:display-name="ListLabel 385" style:family="text"/>
    <style:style style:name="ListLabel_20_386" style:display-name="ListLabel 386" style:family="text">
      <style:text-properties style:font-name-complex="Courier New" style:font-family-complex="'Courier New'" style:font-family-generic-complex="system" style:font-pitch-complex="variable"/>
    </style:style>
    <style:style style:name="ListLabel_20_387" style:display-name="ListLabel 387"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o" style:num-suffix="o" text:bullet-char="o">
        <style:list-level-properties text:list-level-position-and-space-mode="label-alignment">
          <style:list-level-label-alignment text:label-followed-by="listtab" fo:text-indent="-0.635cm" fo:margin-left="3.133cm"/>
        </style:list-level-properties>
        <style:text-properties fo:font-family="'Courier New'"/>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4.403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5.673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6.943cm"/>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8.213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9.483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0.753cm"/>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2.023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3.29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o" style:num-suffix="o" text:bullet-char="o">
        <style:list-level-properties text:list-level-position-and-space-mode="label-alignment">
          <style:list-level-label-alignment text:label-followed-by="listtab" fo:text-indent="-0.635cm" fo:margin-left="3.768cm"/>
        </style:list-level-properties>
        <style:text-properties fo:font-family="'Courier New'"/>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5.038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6.308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7.578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8.848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10.118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1.388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2.658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3.928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o" style:num-suffix="o" text:bullet-char="o">
        <style:list-level-properties text:list-level-position-and-space-mode="label-alignment">
          <style:list-level-label-alignment text:label-followed-by="listtab" fo:text-indent="-0.635cm" fo:margin-left="3.768cm"/>
        </style:list-level-properties>
        <style:text-properties fo:font-family="'Courier New'"/>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5.038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6.308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7.578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8.848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10.118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11.388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2.658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3.928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12.065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3.335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4.60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text:start-value="0">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is-legal="true" loext:num-list-format="%1%.%2%." style:num-suffix="."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65" loext:is-legal="true"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166" loext:is-legal="true" loext:num-list-format="%1%.%2%.%3%.%4%." style:num-suffix="."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ListLabel_20_167" loext:is-legal="true"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168" loext:is-legal="true" loext:num-list-format="%1%.%2%.%3%.%4%.%5%.%6%." style:num-suffix="."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text:style-name="ListLabel_20_169" loext:is-legal="true"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170" loext:is-legal="true" loext:num-list-format="%1%.%2%.%3%.%4%.%5%.%6%.%7%.%8%." style:num-suffix="."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text:style-name="ListLabel_20_171" loext:is-legal="true"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194"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197"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R.A.0%1%." style:num-prefix="R.A.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1.905cm"/>
        </style:list-level-properties>
        <style:text-properties fo:font-family="Calibri"/>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1.905cm"/>
        </style:list-level-properties>
        <style:text-properties fo:font-family="Calibri"/>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7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7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7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8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8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8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9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9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9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9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9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9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9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9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635cm" fo:margin-left="1.905cm"/>
        </style:list-level-properties>
        <style:text-properties fo:font-family="Calibri"/>
      </text:list-level-style-bullet>
      <text:list-level-style-bullet text:level="2" text:style-name="ListLabel_20_299"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300"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301"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302"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303"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304"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305"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306"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text:list-tab-stop-position="1.884cm" fo:text-indent="-0.635cm" fo:margin-left="1.884cm"/>
        </style:list-level-properties>
        <style:text-properties fo:font-family="Symbol" style:font-charset="x-symbol"/>
      </text:list-level-style-bullet>
      <text:list-level-style-bullet text:level="2" text:style-name="ListLabel_20_308" loext:num-list-format="o" style:num-suffix="o"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4.424cm" fo:text-indent="-0.635cm" fo:margin-left="4.424cm"/>
        </style:list-level-properties>
        <style:text-properties fo:font-family="Wingdings" style:font-charset="x-symbol"/>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5.694cm" fo:text-indent="-0.635cm" fo:margin-left="5.694cm"/>
        </style:list-level-properties>
        <style:text-properties fo:font-family="Symbol" style:font-charset="x-symbol"/>
      </text:list-level-style-bullet>
      <text:list-level-style-bullet text:level="5" text:style-name="ListLabel_20_311" loext:num-list-format="o" style:num-suffix="o"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8.234cm" fo:text-indent="-0.635cm" fo:margin-left="8.234cm"/>
        </style:list-level-properties>
        <style:text-properties fo:font-family="Wingdings" style:font-charset="x-symbol"/>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9.504cm" fo:text-indent="-0.635cm" fo:margin-left="9.504cm"/>
        </style:list-level-properties>
        <style:text-properties fo:font-family="Symbol" style:font-charset="x-symbol"/>
      </text:list-level-style-bullet>
      <text:list-level-style-bullet text:level="8" text:style-name="ListLabel_20_314" loext:num-list-format="o" style:num-suffix="o"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12.044cm" fo:text-indent="-0.635cm" fo:margin-left="12.044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text:list-tab-stop-position="1.884cm" fo:text-indent="-0.635cm" fo:margin-left="1.884cm"/>
        </style:list-level-properties>
        <style:text-properties fo:font-family="Symbol" style:font-charset="x-symbol"/>
      </text:list-level-style-bullet>
      <text:list-level-style-bullet text:level="2" text:style-name="ListLabel_20_317" loext:num-list-format="o" style:num-suffix="o"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4.424cm" fo:text-indent="-0.635cm" fo:margin-left="4.424cm"/>
        </style:list-level-properties>
        <style:text-properties fo:font-family="Wingdings" style:font-charset="x-symbol"/>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5.694cm" fo:text-indent="-0.635cm" fo:margin-left="5.694cm"/>
        </style:list-level-properties>
        <style:text-properties fo:font-family="Symbol" style:font-charset="x-symbol"/>
      </text:list-level-style-bullet>
      <text:list-level-style-bullet text:level="5" text:style-name="ListLabel_20_320" loext:num-list-format="o" style:num-suffix="o"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8.234cm" fo:text-indent="-0.635cm" fo:margin-left="8.234cm"/>
        </style:list-level-properties>
        <style:text-properties fo:font-family="Wingdings" style:font-charset="x-symbol"/>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9.504cm" fo:text-indent="-0.635cm" fo:margin-left="9.504cm"/>
        </style:list-level-properties>
        <style:text-properties fo:font-family="Symbol" style:font-charset="x-symbol"/>
      </text:list-level-style-bullet>
      <text:list-level-style-bullet text:level="8" text:style-name="ListLabel_20_323" loext:num-list-format="o" style:num-suffix="o"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12.044cm" fo:text-indent="-0.635cm" fo:margin-left="12.044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text:list-tab-stop-position="1.884cm" fo:text-indent="-0.635cm" fo:margin-left="1.884cm"/>
        </style:list-level-properties>
        <style:text-properties fo:font-family="Symbol" style:font-charset="x-symbol"/>
      </text:list-level-style-bullet>
      <text:list-level-style-bullet text:level="2" text:style-name="ListLabel_20_326" loext:num-list-format="o" style:num-suffix="o"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4.424cm" fo:text-indent="-0.635cm" fo:margin-left="4.424cm"/>
        </style:list-level-properties>
        <style:text-properties fo:font-family="Wingdings" style:font-charset="x-symbol"/>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5.694cm" fo:text-indent="-0.635cm" fo:margin-left="5.694cm"/>
        </style:list-level-properties>
        <style:text-properties fo:font-family="Symbol" style:font-charset="x-symbol"/>
      </text:list-level-style-bullet>
      <text:list-level-style-bullet text:level="5" text:style-name="ListLabel_20_329" loext:num-list-format="o" style:num-suffix="o"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8.234cm" fo:text-indent="-0.635cm" fo:margin-left="8.234cm"/>
        </style:list-level-properties>
        <style:text-properties fo:font-family="Wingdings" style:font-charset="x-symbol"/>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9.504cm" fo:text-indent="-0.635cm" fo:margin-left="9.504cm"/>
        </style:list-level-properties>
        <style:text-properties fo:font-family="Symbol" style:font-charset="x-symbol"/>
      </text:list-level-style-bullet>
      <text:list-level-style-bullet text:level="8" text:style-name="ListLabel_20_332" loext:num-list-format="o" style:num-suffix="o"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12.044cm" fo:text-indent="-0.635cm" fo:margin-left="12.044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3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338"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341"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text:list-tab-stop-position="3.133cm" fo:text-indent="-0.635cm" fo:margin-left="3.133cm"/>
        </style:list-level-properties>
        <style:text-properties fo:font-family="Symbol" style:font-charset="x-symbol"/>
      </text:list-level-style-bullet>
      <text:list-level-style-bullet text:level="2" text:style-name="ListLabel_20_344" loext:num-list-format="o" style:num-suffix="o" text:bullet-char="o">
        <style:list-level-properties text:list-level-position-and-space-mode="label-alignment">
          <style:list-level-label-alignment text:label-followed-by="listtab" text:list-tab-stop-position="4.403cm" fo:text-indent="-0.635cm" fo:margin-left="4.403cm"/>
        </style:list-level-properties>
        <style:text-properties fo:font-family="'Courier New'"/>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5.673cm" fo:text-indent="-0.635cm" fo:margin-left="5.673cm"/>
        </style:list-level-properties>
        <style:text-properties fo:font-family="Wingdings" style:font-charset="x-symbol"/>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6.943cm" fo:text-indent="-0.635cm" fo:margin-left="6.943cm"/>
        </style:list-level-properties>
        <style:text-properties fo:font-family="Symbol" style:font-charset="x-symbol"/>
      </text:list-level-style-bullet>
      <text:list-level-style-bullet text:level="5" text:style-name="ListLabel_20_347" loext:num-list-format="o" style:num-suffix="o" text:bullet-char="o">
        <style:list-level-properties text:list-level-position-and-space-mode="label-alignment">
          <style:list-level-label-alignment text:label-followed-by="listtab" text:list-tab-stop-position="8.213cm" fo:text-indent="-0.635cm" fo:margin-left="8.213cm"/>
        </style:list-level-properties>
        <style:text-properties fo:font-family="'Courier New'"/>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9.483cm" fo:text-indent="-0.635cm" fo:margin-left="9.483cm"/>
        </style:list-level-properties>
        <style:text-properties fo:font-family="Wingdings" style:font-charset="x-symbol"/>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10.753cm" fo:text-indent="-0.635cm" fo:margin-left="10.753cm"/>
        </style:list-level-properties>
        <style:text-properties fo:font-family="Symbol" style:font-charset="x-symbol"/>
      </text:list-level-style-bullet>
      <text:list-level-style-bullet text:level="8" text:style-name="ListLabel_20_350" loext:num-list-format="o" style:num-suffix="o" text:bullet-char="o">
        <style:list-level-properties text:list-level-position-and-space-mode="label-alignment">
          <style:list-level-label-alignment text:label-followed-by="listtab" text:list-tab-stop-position="12.023cm" fo:text-indent="-0.635cm" fo:margin-left="12.023cm"/>
        </style:list-level-properties>
        <style:text-properties fo:font-family="'Courier New'"/>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13.293cm" fo:text-indent="-0.635cm" fo:margin-left="13.29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5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5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5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5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5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5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fo:text-indent="-0.635cm" fo:margin-left="2.519cm"/>
        </style:list-level-properties>
        <style:text-properties fo:font-family="Symbol" style:font-charset="x-symbol"/>
      </text:list-level-style-bullet>
      <text:list-level-style-bullet text:level="2" text:style-name="ListLabel_20_362" loext:num-list-format="o" style:num-suffix="o" text:bullet-char="o">
        <style:list-level-properties text:list-level-position-and-space-mode="label-alignment">
          <style:list-level-label-alignment text:label-followed-by="listtab" fo:text-indent="-0.635cm" fo:margin-left="3.789cm"/>
        </style:list-level-properties>
        <style:text-properties fo:font-family="'Courier New'"/>
      </text:list-level-style-bullet>
      <text:list-level-style-bullet text:level="3" text:style-name="ListLabel_20_363" loext:num-list-format="" style:num-suffix="" text:bullet-char="">
        <style:list-level-properties text:list-level-position-and-space-mode="label-alignment">
          <style:list-level-label-alignment text:label-followed-by="listtab" fo:text-indent="-0.635cm" fo:margin-left="5.059cm"/>
        </style:list-level-properties>
        <style:text-properties fo:font-family="Wingdings" style:font-charset="x-symbol"/>
      </text:list-level-style-bullet>
      <text:list-level-style-bullet text:level="4" text:style-name="ListLabel_20_364" loext:num-list-format="" style:num-suffix="" text:bullet-char="">
        <style:list-level-properties text:list-level-position-and-space-mode="label-alignment">
          <style:list-level-label-alignment text:label-followed-by="listtab" fo:text-indent="-0.635cm" fo:margin-left="6.329cm"/>
        </style:list-level-properties>
        <style:text-properties fo:font-family="Symbol" style:font-charset="x-symbol"/>
      </text:list-level-style-bullet>
      <text:list-level-style-bullet text:level="5" text:style-name="ListLabel_20_365" loext:num-list-format="o" style:num-suffix="o" text:bullet-char="o">
        <style:list-level-properties text:list-level-position-and-space-mode="label-alignment">
          <style:list-level-label-alignment text:label-followed-by="listtab" fo:text-indent="-0.635cm" fo:margin-left="7.599cm"/>
        </style:list-level-properties>
        <style:text-properties fo:font-family="'Courier New'"/>
      </text:list-level-style-bullet>
      <text:list-level-style-bullet text:level="6" text:style-name="ListLabel_20_366" loext:num-list-format="" style:num-suffix="" text:bullet-char="">
        <style:list-level-properties text:list-level-position-and-space-mode="label-alignment">
          <style:list-level-label-alignment text:label-followed-by="listtab" fo:text-indent="-0.635cm" fo:margin-left="8.869cm"/>
        </style:list-level-properties>
        <style:text-properties fo:font-family="Wingdings" style:font-charset="x-symbol"/>
      </text:list-level-style-bullet>
      <text:list-level-style-bullet text:level="7" text:style-name="ListLabel_20_367" loext:num-list-format="" style:num-suffix="" text:bullet-char="">
        <style:list-level-properties text:list-level-position-and-space-mode="label-alignment">
          <style:list-level-label-alignment text:label-followed-by="listtab" fo:text-indent="-0.635cm" fo:margin-left="10.139cm"/>
        </style:list-level-properties>
        <style:text-properties fo:font-family="Symbol" style:font-charset="x-symbol"/>
      </text:list-level-style-bullet>
      <text:list-level-style-bullet text:level="8" text:style-name="ListLabel_20_368" loext:num-list-format="o" style:num-suffix="o" text:bullet-char="o">
        <style:list-level-properties text:list-level-position-and-space-mode="label-alignment">
          <style:list-level-label-alignment text:label-followed-by="listtab" fo:text-indent="-0.635cm" fo:margin-left="11.409cm"/>
        </style:list-level-properties>
        <style:text-properties fo:font-family="'Courier New'"/>
      </text:list-level-style-bullet>
      <text:list-level-style-bullet text:level="9" text:style-name="ListLabel_20_369" loext:num-list-format="" style:num-suffix="" text:bullet-char="">
        <style:list-level-properties text:list-level-position-and-space-mode="label-alignment">
          <style:list-level-label-alignment text:label-followed-by="listtab" fo:text-indent="-0.635cm" fo:margin-left="12.679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7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7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7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7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7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7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7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7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37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8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8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8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8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8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8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8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8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style:style style:name="Elegant.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2"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3"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4"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5"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6"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7"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8"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9"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10"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1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2"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3" style:family="table-cell" style:data-style-name="N101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14"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15"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6"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Standard">
      <style:paragraph-properties fo:margin-top="0cm" fo:margin-bottom="0cm" style:contextual-spacing="false" fo:line-height="100%" fo:text-align="end" style:justify-single-word="false"/>
    </style:style>
    <style:style style:name="MP2" style:family="paragraph" style:parent-style-name="Footer">
      <style:text-properties style:font-name="MathJax_Typewriter" fo:font-style="normal" fo:font-weight="bold" officeooo:rsid="0010ca43" officeooo:paragraph-rsid="0010ca43" style:font-style-asian="normal" style:font-weight-asian="bold" style:font-style-complex="normal" style:font-weight-complex="bold"/>
    </style:style>
    <style:style style:name="MP3" style:family="paragraph" style:parent-style-name="Frame_20_contents">
      <style:paragraph-properties fo:text-align="end" style:justify-single-word="false"/>
    </style:style>
    <style:style style:name="MP4" style:family="paragraph">
      <loext:graphic-properties draw:fill="none"/>
      <style:paragraph-properties fo:text-align="start"/>
      <style:text-properties fo:font-size="18pt"/>
    </style:style>
    <style:style style:name="MT1" style:family="text">
      <style:text-properties style:font-name="Consolas" fo:font-size="11pt" fo:font-weight="bold" style:font-size-asian="11pt" style:font-weight-asian="bold" style:font-size-complex="20pt"/>
    </style:style>
    <style:style style:name="MT2" style:family="text">
      <style:text-properties style:font-name="Consolas" fo:font-size="11pt" fo:font-weight="bold" officeooo:rsid="00942667" style:font-size-asian="11pt" style:font-weight-asian="bold" style:font-size-complex="20pt"/>
    </style:style>
    <style:style style:name="MT3" style:family="text">
      <style:text-properties fo:color="#7f7f7f" loext:opacity="100%" style:font-name="Consolas" fo:font-size="11pt" fo:font-weight="bold" officeooo:rsid="00942667" style:font-size-asian="11pt" style:font-weight-asian="bold" style:font-size-complex="20pt">
        <loext:char-complex-color loext:theme-type="dark1" loext:color-type="theme">
          <loext:transformation loext:type="tint" loext:value="4980"/>
        </loext:char-complex-color>
      </style:text-properties>
    </style:style>
    <style:style style:name="MT4" style:family="text">
      <style:text-properties fo:color="#7f7f7f" loext:opacity="100%" style:font-name="Consolas" fo:font-size="11pt" fo:font-weight="bold" style:font-size-asian="11pt" style:font-weight-asian="bold" style:font-size-complex="20pt">
        <loext:char-complex-color loext:theme-type="dark1" loext:color-type="theme">
          <loext:transformation loext:type="tint" loext:value="4980"/>
        </loext:char-complex-color>
      </style:text-properties>
    </style:style>
    <style:style style:name="MT5" style:family="text">
      <style:text-properties style:font-name="Consolas"/>
    </style:style>
    <style:style style:name="MT6" style:family="text">
      <style:text-properties style:font-name="Consolas" fo:font-size="16pt" style:font-size-asian="16pt"/>
    </style:style>
    <style:style style:name="MT7" style:family="text">
      <style:text-properties fo:color="#7f7f7f" loext:opacity="100%" style:font-name="Consolas" fo:font-size="7pt" style:font-size-asian="7pt">
        <loext:char-complex-color loext:theme-type="dark1" loext:color-type="theme">
          <loext:transformation loext:type="tint" loext:value="4980"/>
        </loext:char-complex-color>
      </style:text-properties>
    </style:style>
    <style:style style:name="MT8" style:family="text">
      <style:text-properties fo:color="#7f7f7f" loext:opacity="100%" style:font-name="Consolas">
        <loext:char-complex-color loext:theme-type="dark1" loext:color-type="theme">
          <loext:transformation loext:type="tint" loext:value="4980"/>
        </loext:char-complex-color>
      </style:text-properties>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0.06pt solid #000000"/>
    </style:style>
    <style:style style:name="Mgr1"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40%" draw:contrast="0%" draw:gamma="100%" draw:red="0%" draw:green="0%" draw:blue="0%" fo:clip="rect(0cm, 0cm, 0cm, 0cm)" draw:image-opacity="100%" style:mirror="none" loext:decorative="false" fo:margin-left="0.37cm" fo:margin-right="0.305cm" fo:margin-top="0cm" fo:margin-bottom="0cm" style:run-through="back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42cm" fo:margin-bottom="1.268cm" fo:margin-left="2.701cm" fo:margin-right="1.69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0.896cm" fo:margin-left="0cm" fo:margin-right="0cm" fo:margin-bottom="1.649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1">Proyecto </text:span><text:span text:style-name="MT2">Temporis -</text:span><text:span text:style-name="MT1"> </text:span><text:span text:style-name="MT3">D</text:span><text:span text:style-name="MT4">esarrollo de </text:span><text:span text:style-name="MT3">A</text:span><text:span text:style-name="MT4">plicaciones </text:span><text:span text:style-name="MT3">M</text:span><text:span text:style-name="MT4">ultiplataforma</text:span></text:p>
      </style:header>
      <style:header-first>
        <text:p text:style-name="Header"/>
      </style:header-first>
      <style:footer>
        <text:p text:style-name="MP2"><draw:frame draw:style-name="Mfr1" draw:name="Marco3" text:anchor-type="char" svg:x="15.132cm" svg:y="-0.353cm" svg:width="2.609cm" svg:height="1.037cm" draw:z-index="51"><draw:text-box><text:p text:style-name="MP3" loext:marker-style-name="MT5"><text:span text:style-name="MT6"><text:page-number text:select-page="current">27</text:page-number></text:span><text:span text:style-name="MT7"><text:s/></text:span><text:span text:style-name="MT8">| </text:span><text:span text:style-name="MT8"><text:page-count>27</text:page-count></text:span></text:p></draw:text-box></draw:frame><draw:frame text:anchor-type="char" draw:z-index="25" draw:name="Imagen 5" draw:style-name="Mgr1" draw:text-style-name="MP4" svg:width="3.611cm" svg:height="1.257cm" svg:x="11.285cm" svg:y="-0.39cm"><draw:image xlink:href="Pictures/10000001000002AE000000B55E2BA277.png" xlink:type="simple" xlink:show="embed" xlink:actuate="onLoad" draw:mime-type="image/png"><text:p/></draw:image><svg:desc>LOGOTIPO</svg:desc></draw:frame>Kevin Zamora Amela</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C</meta:initial-creator>
    <meta:editing-cycles>257</meta:editing-cycles>
    <meta:print-date>2026-06-07T23:48:42.039804650</meta:print-date>
    <meta:creation-date>2025-09-03T11:28:00</meta:creation-date>
    <dc:date>2026-06-08T00:11:13.901644848</dc:date>
    <meta:editing-duration>PT9H11M26S</meta:editing-duration>
    <meta:generator>LibreOffice/24.2.7.2$Linux_X86_64 LibreOffice_project/420$Build-2</meta:generator>
    <meta:printed-by>Archivos PDF</meta:printed-by>
    <meta:document-statistic meta:table-count="4" meta:image-count="6" meta:object-count="0" meta:page-count="27" meta:paragraph-count="328" meta:word-count="5228" meta:character-count="35790" meta:non-whitespace-character-count="30877"/>
    <meta:user-defined meta:name="AppVersion">12.0000</meta:user-defined>
    <meta:template xlink:type="simple" xlink:actuate="onRequest" xlink:title="Normal" xlink:href=""/>
  </office:meta>
</office:document-meta>
</file>
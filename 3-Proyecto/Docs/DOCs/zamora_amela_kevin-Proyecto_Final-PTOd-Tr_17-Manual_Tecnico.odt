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0000000C0BF7E4599.png" manifest:media-type="image/png"/>
  <manifest:file-entry manifest:full-path="Pictures/10000001000002AE000000B55E2BA2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Google Sans Text" svg:font-family="'Google Sans Text', sans-serif"/>
    <style:font-face style:name="Google Sans1" svg:font-family="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607cm" table:align="left" style:writing-mode="lr-tb"/>
    </style:style>
    <style:style style:name="Tabla1.A" style:family="table-column">
      <style:table-column-properties style:column-width="3.348cm"/>
    </style:style>
    <style:style style:name="Tabla1.B" style:family="table-column">
      <style:table-column-properties style:column-width="6.913cm"/>
    </style:style>
    <style:style style:name="Tabla1.C" style:family="table-column">
      <style:table-column-properties style:column-width="6.346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Footer">
      <style:text-properties style:font-name="Consolas1" fo:font-weight="bold" officeooo:rsid="0010ca43" officeooo:paragraph-rsid="0010ca43" style:font-weight-asian="bold" style:font-weight-complex="bold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margin-right="0.748cm">
        <style:tab-stops>
          <style:tab-stop style:position="1.752cm"/>
          <style:tab-stop style:position="15.25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4.995cm" fo:text-indent="-4.995cm" style:auto-text-indent="false">
        <style:tab-stops>
          <style:tab-stop style:position="1.794cm"/>
        </style:tab-stops>
      </style:paragraph-properties>
    </style:style>
    <style:style style:name="P6" style:family="paragraph" style:parent-style-name="Frame_20_contents">
      <style:paragraph-properties fo:text-align="end" style:justify-single-word="false"/>
    </style:style>
    <style:style style:name="P7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8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paragraph-rsid="000c09b6"/>
    </style:style>
    <style:style style:name="P9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rsid="000bf7c1" officeooo:paragraph-rsid="000bf7c1"/>
    </style:style>
    <style:style style:name="P10" style:family="paragraph" style:parent-style-name="Frame_20_contents">
      <style:paragraph-properties fo:margin-top="0cm" fo:margin-bottom="0cm" style:contextual-spacing="false" fo:line-height="100%"/>
      <style:text-properties style:font-name="Consolas" fo:font-size="6pt" fo:font-weight="bold" style:font-size-asian="6pt" style:font-weight-asian="bold" style:font-size-complex="6pt"/>
    </style:style>
    <style:style style:name="P11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style:font-name="Consolas" fo:font-size="14pt" fo:font-weight="bold" style:font-size-asian="14pt" style:font-weight-asian="bold" style:font-size-complex="12pt"/>
    </style:style>
    <style:style style:name="P12" style:family="paragraph" style:parent-style-name="Heading_20_1" style:list-style-name="WWNum19">
      <style:paragraph-properties fo:margin-left="1.27cm" fo:margin-top="0cm" fo:margin-bottom="0cm" style:contextual-spacing="false" fo:text-indent="-1.27cm" style:auto-text-indent="false" fo:break-before="page"/>
    </style:style>
    <style:style style:name="P13" style:family="paragraph" style:parent-style-name="Heading_20_2" style:list-style-name="WWNum19">
      <style:paragraph-properties fo:margin-left="1.27cm" fo:text-indent="-1.27cm" style:auto-text-indent="false"/>
    </style:style>
    <style:style style:name="P14" style:family="paragraph" style:parent-style-name="Heading_20_3">
      <style:paragraph-properties fo:margin-left="0cm" fo:margin-right="0cm" fo:text-indent="0cm" style:auto-text-indent="false"/>
      <style:text-properties style:font-name="Consolas1" fo:font-size="11pt" style:font-size-asian="11pt" style:font-size-complex="11pt"/>
    </style:style>
    <style:style style:name="P15" style:family="paragraph" style:parent-style-name="Heading_20_3">
      <style:text-properties officeooo:paragraph-rsid="0019292e"/>
    </style:style>
    <style:style style:name="P16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1"/>
    </style:style>
    <style:style style:name="P17" style:family="paragraph" style:parent-style-name="Heading_20_4">
      <style:text-properties style:font-name="Google Sans1"/>
    </style:style>
    <style:style style:name="P18" style:family="paragraph" style:parent-style-name="Heading_20_4">
      <style:text-properties style:font-name="Google Sans1" officeooo:paragraph-rsid="002c5412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0" style:family="paragraph" style:parent-style-name="Standard">
      <style:paragraph-properties fo:text-align="start" style:justify-single-word="false"/>
      <style:text-properties fo:color="#984806" loext:opacity="100%" style:font-name="Consolas" fo:font-size="16pt" fo:font-weight="bold" style:font-size-asian="16pt" style:font-weight-asian="bold" style:font-size-complex="14pt" style:font-weight-complex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P21" style:family="paragraph" style:parent-style-name="Standard">
      <style:paragraph-properties fo:margin-top="0cm" fo:margin-bottom="0.353cm" style:contextual-spacing="false" fo:break-before="page"/>
      <style:text-properties fo:background-color="transparent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</style:style>
    <style:style style:name="P28" style:family="paragraph" style:parent-style-name="Text_20_body">
      <style:text-properties style:font-name="Calibri1"/>
    </style:style>
    <style:style style:name="P2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2c5412"/>
    </style:style>
    <style:style style:name="P31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4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2c5412"/>
    </style:style>
    <style:style style:name="P35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2c5412"/>
    </style:style>
    <style:style style:name="P36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2c5412"/>
    </style:style>
    <style:style style:name="P37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39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40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4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 officeooo:paragraph-rsid="002c5412"/>
    </style:style>
    <style:style style:name="P42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 officeooo:paragraph-rsid="002c5412"/>
    </style:style>
    <style:style style:name="P4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paragraph-rsid="002c5412"/>
    </style:style>
    <style:style style:name="P44" style:family="paragraph" style:parent-style-name="Text_20_body">
      <style:text-properties style:font-name="Google Sans Text"/>
    </style:style>
    <style:style style:name="P4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237df4"/>
    </style:style>
    <style:style style:name="P46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2c5412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nsolas"/>
    </style:style>
    <style:style style:name="T2" style:family="text">
      <style:text-properties style:font-name="Consolas" fo:font-size="11pt" fo:font-weight="bold" style:font-size-asian="11pt" style:font-weight-asian="bold" style:font-size-complex="20pt"/>
    </style:style>
    <style:style style:name="T3" style:family="text">
      <style:text-properties style:font-name="Consolas" fo:font-size="16pt" style:font-size-asian="16pt"/>
    </style:style>
    <style:style style:name="T4" style:family="text">
      <style:text-properties style:font-name="Consolas" fo:font-size="36pt" fo:font-weight="bold" style:font-size-asian="36pt" style:font-weight-asian="bold" style:font-size-complex="20pt"/>
    </style:style>
    <style:style style:name="T5" style:family="text">
      <style:text-properties style:font-name="Consolas" fo:font-size="6pt" fo:font-weight="bold" style:font-size-asian="6pt" style:font-weight-asian="bold" style:font-size-complex="6pt"/>
    </style:style>
    <style:style style:name="T6" style:family="text">
      <style:text-properties style:font-name="Consolas" fo:font-size="22pt" fo:font-weight="bold" style:font-size-asian="22pt" style:font-weight-asian="bold" style:font-size-complex="20pt"/>
    </style:style>
    <style:style style:name="T7" style:family="text">
      <style:text-properties style:font-name="Consolas" fo:font-size="14pt" fo:font-weight="bold" style:font-size-asian="14pt" style:font-weight-asian="bold" style:font-size-complex="12pt"/>
    </style:style>
    <style:style style:name="T8" style:family="text">
      <style:text-properties style:font-name="Consolas" fo:font-size="14pt" fo:font-weight="bold" officeooo:rsid="000bb8b8" style:font-size-asian="14pt" style:font-weight-asian="bold" style:font-size-complex="12pt"/>
    </style:style>
    <style:style style:name="T9" style:family="text">
      <style:text-properties style:font-name="Consolas" fo:font-size="14pt" fo:font-weight="bold" officeooo:rsid="000dd541" style:font-size-asian="14pt" style:font-weight-asian="bold" style:font-size-complex="12pt"/>
    </style:style>
    <style:style style:name="T10" style:family="text">
      <style:text-properties fo:color="#7f7f7f" loext:opacity="100%" style:font-name="Consolas">
        <loext:char-complex-color loext:theme-type="dark1" loext:color-type="theme">
          <loext:transformation loext:type="tint" loext:value="4980"/>
        </loext:char-complex-color>
      </style:text-properties>
    </style:style>
    <style:style style:name="T11" style:family="text">
      <style:text-properties fo:color="#7f7f7f" loext:opacity="100%" style:font-name="Consolas" fo:font-size="11pt" fo:font-weight="bold" style:font-size-asian="11pt" style:font-weight-asian="bold" style:font-size-complex="20pt">
        <loext:char-complex-color loext:theme-type="dark1" loext:color-type="theme">
          <loext:transformation loext:type="tint" loext:value="4980"/>
        </loext:char-complex-color>
      </style:text-properties>
    </style:style>
    <style:style style:name="T12" style:family="text">
      <style:text-properties fo:color="#7f7f7f" loext:opacity="100%" style:font-name="Consolas" fo:font-size="7pt" style:font-size-asian="7pt">
        <loext:char-complex-color loext:theme-type="dark1" loext:color-type="theme">
          <loext:transformation loext:type="tint" loext:value="4980"/>
        </loext:char-complex-color>
      </style:text-properties>
    </style:style>
    <style:style style:name="T13" style:family="text">
      <style:text-properties fo:color="#7f7f7f" loext:opacity="100%" style:font-name="Consolas" fo:font-size="22pt" fo:font-weight="bold" style:font-size-asian="22pt" style:font-weight-asian="bold" style:font-size-complex="20pt">
        <loext:char-complex-color loext:theme-type="dark1" loext:color-type="theme">
          <loext:transformation loext:type="tint" loext:value="4980"/>
        </loext:char-complex-color>
      </style:text-properties>
    </style:style>
    <style:style style:name="T14" style:family="text">
      <style:text-properties fo:color="#7f7f7f" loext:opacity="100%" style:font-name="Consolas" fo:font-size="22pt" fo:font-weight="bold" officeooo:rsid="000bf7c1" style:font-size-asian="22pt" style:font-weight-asian="bold" style:font-size-complex="20pt">
        <loext:char-complex-color loext:theme-type="dark1" loext:color-type="theme">
          <loext:transformation loext:type="tint" loext:value="4980"/>
        </loext:char-complex-color>
      </style:text-properties>
    </style:style>
    <style:style style:name="T15" style:family="text">
      <style:text-properties fo:color="#984806" loext:opacity="100%" style:font-name="Consolas" fo:font-size="16pt" fo:font-weight="bold" style:font-size-asian="16pt" style:font-weight-asian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T16" style:family="text">
      <style:text-properties fo:color="#984806" loext:opacity="100%" style:font-name="Consolas" fo:font-size="16pt" fo:font-weight="bold" style:font-size-asian="16pt" style:font-weight-asian="bold" style:font-size-complex="14pt" style:font-weight-complex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T17" style:family="text">
      <style:text-properties style:use-window-font-color="true" loext:opacity="0%" fo:font-size="11pt" style:font-size-asian="11pt" style:language-asian="es" style:country-asian="ES">
        <loext:char-complex-color loext:theme-type="dark1" loext:color-type="theme">
          <loext:transformation loext:type="tint" loext:value="2509"/>
        </loext:char-complex-color>
      </style:text-properties>
    </style:style>
    <style:style style:name="T18" style:family="text">
      <style:text-properties text:display="true"/>
    </style:style>
    <style:style style:name="T19" style:family="text">
      <style:text-properties style:use-window-font-color="true" loext:opacity="0%" fo:font-size="11pt" style:font-size-asian="11pt" style:language-asian="es" style:country-asian="ES"/>
    </style:style>
    <style:style style:name="T20" style:family="text">
      <style:text-properties fo:font-weight="bold"/>
    </style:style>
    <style:style style:name="T21" style:family="text">
      <style:text-properties fo:font-weight="bold" officeooo:rsid="0013811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f8bf2"/>
    </style:style>
    <style:style style:name="T24" style:family="text">
      <style:text-properties fo:font-weight="bold" officeooo:rsid="0025b828"/>
    </style:style>
    <style:style style:name="T25" style:family="text">
      <style:text-properties fo:font-weight="bold" officeooo:rsid="002ad4ab"/>
    </style:style>
    <style:style style:name="T26" style:family="text">
      <style:text-properties fo:font-weight="bold" officeooo:rsid="002f69cb"/>
    </style:style>
    <style:style style:name="T27" style:family="text">
      <style:text-properties fo:font-weight="bold" officeooo:rsid="00313575"/>
    </style:style>
    <style:style style:name="T28" style:family="text">
      <style:text-properties fo:font-weight="bold" officeooo:rsid="003360c1"/>
    </style:style>
    <style:style style:name="T29" style:family="text">
      <style:text-properties fo:font-style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37df4" style:font-style-asian="italic" style:font-style-complex="italic"/>
    </style:style>
    <style:style style:name="T32" style:family="text">
      <style:text-properties fo:font-style="italic" officeooo:rsid="0020bbdb"/>
    </style:style>
    <style:style style:name="T33" style:family="text">
      <style:text-properties fo:font-style="italic" officeooo:rsid="0025b828"/>
    </style:style>
    <style:style style:name="T34" style:family="text">
      <style:text-properties fo:font-style="italic" officeooo:rsid="002ad4ab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37df4" style:font-style-asian="normal" style:font-style-complex="normal"/>
    </style:style>
    <style:style style:name="T37" style:family="text">
      <style:text-properties style:font-name="Consolas1" fo:font-size="11pt" style:font-size-asian="11pt" style:font-size-complex="11pt"/>
    </style:style>
    <style:style style:name="T38" style:family="text">
      <style:text-properties officeooo:rsid="001a736d"/>
    </style:style>
    <style:style style:name="T39" style:family="text">
      <style:text-properties style:font-name="Google Sans Text"/>
    </style:style>
    <style:style style:name="T40" style:family="text">
      <style:text-properties style:font-name="Google Sans Text" fo:font-style="italic"/>
    </style:style>
    <style:style style:name="T41" style:family="text">
      <style:text-properties style:font-name="Google Sans Text" fo:font-style="italic" officeooo:rsid="0020bbdb"/>
    </style:style>
    <style:style style:name="T42" style:family="text">
      <style:text-properties style:font-name="Google Sans Text" fo:font-style="italic" style:font-style-asian="italic" style:font-style-complex="italic"/>
    </style:style>
    <style:style style:name="T43" style:family="text">
      <style:text-properties style:font-name="Google Sans Text" fo:font-style="italic" officeooo:rsid="00237df4" style:font-style-asian="italic" style:font-style-complex="italic"/>
    </style:style>
    <style:style style:name="T44" style:family="text">
      <style:text-properties style:font-name="Google Sans Text" officeooo:rsid="00237df4"/>
    </style:style>
    <style:style style:name="T45" style:family="text">
      <style:text-properties style:font-name="Google Sans Text" fo:font-style="normal" style:font-style-asian="normal" style:font-style-complex="normal"/>
    </style:style>
    <style:style style:name="T46" style:family="text">
      <style:text-properties style:font-name="Google Sans Text" fo:font-style="normal" officeooo:rsid="00237df4" style:font-style-asian="normal" style:font-style-complex="normal"/>
    </style:style>
    <style:style style:name="T47" style:family="text">
      <style:text-properties style:font-name="Google Sans Text" style:font-name-asian="Google Sans Text" style:font-name-complex="Google Sans Text"/>
    </style:style>
    <style:style style:name="T48" style:family="text">
      <style:text-properties style:text-line-through-style="none" style:text-line-through-type="none" style:font-name="Google Sans" fo:font-size="12pt" style:text-underline-style="none" fo:font-weight="normal" style:text-blinking="false" loext:padding="0cm" loext:border="none"/>
    </style:style>
    <style:style style:name="T49" style:family="text">
      <style:text-properties style:text-line-through-style="none" style:text-line-through-type="none" style:font-name="Google Sans" fo:font-size="12pt" style:text-underline-style="none" fo:font-weight="normal" officeooo:rsid="00237df4" style:text-blinking="false" loext:padding="0cm" loext:border="none"/>
    </style:style>
    <style:style style:name="T50" style:family="text">
      <style:text-properties style:text-line-through-style="none" style:text-line-through-type="none" style:font-name="Google Sans" fo:font-size="12pt" fo:font-style="italic" style:text-underline-style="none" fo:font-weight="normal" style:text-blinking="false" style:font-style-asian="italic" style:font-style-complex="italic" loext:padding="0cm" loext:border="none"/>
    </style:style>
    <style:style style:name="T51" style:family="text">
      <style:text-properties style:text-line-through-style="none" style:text-line-through-type="none" style:font-name="Google Sans" fo:font-size="12pt" fo:font-style="italic" style:text-underline-style="none" fo:font-weight="normal" officeooo:rsid="00237df4" style:text-blinking="false" style:font-style-asian="italic" style:font-style-complex="italic" loext:padding="0cm" loext:border="none"/>
    </style:style>
    <style:style style:name="T52" style:family="text">
      <style:text-properties style:text-line-through-style="none" style:text-line-through-type="none" style:font-name="Google Sans" fo:font-size="12pt" fo:font-style="normal" style:text-underline-style="none" fo:font-weight="normal" style:text-blinking="false" style:font-style-asian="normal" style:font-style-complex="normal" loext:padding="0cm" loext:border="none"/>
    </style:style>
    <style:style style:name="T53" style:family="text">
      <style:text-properties style:text-line-through-style="none" style:text-line-through-type="none" style:font-name="Google Sans" fo:font-size="12pt" fo:font-style="normal" style:text-underline-style="none" fo:font-weight="normal" officeooo:rsid="00237df4" style:text-blinking="false" style:font-style-asian="normal" style:font-style-complex="normal" loext:padding="0cm" loext:border="none"/>
    </style:style>
    <style:style style:name="T54" style:family="text">
      <style:text-properties officeooo:rsid="00237df4"/>
    </style:style>
    <style:style style:name="T55" style:family="text">
      <style:text-properties officeooo:rsid="00329918" style:font-name-asian="Google Sans Text" style:font-name-complex="Google Sans Text"/>
    </style:style>
    <style:style style:name="T56" style:family="text">
      <style:text-properties officeooo:rsid="002ddfef"/>
    </style:style>
    <style:style style:name="T57" style:family="text">
      <style:text-properties officeooo:rsid="00329918"/>
    </style:style>
    <style:style style:name="T58" style:family="text">
      <style:text-properties officeooo:rsid="003360c1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48cm, 0cm, 0.0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40%" draw:contrast="0%" draw:gamma="100%" draw:red="0%" draw:green="0%" draw:blue="0%" fo:clip="rect(0cm, 0cm, 0cm, 0cm)" draw:image-opacity="100%" style:mirror="none" loext:decorative="false" fo:margin-left="0.37cm" fo:margin-right="0.293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40%" draw:contrast="0%" draw:gamma="100%" draw:red="0%" draw:green="0%" draw:blue="0%" fo:clip="rect(0cm, 0cm, 0cm, 0cm)" draw:image-opacity="100%" style:mirror="none" loext:decorative="false" fo:margin-left="0.37cm" fo:margin-right="0.305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3" draw:name="Imagen1" text:anchor-type="char" svg:x="9.834cm" svg:y="0.318cm" svg:width="4.805cm" svg:height="6.212cm" draw:z-index="27"><draw:image xlink:href="Pictures/10000001000000C0000000C0BF7E4599.png" xlink:type="simple" xlink:show="embed" xlink:actuate="onLoad" draw:mime-type="image/png"/></draw:frame><draw:frame draw:style-name="fr1" draw:name="Marco1" text:anchor-type="char" svg:x="1.473cm" svg:y="0.212cm" svg:width="8.477cm" svg:height="6.417cm" draw:z-index="25"><draw:text-box><text:p text:style-name="P7" loext:marker-style-name="T4"><text:span text:style-name="T4">Proyecto</text:span></text:p><text:p text:style-name="P9" loext:marker-style-name="T4"><text:span text:style-name="T4">Temporis</text:span></text:p><text:p text:style-name="P10" loext:marker-style-name="T5"/><text:p text:style-name="P7" loext:marker-style-name="T6"><text:span text:style-name="T14">D</text:span><text:span text:style-name="T13">esarrollo de </text:span><text:span text:style-name="T14">A</text:span><text:span text:style-name="T13">plicaciones </text:span><text:span text:style-name="T14">M</text:span><text:span text:style-name="T13">ultiplataforma</text:span></text:p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" text:anchor-type="char" svg:x="3.473cm" svg:y="-0.249cm" svg:width="8.424cm" svg:height="3.279cm" draw:z-index="26"><draw:text-box><text:p text:style-name="P8" loext:marker-style-name="T7"><text:span text:style-name="T7">Alumno: </text:span></text:p><text:p text:style-name="P8" loext:marker-style-name="T7"><text:span text:style-name="T8">Kevin Zamora Amela</text:span></text:p><text:p text:style-name="P11" loext:marker-style-name="T7"/><text:p text:style-name="P8" loext:marker-style-name="T7"><text:span text:style-name="T7">Fecha: </text:span></text:p><text:p text:style-name="P8" loext:marker-style-name="T7"><text:span text:style-name="T9">10</text:span><text:span text:style-name="T8">/06/2026</text:span>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char" draw:z-index="24" draw:name="Imagen 5" draw:style-name="gr1" draw:text-style-name="P47" svg:width="6.905cm" svg:height="2.396cm" svg:x="4.157cm" svg:y="0.766cm"><draw:image xlink:href="Pictures/10000001000002AE000000B55E2BA277.png" xlink:type="simple" xlink:show="embed" xlink:actuate="onLoad" draw:mime-type="image/png"><text:p/></draw:image><svg:desc>LOGOTIPO</svg:desc></draw:frame></text:p>
      <text:table-of-content text:style-name="Sect1" text:protected="true" text:name="Sumario1">
        <text:table-of-content-source text:outline-level="3" text:use-index-marks="false">
          <text:index-title-template text:style-name="Contents_20_Heading">Índice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1"><text:bookmark-start text:name="_Toc211418038"/><text:span text:style-name="T15">Índice</text:span><text:bookmark-end text:name="_Toc211418038"/></text:p>
            <text:p text:style-name="Standard"/>
          </text:index-title>
          <text:p text:style-name="Contents_20_1" loext:marker-style-name="T19"><text:a xlink:type="simple" xlink:href="#_Toc212808594" text:style-name="Index_20_Link" text:visited-style-name="Index_20_Link">0.<text:span text:style-name="T17"><text:tab/></text:span>Resumen ejecutivo<text:span text:style-name="T18"><text:tab/>3</text:span></text:a></text:p>
          <text:p text:style-name="Contents_20_1" loext:marker-style-name="T19"><text:a xlink:type="simple" xlink:href="#_Toc212808595" text:style-name="Index_20_Link" text:visited-style-name="Index_20_Link">1.<text:span text:style-name="T17"><text:tab/></text:span>Identificación del producto.<text:span text:style-name="T18"><text:tab/>4</text:span></text:a></text:p>
          <text:p text:style-name="Contents_20_2" loext:marker-style-name="T19"><text:a xlink:type="simple" xlink:href="#_Toc212808596" text:style-name="Index_20_Link" text:visited-style-name="Index_20_Link">1.1.<text:span text:style-name="T17"><text:tab/></text:span>Análisis del sector y estructura de la empresa<text:span text:style-name="T18"><text:tab/>4</text:span></text:a></text:p>
          <text:p text:style-name="Contents_20_2" loext:marker-style-name="T19"><text:a xlink:type="simple" xlink:href="#_Toc212808597" text:style-name="Index_20_Link" text:visited-style-name="Index_20_Link">1.2.<text:span text:style-name="T17"><text:tab/></text:span>Estudio de mercado<text:span text:style-name="T18"><text:tab/>4</text:span></text:a></text:p>
          <text:p text:style-name="Contents_20_2" loext:marker-style-name="T19"><text:a xlink:type="simple" xlink:href="#_Toc212808598" text:style-name="Index_20_Link" text:visited-style-name="Index_20_Link">1.3.<text:span text:style-name="T17"><text:tab/></text:span>Innovación, dificultad e investigación<text:span text:style-name="T18"><text:tab/>4</text:span></text:a></text:p>
          <text:p text:style-name="Contents_20_2" loext:marker-style-name="T19"><text:a xlink:type="simple" xlink:href="#_Toc212808599" text:style-name="Index_20_Link" text:visited-style-name="Index_20_Link">1.4.<text:span text:style-name="T17"><text:tab/></text:span>Ayudas y subvenciones<text:span text:style-name="T18"><text:tab/>4</text:span></text:a></text:p>
          <text:p text:style-name="Contents_20_2" loext:marker-style-name="T19"><text:a xlink:type="simple" xlink:href="#_Toc212808600" text:style-name="Index_20_Link" text:visited-style-name="Index_20_Link">1.5.<text:span text:style-name="T17"><text:tab/></text:span>Especificación de requisitos<text:span text:style-name="T18"><text:tab/>4</text:span></text:a></text:p>
          <text:p text:style-name="Contents_20_2" loext:marker-style-name="T19"><text:a xlink:type="simple" xlink:href="#_Toc212808601" text:style-name="Index_20_Link" text:visited-style-name="Index_20_Link">1.6.<text:span text:style-name="T17"><text:tab/></text:span>Casos de uso<text:span text:style-name="T18"><text:tab/>4</text:span></text:a></text:p>
          <text:p text:style-name="Contents_20_2" loext:marker-style-name="T19"><text:a xlink:type="simple" xlink:href="#_Toc212808602" text:style-name="Index_20_Link" text:visited-style-name="Index_20_Link">1.7.<text:span text:style-name="T17"><text:tab/></text:span>Bocetos de interfaz<text:span text:style-name="T18"><text:tab/>5</text:span></text:a></text:p>
          <text:p text:style-name="Contents_20_1" loext:marker-style-name="T19"><text:a xlink:type="simple" xlink:href="#_Toc212808603" text:style-name="Index_20_Link" text:visited-style-name="Index_20_Link">2.<text:span text:style-name="T17"><text:tab/></text:span>Diseño de la aplicación<text:span text:style-name="T18"><text:tab/>5</text:span></text:a></text:p>
          <text:p text:style-name="Contents_20_2" loext:marker-style-name="T19"><text:a xlink:type="simple" xlink:href="#_Toc212808604" text:style-name="Index_20_Link" text:visited-style-name="Index_20_Link">2.1.<text:span text:style-name="T17"><text:tab/></text:span>Estudio de viabilidad<text:span text:style-name="T18"><text:tab/>5</text:span></text:a></text:p>
          <text:p text:style-name="Contents_20_2" loext:marker-style-name="T19"><text:a xlink:type="simple" xlink:href="#_Toc212808605" text:style-name="Index_20_Link" text:visited-style-name="Index_20_Link">2.2.<text:span text:style-name="T17"><text:tab/></text:span>Planificación, ciclo de vida y diagrama Gantt<text:span text:style-name="T18"><text:tab/>5</text:span></text:a></text:p>
          <text:p text:style-name="Contents_20_2" loext:marker-style-name="T19"><text:a xlink:type="simple" xlink:href="#_Toc212808606" text:style-name="Index_20_Link" text:visited-style-name="Index_20_Link">2.3.<text:span text:style-name="T17"><text:tab/></text:span>Entidad Relación<text:span text:style-name="T18"><text:tab/>5</text:span></text:a></text:p>
          <text:p text:style-name="Contents_20_2" loext:marker-style-name="T19"><text:a xlink:type="simple" xlink:href="#_Toc212808607" text:style-name="Index_20_Link" text:visited-style-name="Index_20_Link">2.4.<text:span text:style-name="T17"><text:tab/></text:span>Esquema Relacional<text:span text:style-name="T18"><text:tab/>5</text:span></text:a></text:p>
          <text:p text:style-name="Contents_20_2" loext:marker-style-name="T19"><text:a xlink:type="simple" xlink:href="#_Toc212808608" text:style-name="Index_20_Link" text:visited-style-name="Index_20_Link">2.5.<text:span text:style-name="T17"><text:tab/></text:span>Diagrama de Clases<text:span text:style-name="T18"><text:tab/>5</text:span></text:a></text:p>
          <text:p text:style-name="Contents_20_2" loext:marker-style-name="T19"><text:a xlink:type="simple" xlink:href="#_Toc212808609" text:style-name="Index_20_Link" text:visited-style-name="Index_20_Link">2.6.<text:span text:style-name="T17"><text:tab/></text:span>Diseño de Interfaces<text:span text:style-name="T18"><text:tab/>5</text:span></text:a></text:p>
          <text:p text:style-name="Contents_20_2" loext:marker-style-name="T19"><text:a xlink:type="simple" xlink:href="#_Toc212808610" text:style-name="Index_20_Link" text:visited-style-name="Index_20_Link">2.7.<text:span text:style-name="T17"><text:tab/></text:span>Plan de Pruebas<text:span text:style-name="T18"><text:tab/>6</text:span></text:a></text:p>
          <text:p text:style-name="Contents_20_1" loext:marker-style-name="T19"><text:a xlink:type="simple" xlink:href="#_Toc212808611" text:style-name="Index_20_Link" text:visited-style-name="Index_20_Link">3.<text:span text:style-name="T17"><text:tab/></text:span>Gestión de proyecto - Planificación<text:span text:style-name="T18"><text:tab/>6</text:span></text:a></text:p>
          <text:p text:style-name="Contents_20_2" loext:marker-style-name="T19"><text:a xlink:type="simple" xlink:href="#_Toc212808612" text:style-name="Index_20_Link" text:visited-style-name="Index_20_Link">3.1.<text:span text:style-name="T17"><text:tab/></text:span>Planificación Proyecto - Scrum<text:span text:style-name="T18"><text:tab/>6</text:span></text:a></text:p>
          <text:p text:style-name="Contents_20_1" loext:marker-style-name="T19"><text:a xlink:type="simple" xlink:href="#_Toc212808613" text:style-name="Index_20_Link" text:visited-style-name="Index_20_Link">4.<text:span text:style-name="T17"><text:tab/></text:span>Gestión del proyecto - Seguimiento<text:span text:style-name="T18"><text:tab/>6</text:span></text:a></text:p>
          <text:p text:style-name="Contents_20_2" loext:marker-style-name="T19"><text:a xlink:type="simple" xlink:href="#_Toc212808614" text:style-name="Index_20_Link" text:visited-style-name="Index_20_Link">4.1.<text:span text:style-name="T17"><text:tab/></text:span>Seguimiento Proyecto - Scrum<text:span text:style-name="T18"><text:tab/>6</text:span></text:a></text:p>
          <text:p text:style-name="P3"/>
        </text:index-body>
      </text:table-of-content>
      <text:p text:style-name="P4"/>
      <text:p text:style-name="P4"/>
      <text:list xml:id="list2372106992" text:style-name="WWNum19">
        <text:list-item>
          <text:h text:style-name="P12" text:outline-level="1"><text:bookmark-start text:name="_Toc212808594"/>Resumen ejecutivo<text:bookmark-end text:name="_Toc212808594"/></text:h>
        </text:list-item>
      </text:list>
      <text:h text:style-name="P15" text:outline-level="3"><text:span text:style-name="T37">Descripción del proyecto</text:span></text:h>
      <text:p text:style-name="P28">El proyecto <text:span text:style-name="T22">Temporis</text:span> consiste en el diseño, desarrollo e implementación de una aplicación móvil nativa para el sistema operativo Android (programada en <text:span text:style-name="T30">Kotlin</text:span> y Java). Su propósito principal es ofrecer una solución integral para la gestión del tiempo operativo, el control de intervalos de concentración y la optimización de la productividad personal y laboral mediante un sistema flexible de temporizadores y contadores personalizados. A nivel de infraestructura de datos, la aplicación delega la persistencia de información y el control perimetral en la suite en la nube de <text:span text:style-name="T30">Google Firebase</text:span> (<text:span text:style-name="T30">Authentication</text:span> y <text:span text:style-name="T30">Cloud Firestore</text:span>).</text:p>
      <text:h text:style-name="P14" text:outline-level="3">Qué se espera lograr con la implementación para el usuario final</text:h>
      <text:list text:style-name="L1">
        <text:list-item>
          <text:p text:style-name="P27"><text:span text:style-name="T21">G</text:span><text:span text:style-name="T20">estión eficiente del tiempo:</text:span> Permitir a los usuarios monitorizar con precisión matemática los bloques de tiempo dedicados a tareas u objetivos específicos mediante mecánicas de cuenta regresiva personalizables.</text:p>
        </text:list-item>
        <text:list-item>
          <text:p text:style-name="P27"><text:span text:style-name="T20">Accesibilidad Universal (Inclusión real):</text:span> Proporcionar una interfaz reactiva y dinámica que cumpla con las pautas <text:span text:style-name="T30">WCAG</text:span> (<text:span text:style-name="T35">Web Content Accessibility Guidelines</text:span>), permitiendo la adaptación de la interfaz en tiempo real (escalado de fuentes, alto contraste) para usuarios con diversidad funcional o neurodivergencia.</text:p>
        </text:list-item>
        <text:list-item>
          <text:p text:style-name="P27"><text:span text:style-name="T20">Persistencia y Sincronización:</text:span> Asegurar que los datos del historial de tiempos estén siempre disponibles en tiempo real en cualquier dispositivo, garantizando la resiliencia en entornos con conectividad variable gracias al soporte <text:span text:style-name="T30">offline</text:span> del almacenamiento local indexado.</text:p>
        </text:list-item>
      </text:list>
      <text:h text:style-name="P14" text:outline-level="3">Por qué es importante desarrollar esta aplicación</text:h>
      <text:p text:style-name="P26"><text:span text:style-name="T38">E</text:span>l mercado actual del software de productividad cuenta con herramientas robustas, pero adolece de una ineficiencia operativa crítica: la exclusión sistemática de usuarios con capacidades diversas debido a interfaces rígidas y complejas. Como proyecto impulsado por la vivencia de la neurodivergencia (TDA) y el Daño Cerebral Adquirido (DCA), <text:span text:style-name="T20">Temporis</text:span> nace para demostrar que el software de alto rendimiento y la accesibilidad nativa no son mutuamente excluyentes. Su desarrollo es vital para dotar a los entornos corporativos inclusivos y al público general de una herramienta que elimine barreras de usabilidad, transformando el control del tiempo en una experiencia cómoda, intuitiva y justa para todos.</text:p>
      <text:list xml:id="list1601337011564" text:continue-list="list2372106992" text:style-name="WWNum19">
        <text:list-item>
          <text:h text:style-name="P12" text:outline-level="1"><text:bookmark-start text:name="_Toc212808595"/>Identificación del producto.<text:bookmark-end text:name="_Toc212808595"/></text:h>
          <text:list>
            <text:list-item>
              <text:h text:style-name="P13" text:outline-level="2"><text:bookmark-start text:name="_Toc212808596"/>Análisis del sector y estructura de la empresa<text:bookmark-end text:name="_Toc212808596"/></text:h>
            </text:list-item>
          </text:list>
        </text:list-item>
      </text:list>
      <text:p text:style-name="P22">El proyecto se enmarca dentro del sector de las Tecnologías de la Información y la Comunicación (TIC), específicamente en el subsector estratégico del <text:span text:style-name="T20">Desarrollo de Software para la Productividad y la Gestión de Tiempos</text:span>. En este ecosistema, la gestión precisa del tiempo operativo se ha consolidado como la métrica clave para la rentabilidad de las organizaciones modernas.</text:p>
      <text:p text:style-name="P22">Para definir el espectro donde operará e impactará <text:span text:style-name="T20">Temporis</text:span>, se categorizan tres modelos organizacionales diana según sus necesidades específicas, estructuras departamentales e interacción funcional con la herramienta:</text:p>
      <text:h text:style-name="P18" text:outline-level="4">A. <text:span text:style-name="T30">Startup</text:span> de Desarrollo Tecnológico "<text:span text:style-name="T30">CodeFocus</text:span>" (Sector IT - Mediana Empresa)</text:h>
      <text:list text:style-name="L2">
        <text:list-item>
          <text:p text:style-name="P30"><text:span text:style-name="T23">M</text:span><text:span text:style-name="T20">odelo de Negocio:</text:span> Desarrollo de soluciones de software a medida bajo demanda. </text:p>
        </text:list-item>
        <text:list-item>
          <text:p text:style-name="P30"><text:span text:style-name="T23">N</text:span><text:span text:style-name="T20">ecesidad Operativa:</text:span> Control estricto del cómputo de horas por proyecto para garantizar una facturación exacta y auditable al cliente final. </text:p>
        </text:list-item>
      </text:list>
      <text:p text:style-name="P43">Estructura Funcional e Integración:</text:p>
      <text:list text:style-name="L6">
        <text:list-item>
          <text:p text:style-name="P34"><text:span text:style-name="T32">D</text:span><text:span text:style-name="T29">irección (CEO):</text:span> Define los objetivos de rentabilidad anual del negocio. </text:p>
        </text:list-item>
        <text:list-item>
          <text:p text:style-name="P34"><text:span text:style-name="T32">G</text:span><text:span text:style-name="T29">estión de Proyectos (PM):</text:span> Supervisa plazos e hitos; utiliza las métricas de <text:span text:style-name="T20">Temporis</text:span> para contrastar el tiempo estimado frente al tiempo de desarrollo real. </text:p>
        </text:list-item>
        <text:list-item>
          <text:p text:style-name="P46"><text:span text:style-name="T41">D</text:span><text:span text:style-name="T40">esarrollo (IT):</text:span><text:span text:style-name="T39"> Programadores que ejecutan el código; emplean la aplicación nativa para mantener el enfoque (</text:span><text:span text:style-name="T43">E</text:span><text:span text:style-name="T42">j. Técnica Pomodoro: </text:span><text:span text:style-name="T43">Método de gestión del tiempo que mejora la concentración y evita la fatiga mental</text:span><text:span text:style-name="T42">.</text:span><text:span text:style-name="T30"> Consiste en dividir el trabajo en intervalos ininterrumpidos de 25 minutos </text:span><text:span text:style-name="T31">[</text:span><text:span text:style-name="T30">llamados </text:span><text:span text:style-name="Emphasis"><text:span text:style-name="T50">pomodoros</text:span></text:span><text:span text:style-name="Emphasis"><text:span text:style-name="T51">]</text:span></text:span><text:span text:style-name="T30"> seguidos de descansos breves, con pausas más largas tras cuatro ciclos completados</text:span><text:span text:style-name="T39">) y persistir sus bloques de trabajo en la nube. </text:span></text:p>
        </text:list-item>
        <text:list-item>
          <text:p text:style-name="P34"><text:span text:style-name="T32">A</text:span><text:span text:style-name="T29">dministración:</text:span> Extrae de manera automatizada los registros temporales consolidados para emitir facturas precisas. </text:p>
        </text:list-item>
      </text:list>
      <text:h text:style-name="P18" text:outline-level="4"><text:soft-page-break/>B. Academia de Formación "<text:span text:style-name="T30">E-Learn Innovate</text:span>" (Sector Educativo - Microempresa/Autónomos)</text:h>
      <text:list text:style-name="L7">
        <text:list-item>
          <text:p text:style-name="P35"><text:span text:style-name="T24">M</text:span><text:span text:style-name="T20">odelo de Negocio:</text:span> Plataforma de capacitación virtual y tutorías personalizadas. </text:p>
        </text:list-item>
        <text:list-item>
          <text:p text:style-name="P35"><text:span text:style-name="T24">N</text:span><text:span text:style-name="T20">ecesidad Operativa:</text:span> Fomentar hábitos de estudio eficientes, estructurados y saludables en un alumnado heterogéneo. </text:p>
        </text:list-item>
        <text:list-item>
          <text:p text:style-name="P41">Estructura Funcional e Integración:</text:p>
          <text:list>
            <text:list-item>
              <text:p text:style-name="P35"><text:span text:style-name="T33">C</text:span><text:span text:style-name="T29">oordinación Académica:</text:span> Diseña los planes de estudio y prescribe el uso de <text:span text:style-name="T20">Temporis</text:span> para la segmentación de contenidos en bloques de enfoque de 45 minutos. </text:p>
            </text:list-item>
            <text:list-item>
              <text:p text:style-name="P35"><text:span text:style-name="T33">D</text:span><text:span text:style-name="T29">epartamento de Tutorías:</text:span> Utiliza la configuración de accesibilidad dinámica de la aplicación para guiar a estudiantes con barreras visuales o cognitivas. </text:p>
            </text:list-item>
            <text:list-item>
              <text:p text:style-name="P35"><text:span text:style-name="T33">S</text:span><text:span text:style-name="T29">oporte Técnico:</text:span> Integra las guías y flujos de la aplicación en el manual de bienvenida del alumno. </text:p>
            </text:list-item>
          </text:list>
        </text:list-item>
      </text:list>
      <text:h text:style-name="P18" text:outline-level="4">C. Centro de Inclusión Laboral "<text:span text:style-name="T30">IntegraTech</text:span>" (Sector Social - Gran Empresa / Centro Especial de Empleo)</text:h>
      <text:list text:style-name="L8">
        <text:list-item>
          <text:p text:style-name="P36"><text:span text:style-name="T25">M</text:span><text:span text:style-name="T20">odelo de Negocio:</text:span> Servicios de externalización (<text:span text:style-name="T29">outsourcing</text:span>) de procesos de datos gestionados por personal con diversidad funcional. </text:p>
        </text:list-item>
        <text:list-item>
          <text:p text:style-name="P36"><text:span text:style-name="T25">N</text:span><text:span text:style-name="T20">ecesidad Operativa:</text:span> Herramientas de producción adaptadas al 100% que garanticen la igualdad de condiciones en el puesto de trabajo. </text:p>
        </text:list-item>
        <text:list-item>
          <text:p text:style-name="P42">Estructura Funcional e Integración:</text:p>
          <text:list>
            <text:list-item>
              <text:p text:style-name="P36"><text:span text:style-name="T34">U</text:span><text:span text:style-name="T29">nidad de Apoyo a la Inclusión:</text:span> Especialistas y psicólogos que adaptan los terminales; configuran el Alto Contraste y el Tamaño de Fuente dentro de <text:span text:style-name="T20">Temporis</text:span> según la necesidad del operario. </text:p>
            </text:list-item>
            <text:list-item>
              <text:p text:style-name="P36"><text:span text:style-name="T34">O</text:span><text:span text:style-name="T29">peraciones (Núcleo de Servicios):</text:span> Los trabajadores monitorizan el rendimiento y autogestionan sus descansos obligatorios. </text:p>
            </text:list-item>
            <text:list-item>
              <text:p text:style-name="P36"><text:span text:style-name="T34">R</text:span><text:span text:style-name="T29">ecursos Humanos:</text:span> Valora la seguridad del <text:span text:style-name="T30">Login</text:span> <text:span text:style-name="T30">Biométrico</text:span> para proteger datos sensibles de clientes y facilitar el acceso a usuarios con dificultades motoras.</text:p>
            </text:list-item>
          </text:list>
        </text:list-item>
      </text:list>
      <text:list xml:id="list1600856177370" text:continue-list="list1601337011564" text:style-name="WWNum19">
        <text:list-item>
          <text:list>
            <text:list-item>
              <text:h text:style-name="P13" text:outline-level="2"><text:bookmark-start text:name="_Toc212808597"/><text:soft-page-break/>Estudio de mercado<text:bookmark-end text:name="_Toc212808597"/></text:h>
            </text:list-item>
          </text:list>
        </text:list-item>
      </text:list>
      <text:p text:style-name="P44"><text:span text:style-name="T56">E</text:span>l estudio de mercado se ha estructurado mediante la técnica de <text:span text:style-name="T29">Benchmarking</text:span> y el diagnóstico estratégico para identificar el hueco de mercado óptimo del producto. </text:p>
      <text:h text:style-name="P16" text:outline-level="4">Evaluación de la Competencia (<text:span text:style-name="T30">Benchmarking</text:span>)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3"><text:span text:style-name="Strong_20_Emphasis"><text:span text:style-name="T39">Solución Competidora</text:span></text:span></text:p>
            </table:table-cell>
            <table:table-cell table:style-name="Tabla1.A1" office:value-type="string">
              <text:p text:style-name="P23"><text:span text:style-name="Strong_20_Emphasis"><text:span text:style-name="T39">Fortalezas Estratégicas</text:span></text:span></text:p>
            </table:table-cell>
            <table:table-cell table:style-name="Tabla1.A1" office:value-type="string">
              <text:p text:style-name="P23"><text:span text:style-name="Strong_20_Emphasis"><text:span text:style-name="T39">Debilidades Críticas</text:span></text:span></text:p>
            </table:table-cell>
          </table:table-row>
        </table:table-header-rows>
        <table:table-row>
          <table:table-cell table:style-name="Tabla1.A1" office:value-type="string">
            <text:p text:style-name="P24">Toggl Trac<text:span text:style-name="T55">k</text:span></text:p>
          </table:table-cell>
          <table:table-cell table:style-name="Tabla1.A1" office:value-type="string">
            <text:p text:style-name="P25"><text:span text:style-name="T58">E</text:span>cosistema multiplataforma muy maduro; herramientas corporativas completas. </text:p>
          </table:table-cell>
          <table:table-cell table:style-name="Tabla1.A1" office:value-type="string">
            <text:p text:style-name="P25"><text:bookmark text:name="p-rc_5b32ba17ee750c83-208"/>Interfaz excesivamente densa y compleja; accesibilidad nativa nula o muy limitada. <text:span text:style-name="T47"/></text:p>
          </table:table-cell>
        </table:table-row>
        <table:table-row>
          <table:table-cell table:style-name="Tabla1.A1" office:value-type="string">
            <text:p text:style-name="P24">Fores<text:span text:style-name="T55">t</text:span></text:p>
          </table:table-cell>
          <table:table-cell table:style-name="Tabla1.A1" office:value-type="string">
            <text:p text:style-name="P25"><text:span text:style-name="T58">E</text:span>xcelente nivel de gamificación; gancho psicológico de retención. </text:p>
          </table:table-cell>
          <table:table-cell table:style-name="Tabla1.A1" office:value-type="string">
            <text:p text:style-name="P25"><text:bookmark text:name="p-rc_5b32ba17ee750c83-211"/>Enfoque marcadamente lúdico; ineficaz para entornos corporativos o industriales formales. <text:span text:style-name="T47"/></text:p>
          </table:table-cell>
        </table:table-row>
        <table:table-row>
          <table:table-cell table:style-name="Tabla1.A1" office:value-type="string">
            <text:p text:style-name="P24">Clocki<text:span text:style-name="T57">f</text:span><text:bookmark text:name="p-rc_5b32ba17ee750c83-212"/><text:span text:style-name="T57">y</text:span></text:p>
          </table:table-cell>
          <table:table-cell table:style-name="Tabla1.A1" office:value-type="string">
            <text:p text:style-name="P25"><text:span text:style-name="T58">M</text:span>odelo gratuito y flexible para la gestión de equipos de trabajo. </text:p>
          </table:table-cell>
          <table:table-cell table:style-name="Tabla1.A1" office:value-type="string">
            <text:p text:style-name="P25"><text:bookmark text:name="p-rc_5b32ba17ee750c83-214"/>Privacidad de datos cuestionable; dependencia absoluta de conexión a internet continua. <text:span text:style-name="T47"/></text:p>
          </table:table-cell>
        </table:table-row>
        <table:table-row>
          <table:table-cell table:style-name="Tabla1.A1" office:value-type="string">
            <text:p text:style-name="P24">TEMPORI<text:bookmark text:name="p-rc_5b32ba17ee750c83-215"/><text:span text:style-name="T55">S</text:span></text:p>
          </table:table-cell>
          <table:table-cell table:style-name="Tabla1.A1" office:value-type="string">
            <text:p text:style-name="P25"><text:span text:style-name="T28">A</text:span><text:span text:style-name="T20">ccesibilidad nativa profunda, seguridad biométrica integrada y simplicidad conceptual extrema</text:span>. </text:p>
          </table:table-cell>
          <table:table-cell table:style-name="Tabla1.A1" office:value-type="string">
            <text:p text:style-name="P25"><text:bookmark text:name="p-rc_5b32ba17ee750c83-217"/>Producto de nueva marca en fase de despliegue inicial de Mínimo Producto Viable (MVP). <text:span text:style-name="T47"/></text:p>
          </table:table-cell>
        </table:table-row>
      </table:table>
      <text:h text:style-name="P16" text:outline-level="4">Matriz de Diagnóstico DAFO</text:h>
      <text:list text:style-name="L9">
        <text:list-item>
          <text:p text:style-name="P37"><text:span text:style-name="T26">D</text:span><text:span text:style-name="T20">ebilidades (D):</text:span> Marca nueva sin tracción previa en tiendas de aplicaciones; equipo de desarrollo unificado en un único desarrollador. </text:p>
        </text:list-item>
        <text:list-item>
          <text:p text:style-name="P37"><text:span text:style-name="T26">A</text:span><text:span text:style-name="T20">menazas (A):</text:span> Presencia de competidores consolidados con presupuestos masivos de marketing; alta velocidad de actualización de las APIs de accesibilidad base en Android. </text:p>
        </text:list-item>
        <text:list-item>
          <text:p text:style-name="P37"><text:soft-page-break/><text:span text:style-name="T27">F</text:span><text:span text:style-name="T20">ortalezas (F):</text:span> Arquitectura orientada al 100% a la inclusión (normativas WCAG); integración nativa reactiva con la suite de Google Firebase; bajo consumo de memoria y recursos en el dispositivo móvil. </text:p>
        </text:list-item>
        <text:list-item>
          <text:p text:style-name="P37"><text:span text:style-name="T27">O</text:span><text:span text:style-name="T20">portunidades (O):</text:span> Adopción masiva del teletrabajo y la autogestión de tareas; endurecimiento de las normativas legales internacionales de inclusión laboral; auge en el consumo de aplicaciones de bienestar y salud mental. </text:p>
        </text:list-item>
      </text:list>
      <text:p text:style-name="P44"/>
      <text:p text:style-name="Standard"/>
      <text:p text:style-name="Standard"/>
      <text:p text:style-name="Standard"/>
      <text:p text:style-name="Standard"/>
      <text:p text:style-name="Standard"/>
      <text:list text:continue-list="list1600856177370" text:style-name="WWNum19">
        <text:list-item>
          <text:list>
            <text:list-item>
              <text:h text:style-name="P13" text:outline-level="2"><text:bookmark-start text:name="_Toc212808598"/>Innovación, dificultad e investigación<text:bookmark-end text:name="_Toc212808598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9">
        <text:list-item>
          <text:list>
            <text:list-item>
              <text:h text:style-name="P13" text:outline-level="2"><text:bookmark-start text:name="_Toc212808599"/>Ayudas y subvenciones<text:bookmark-end text:name="_Toc212808599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9">
        <text:list-item>
          <text:list>
            <text:list-item>
              <text:h text:style-name="P13" text:outline-level="2"><text:bookmark-start text:name="_Toc212808600"/>Especificación de requisitos<text:bookmark-end text:name="_Toc212808600"/></text:h>
            </text:list-item>
          </text:list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Standard"/>
      <text:list text:continue-numbering="true" text:style-name="WWNum19">
        <text:list-item>
          <text:list>
            <text:list-item>
              <text:h text:style-name="P13" text:outline-level="2"><text:bookmark-start text:name="_Toc212808601"/>Casos de uso<text:bookmark-end text:name="_Toc212808601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9">
        <text:list-item>
          <text:list>
            <text:list-item>
              <text:h text:style-name="P13" text:outline-level="2"><text:bookmark-start text:name="_Toc212808602"/>Bocetos de interfaz<text:bookmark-end text:name="_Toc212808602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4"/>
      <text:list text:continue-numbering="true" text:style-name="WWNum19">
        <text:list-item>
          <text:h text:style-name="P12" text:outline-level="1"><text:bookmark-start text:name="_Toc212808603"/>Diseño de la aplicación<text:bookmark-end text:name="_Toc212808603"/></text:h>
        </text:list-item>
      </text:list>
      <text:p text:style-name="P5"/>
      <text:list text:continue-numbering="true" text:style-name="WWNum19">
        <text:list-item>
          <text:list>
            <text:list-item>
              <text:h text:style-name="P13" text:outline-level="2"><text:bookmark-start text:name="_Toc212808604"/>Estudio de viabilidad<text:bookmark-end text:name="_Toc212808604"/></text:h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text:continue-numbering="true" text:style-name="WWNum19">
        <text:list-item>
          <text:list>
            <text:list-item>
              <text:h text:style-name="P13" text:outline-level="2"><text:bookmark-start text:name="_Toc212808605"/>Planificación, ciclo de vida y diagrama Gantt<text:bookmark-end text:name="_Toc212808605"/></text:h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WWNum19">
        <text:list-item>
          <text:list>
            <text:list-item>
              <text:h text:style-name="P13" text:outline-level="2"><text:bookmark-start text:name="_Toc212808606"/>Entidad Relación<text:bookmark-end text:name="_Toc212808606"/></text:h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WWNum19">
        <text:list-item>
          <text:list>
            <text:list-item>
              <text:h text:style-name="P13" text:outline-level="2"><text:bookmark-start text:name="_Toc212808607"/>Esquema Relacional<text:bookmark-end text:name="_Toc212808607"/></text:h>
            </text:list-item>
          </text:list>
        </text:list-item>
      </text:list>
      <text:p text:style-name="P5"/>
      <text:p text:style-name="P5"/>
      <text:p text:style-name="P5"><text:soft-page-break/></text:p>
      <text:p text:style-name="P5"/>
      <text:p text:style-name="P5"/>
      <text:list text:continue-numbering="true" text:style-name="WWNum19">
        <text:list-item>
          <text:list>
            <text:list-item>
              <text:h text:style-name="P13" text:outline-level="2"><text:bookmark-start text:name="_Toc212808608"/>Diagrama de Clases<text:bookmark-end text:name="_Toc212808608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9">
        <text:list-item>
          <text:list>
            <text:list-item>
              <text:h text:style-name="P13" text:outline-level="2"><text:bookmark-start text:name="_Toc212808609"/>Diseño de Interfaces<text:bookmark-end text:name="_Toc212808609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9">
        <text:list-item>
          <text:list>
            <text:list-item>
              <text:h text:style-name="P13" text:outline-level="2"><text:bookmark-start text:name="_Toc212808610"/>Plan de Pruebas<text:bookmark-end text:name="_Toc212808610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 loext:marker-style-name="T16"><text:bookmark-start text:name="_Toc212808611"/><text:soft-page-break/></text:p>
      <text:list text:continue-numbering="true" text:style-name="WWNum19">
        <text:list-item>
          <text:h text:style-name="P12" text:outline-level="1">Gestión de proyecto - Planificación<text:bookmark-end text:name="_Toc212808611"/></text:h>
        </text:list-item>
      </text:list>
      <text:p text:style-name="P5"/>
      <text:list text:continue-numbering="true" text:style-name="WWNum19">
        <text:list-item>
          <text:list>
            <text:list-item>
              <text:h text:style-name="P13" text:outline-level="2"><text:bookmark-start text:name="_Toc212808612"/>Planificación Proyecto - Scrum<text:bookmark-end text:name="_Toc212808612"/></text:h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 loext:marker-style-name="T16"><text:bookmark-start text:name="_Toc212808613"/></text:p>
      <text:list text:continue-numbering="true" text:style-name="WWNum19">
        <text:list-item>
          <text:h text:style-name="P12" text:outline-level="1">Gestión del proyecto - Seguimiento<text:bookmark-end text:name="_Toc212808613"/></text:h>
        </text:list-item>
      </text:list>
      <text:p text:style-name="P5"/>
      <text:list text:continue-numbering="true" text:style-name="WWNum19">
        <text:list-item>
          <text:list>
            <text:list-item>
              <text:h text:style-name="P13" text:outline-level="2"><text:bookmark-start text:name="_Toc212808614"/>Seguimiento Proyecto - Scrum<text:bookmark-end text:name="_Toc212808614"/></text:h>
            </text:list-item>
          </text:list>
        </text:list-item>
      </text:list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Google Sans Text" svg:font-family="'Google Sans Text', sans-serif"/>
    <style:font-face style:name="Google Sans1" svg:font-family="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fo:color="#404040" loext:opacity="100%" fo:font-size="12pt" style:font-size-asian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cm" fo:margin-bottom="0cm" style:contextual-spacing="false" fo:keep-together="always" fo:padding-left="0cm" fo:padding-right="0cm" fo:padding-top="0cm" fo:padding-bottom="0.035cm" fo:border-left="none" fo:border-right="none" fo:border-top="none" fo:border-bottom="0.99pt solid #31849b" fo:keep-with-next="always"/>
      <style:text-properties fo:color="#984806" loext:opacity="100%" style:font-name="Consolas" fo:font-family="Consolas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984806" loext:opacity="100%" style:font-name="Consolas" fo:font-family="Consolas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_20_Spacing" style:display-name="No Spacing" style:family="paragraph">
      <loext:graphic-properties draw:fill="solid" draw:fill-color="#fafafa"/>
      <style:paragraph-properties fo:margin-top="0cm" fo:margin-bottom="0.353cm" style:contextual-spacing="false" fo:line-height="115%" fo:text-align="justify" style:justify-single-word="false" fo:orphans="2" fo:widows="2" fo:background-color="#fafafa" fo:padding-left="0.141cm" fo:padding-right="0.141cm" fo:padding-top="0.035cm" fo:padding-bottom="0.035cm" fo:border-left="2.24pt solid #95b3d7" fo:border-right="0.99pt solid #95b3d7" fo:border-top="0.99pt solid #95b3d7" fo:border-bottom="0.99pt solid #95b3d7" style:shadow="none" style:writing-mode="lr-tb"/>
      <style:text-properties fo:color="#595959" loext:opacity="100%" fo:font-size="18pt" style:font-size-asian="18pt">
        <loext:char-complex-color loext:theme-type="dark1" loext:color-type="theme">
          <loext:transformation loext:type="tint" loext:value="3490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text-align="start" style:justify-single-word="false"/>
      <style:text-properties fo:color="#365f91" loext:opacity="100%" style:font-name="Cambria" fo:font-family="Cambria" style:font-family-generic="roman" style:font-pitch="variable" fo:font-size="14pt" style:font-size-asian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cm"/>
          <style:tab-stop style:position="15.503cm" style:type="right" style:leader-style="dotted" style:leader-text="."/>
        </style:tab-stops>
      </style:paragraph-properties>
      <style:text-properties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use-window-font-color="true" loext:opacity="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>
        <style:tab-stops>
          <style:tab-stop style:position="1.251cm"/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984806" loext:opacity="100%" style:font-name="Consolas" fo:font-family="Consolas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xto_20_de_20_globo_20_Car" style:display-name="Texto de globo Car" style:family="text" style:parent-style-name="Default_20_Paragraph_20_Font" loext:linked-style-name="Balloon_20_Text">
      <style:text-properties fo:color="#40404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984806" loext:opacity="100%" style:font-name="Consolas" fo:font-family="Consolas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6" loext:color-type="theme">
          <loext:transformation loext:type="shade" loext:value="4980"/>
        </loext:char-complex-color>
      </style:text-properties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'Courier New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66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67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68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9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0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71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R.A.0%1%." style:num-prefix="R.A.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MP2" style:family="paragraph" style:parent-style-name="Footer">
      <style:text-properties style:font-name="Consolas1" fo:font-weight="bold" officeooo:rsid="0010ca43" officeooo:paragraph-rsid="0010ca43" style:font-weight-asian="bold" style:font-weight-complex="bold"/>
    </style:style>
    <style:style style:name="MP3" style:family="paragraph" style:parent-style-name="Frame_20_contents">
      <style:paragraph-properties fo:text-align="end" style:justify-single-word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Consolas" fo:font-size="11pt" fo:font-weight="bold" style:font-size-asian="11pt" style:font-weight-asian="bold" style:font-size-complex="20pt"/>
    </style:style>
    <style:style style:name="MT2" style:family="text">
      <style:text-properties fo:color="#7f7f7f" loext:opacity="100%" style:font-name="Consolas" fo:font-size="11pt" fo:font-weight="bold" style:font-size-asian="11pt" style:font-weight-asian="bold" style:font-size-complex="20pt">
        <loext:char-complex-color loext:theme-type="dark1" loext:color-type="theme">
          <loext:transformation loext:type="tint" loext:value="4980"/>
        </loext:char-complex-color>
      </style:text-properties>
    </style:style>
    <style:style style:name="MT3" style:family="text">
      <style:text-properties style:font-name="Consolas"/>
    </style:style>
    <style:style style:name="MT4" style:family="text">
      <style:text-properties style:font-name="Consolas" fo:font-size="16pt" style:font-size-asian="16pt"/>
    </style:style>
    <style:style style:name="MT5" style:family="text">
      <style:text-properties fo:color="#7f7f7f" loext:opacity="100%" style:font-name="Consolas" fo:font-size="7pt" style:font-size-asian="7pt">
        <loext:char-complex-color loext:theme-type="dark1" loext:color-type="theme">
          <loext:transformation loext:type="tint" loext:value="4980"/>
        </loext:char-complex-color>
      </style:text-properties>
    </style:style>
    <style:style style:name="MT6" style:family="text">
      <style:text-properties fo:color="#7f7f7f" loext:opacity="100%" style:font-name="Consolas">
        <loext:char-complex-color loext:theme-type="dark1" loext:color-type="theme">
          <loext:transformation loext:type="tint" loext:value="4980"/>
        </loext:char-complex-color>
      </style:text-properties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40%" draw:contrast="0%" draw:gamma="100%" draw:red="0%" draw:green="0%" draw:blue="0%" fo:clip="rect(0cm, 0cm, 0cm, 0cm)" draw:image-opacity="100%" style:mirror="none" loext:decorative="false" fo:margin-left="0.37cm" fo:margin-right="0.305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701cm" fo:margin-right="1.69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royecto </text:span><text:span text:style-name="MT2">desarrollo de aplicaciones multiplataforma</text:span></text:p>
        <text:p text:style-name="Header"/>
      </style:header>
      <style:header-first>
        <text:p text:style-name="Header"/>
      </style:header-first>
      <style:footer>
        <text:p text:style-name="MP2"><draw:frame draw:style-name="Mfr1" draw:name="Marco3" text:anchor-type="char" svg:x="15.132cm" svg:y="-0.353cm" svg:width="2.609cm" svg:height="1.037cm" draw:z-index="20"><draw:text-box><text:p text:style-name="MP3" loext:marker-style-name="MT3"><text:span text:style-name="MT4"><text:page-number text:select-page="current">13</text:page-number></text:span><text:span text:style-name="MT5"><text:s/></text:span><text:span text:style-name="MT6">| </text:span><text:span text:style-name="MT6"><text:page-count>13</text:page-count></text:span></text:p></draw:text-box></draw:frame><draw:frame text:anchor-type="char" draw:z-index="11" draw:name="Imagen 5" draw:style-name="Mgr1" draw:text-style-name="MP4" svg:width="3.611cm" svg:height="1.257cm" svg:x="11.285cm" svg:y="-0.39cm"><draw:image xlink:href="Pictures/10000001000002AE000000B55E2BA277.png" xlink:type="simple" xlink:show="embed" xlink:actuate="onLoad" draw:mime-type="image/png"><text:p/></draw:image><svg:desc>LOGOTIPO</svg:desc></draw:frame>Kevin Zamora Amela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89</meta:editing-cycles>
    <meta:print-date>2025-01-06T10:08:00</meta:print-date>
    <meta:creation-date>2025-09-03T11:28:00</meta:creation-date>
    <dc:date>2026-06-05T00:15:59.859562731</dc:date>
    <meta:editing-duration>PT5H25M51S</meta:editing-duration>
    <meta:generator>LibreOffice/24.2.7.2$Linux_X86_64 LibreOffice_project/420$Build-2</meta:generator>
    <meta:document-statistic meta:table-count="1" meta:image-count="1" meta:object-count="0" meta:page-count="13" meta:paragraph-count="107" meta:word-count="1286" meta:character-count="8772" meta:non-whitespace-character-count="7609"/>
    <meta:user-defined meta:name="AppVersion">12.0000</meta:user-defined>
    <meta:template xlink:type="simple" xlink:actuate="onRequest" xlink:title="Normal" xlink:href=""/>
  </office:meta>
</office:document-meta>
</file>
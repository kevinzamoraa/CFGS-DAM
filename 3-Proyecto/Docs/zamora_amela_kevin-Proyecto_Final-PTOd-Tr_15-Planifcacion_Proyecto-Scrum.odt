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0000001B04AB7F5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P2" style:family="paragraph" style:parent-style-name="Standard">
      <style:paragraph-properties fo:text-align="start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MathJax_Typewriter" style:text-underline-style="solid" style:text-underline-width="auto" style:text-underline-color="font-color" fo:font-weight="normal" officeooo:rsid="00cc3084" officeooo:paragraph-rsid="00cc3084" style:font-weight-asian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 fo:padding="0cm" fo:border="none"/>
      <style:text-properties style:font-name="Liberation Serif"/>
    </style:style>
    <style:style style:name="P5" style:family="paragraph" style:parent-style-name="Heading_20_2">
      <style:paragraph-properties fo:line-height="150%" fo:text-align="center" style:justify-single-word="false" fo:keep-with-next="always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86b18" officeooo:paragraph-rsid="02434674" style:font-size-asian="15pt" style:font-weight-asian="normal" style:font-size-complex="15pt" style:font-weight-complex="normal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Heading_20_4">
      <style:paragraph-properties fo:text-align="center" style:justify-single-word="false" fo:keep-with-next="always"/>
      <style:text-properties style:font-name="MathJax_Typewriter" style:text-underline-style="solid" style:text-underline-width="auto" style:text-underline-color="font-color" officeooo:paragraph-rsid="02b99699"/>
    </style:style>
    <style:style style:name="P8" style:family="paragraph" style:parent-style-name="Heading_20_4">
      <style:paragraph-properties fo:margin-top="0.212cm" fo:margin-bottom="0.212cm" style:contextual-spacing="false" fo:text-align="center" style:justify-single-word="false"/>
      <style:text-properties fo:font-weight="bold" style:font-weight-asian="bold" style:font-weight-complex="bold"/>
    </style:style>
    <style:style style:name="P9" style:family="paragraph" style:parent-style-name="Heading_20_4">
      <style:paragraph-properties fo:margin-top="0.212cm" fo:margin-bottom="0.212cm" style:contextual-spacing="false" fo:text-align="center" style:justify-single-word="false"/>
      <style:text-properties fo:font-weight="bold" officeooo:paragraph-rsid="02b99699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officeooo:paragraph-rsid="02a358aa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 style:list-style-name="L3">
      <style:paragraph-properties fo:text-align="justify" style:justify-single-word="false"/>
    </style:style>
    <style:style style:name="P13" style:family="paragraph" style:parent-style-name="Text_20_body" style:list-style-name="L8">
      <style:paragraph-properties fo:text-align="justify" style:justify-single-word="false"/>
    </style:style>
    <style:style style:name="P14" style:family="paragraph" style:parent-style-name="Text_20_body" style:list-style-name="L8">
      <style:paragraph-properties fo:text-align="justify" style:justify-single-word="false"/>
      <style:text-properties officeooo:paragraph-rsid="02b21a47"/>
    </style:style>
    <style:style style:name="P15" style:family="paragraph" style:parent-style-name="Text_20_body" style:list-style-name="L8">
      <style:paragraph-properties fo:text-align="justify" style:justify-single-word="false"/>
      <style:text-properties officeooo:paragraph-rsid="02b99699"/>
    </style:style>
    <style:style style:name="P16" style:family="paragraph" style:parent-style-name="Text_20_body" style:list-style-name="L8">
      <style:paragraph-properties fo:margin-top="0.402cm" fo:margin-bottom="0.649cm" style:contextual-spacing="false" fo:text-align="justify" style:justify-single-word="false"/>
      <style:text-properties officeooo:paragraph-rsid="02b99699"/>
    </style:style>
    <style:style style:name="P17" style:family="paragraph" style:parent-style-name="Text_20_body" style:list-style-name="L8">
      <style:paragraph-properties fo:margin-top="0.302cm" fo:margin-bottom="0.549cm" style:contextual-spacing="false" fo:text-align="justify" style:justify-single-word="false"/>
    </style:style>
    <style:style style:name="P18" style:family="paragraph" style:parent-style-name="Text_20_body" style:list-style-name="L8">
      <style:paragraph-properties fo:margin-top="0cm" fo:margin-bottom="0cm" style:contextual-spacing="false" fo:text-align="justify" style:justify-single-word="false"/>
      <style:text-properties officeooo:paragraph-rsid="02bcef5b"/>
    </style:style>
    <style:style style:name="P19" style:family="paragraph" style:parent-style-name="Text_20_body" style:list-style-name="L8">
      <style:paragraph-properties fo:margin-top="0cm" fo:margin-bottom="0.247cm" style:contextual-spacing="false" fo:text-align="justify" style:justify-single-word="false"/>
    </style:style>
    <style:style style:name="P20" style:family="paragraph" style:parent-style-name="Text_20_body" style:list-style-name="L8">
      <style:paragraph-properties fo:margin-top="0.804cm" fo:margin-bottom="1.051cm" style:contextual-spacing="false" fo:text-align="justify" style:justify-single-word="false"/>
    </style:style>
    <style:style style:name="P21" style:family="paragraph" style:parent-style-name="Text_20_body">
      <style:paragraph-properties fo:margin-top="0.101cm" fo:margin-bottom="0.347cm" style:contextual-spacing="false" fo:text-align="justify" style:justify-single-word="false"/>
      <style:text-properties officeooo:paragraph-rsid="02bcef5b"/>
    </style:style>
    <style:style style:name="P22" style:family="paragraph" style:parent-style-name="Text_20_body" style:list-style-name="L5">
      <style:paragraph-properties fo:text-align="justify" style:justify-single-word="false"/>
    </style:style>
    <style:style style:name="P23" style:family="paragraph" style:parent-style-name="Text_20_body" style:list-style-name="L3">
      <style:paragraph-properties fo:text-align="justify" style:justify-single-word="false"/>
      <style:text-properties fo:font-weight="bold"/>
    </style:style>
    <style:style style:name="P24" style:family="paragraph" style:parent-style-name="Text_20_body" style:list-style-name="L5">
      <style:text-properties fo:font-weight="bold"/>
    </style:style>
    <style:style style:name="P25" style:family="paragraph" style:parent-style-name="Text_20_body" style:list-style-name="L6">
      <style:text-properties fo:font-weight="bold"/>
    </style:style>
    <style:style style:name="P26" style:family="paragraph" style:parent-style-name="Text_20_body" style:list-style-name="L7">
      <style:text-properties fo:font-weight="bold"/>
    </style:style>
    <style:style style:name="P27" style:family="paragraph" style:parent-style-name="Text_20_body" style:list-style-name="L8">
      <style:paragraph-properties fo:margin-top="0.101cm" fo:margin-bottom="0.247cm" style:contextual-spacing="false"/>
      <style:text-properties fo:font-weight="bold"/>
    </style:style>
    <style:style style:name="P28" style:family="paragraph" style:parent-style-name="Text_20_body" style:list-style-name="L8">
      <style:paragraph-properties fo:margin-top="0.101cm" fo:margin-bottom="0.247cm" style:contextual-spacing="false"/>
      <style:text-properties fo:font-weight="bold" officeooo:paragraph-rsid="02b99699"/>
    </style:style>
    <style:style style:name="P29" style:family="paragraph" style:parent-style-name="Text_20_body" style:list-style-name="L5"/>
    <style:style style:name="P30" style:family="paragraph" style:parent-style-name="Text_20_body" style:list-style-name="L6"/>
    <style:style style:name="P31" style:family="paragraph" style:parent-style-name="Text_20_body" style:list-style-name="L7"/>
    <style:style style:name="P32" style:family="paragraph" style:parent-style-name="Text_20_body" style:list-style-name="L8">
      <style:paragraph-properties fo:margin-top="0.302cm" fo:margin-bottom="0.549cm" style:contextual-spacing="false"/>
      <style:text-properties officeooo:paragraph-rsid="02b99699"/>
    </style:style>
    <style:style style:name="P33" style:family="paragraph" style:parent-style-name="Text_20_body">
      <style:paragraph-properties fo:text-align="justify" style:justify-single-word="false"/>
      <style:text-properties officeooo:rsid="02aaa695" officeooo:paragraph-rsid="02aaa695"/>
    </style:style>
    <style:style style:name="P34" style:family="paragraph">
      <style:paragraph-properties fo:text-align="center"/>
    </style:style>
    <style:style style:name="P35" style:family="paragraph">
      <loext:graphic-properties draw:fill="none" draw:fill-color="#ffffff"/>
      <style:paragraph-properties fo:text-align="center"/>
      <style:text-properties style:font-name="MathJax_SansSerif" fo:font-size="40pt" style:font-size-asian="40pt" style:font-size-complex="40pt"/>
    </style:style>
    <style:style style:name="P36" style:family="paragraph">
      <loext:graphic-properties draw:fill="none" draw:fill-color="#ffffff"/>
      <style:paragraph-properties fo:text-align="center"/>
      <style:text-properties style:font-name="MathJax_Typewriter" fo:font-size="26pt" style:font-size-asian="26pt" style:font-size-complex="26pt"/>
    </style:style>
    <style:style style:name="P37" style:family="paragraph">
      <loext:graphic-properties draw:fill="none" draw:fill-color="#ffffff"/>
      <style:paragraph-properties fo:text-align="center"/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P38" style:family="paragraph">
      <loext:graphic-properties draw:fill="solid" draw:fill-color="#dedce6"/>
      <style:paragraph-properties style:writing-mode="lr-tb"/>
    </style:style>
    <style:style style:name="P39" style:family="paragraph">
      <loext:graphic-properties draw:fill-color="#ffffff"/>
      <style:paragraph-properties fo:text-align="center"/>
    </style:style>
    <style:style style:name="T1" style:family="text">
      <style:text-properties style:font-name="MathJax_Typewriter" fo:font-size="15pt" fo:font-weight="normal" officeooo:rsid="0203eef7" style:font-size-asian="15pt" style:font-weight-asian="normal" style:font-size-complex="15pt" style:font-weight-complex="normal"/>
    </style:style>
    <style:style style:name="T2" style:family="text">
      <style:text-properties style:font-name="MathJax_Typewriter" fo:font-size="15pt" fo:font-weight="normal" officeooo:rsid="018c626a" style:font-size-asian="15pt" style:font-weight-asian="normal" style:font-size-complex="15pt" style:font-weight-complex="normal"/>
    </style:style>
    <style:style style:name="T3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T4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style style:name="T5" style:family="text">
      <style:text-properties fo:font-weight="bold"/>
    </style:style>
    <style:style style:name="T6" style:family="text">
      <style:text-properties fo:font-weight="bold" officeooo:rsid="02a0362d"/>
    </style:style>
    <style:style style:name="T7" style:family="text">
      <style:text-properties fo:font-weight="bold" officeooo:rsid="02b513e8" style:font-weight-asian="bold" style:font-weight-complex="bold"/>
    </style:style>
    <style:style style:name="T8" style:family="text">
      <style:text-properties fo:font-weight="bold" officeooo:rsid="02b82856" style:font-weight-asian="bold" style:font-weight-complex="bold"/>
    </style:style>
    <style:style style:name="T9" style:family="text">
      <style:text-properties fo:font-weight="bold" officeooo:rsid="02bcef5b"/>
    </style:style>
    <style:style style:name="T10" style:family="text">
      <style:text-properties fo:font-weight="bold" officeooo:rsid="02cf7fba"/>
    </style:style>
    <style:style style:name="T11" style:family="text">
      <style:text-properties style:text-underline-style="none"/>
    </style:style>
    <style:style style:name="T12" style:family="text">
      <style:text-properties fo:color="#000000" loext:opacity="100%" fo:font-size="15pt" style:font-size-asian="15pt" style:font-size-complex="15pt"/>
    </style:style>
    <style:style style:name="T13" style:family="text">
      <style:text-properties fo:font-style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2a2311e" style:font-style-asian="italic" style:font-style-complex="italic"/>
    </style:style>
    <style:style style:name="T16" style:family="text">
      <style:text-properties fo:font-style="italic" officeooo:rsid="02abd977" style:font-style-asian="italic" style:font-style-complex="italic"/>
    </style:style>
    <style:style style:name="T17" style:family="text">
      <style:text-properties fo:font-style="italic" officeooo:rsid="02ac6913" style:font-style-asian="italic" style:font-style-complex="italic"/>
    </style:style>
    <style:style style:name="T18" style:family="text">
      <style:text-properties fo:font-style="italic" officeooo:rsid="02c5df56" style:font-style-asian="italic" style:font-style-complex="italic"/>
    </style:style>
    <style:style style:name="T19" style:family="text">
      <style:text-properties fo:font-style="italic" officeooo:rsid="02c8c348" style:font-style-asian="italic" style:font-style-complex="italic"/>
    </style:style>
    <style:style style:name="T20" style:family="text">
      <style:text-properties fo:font-style="italic" officeooo:rsid="02cfd2e7" style:font-style-asian="italic" style:font-style-complex="italic"/>
    </style:style>
    <style:style style:name="T21" style:family="text">
      <style:text-properties fo:font-style="italic" officeooo:rsid="02d30ac1" style:font-style-asian="italic" style:font-style-complex="italic"/>
    </style:style>
    <style:style style:name="T22" style:family="text">
      <style:text-properties fo:font-style="italic" officeooo:rsid="02e18ebb" style:font-style-asian="italic" style:font-style-complex="italic"/>
    </style:style>
    <style:style style:name="T23" style:family="text">
      <style:text-properties fo:font-style="italic" fo:font-weight="bold" officeooo:rsid="02bcef5b" style:font-style-asian="italic" style:font-style-complex="italic"/>
    </style:style>
    <style:style style:name="T24" style:family="text">
      <style:text-properties officeooo:rsid="02a0362d"/>
    </style:style>
    <style:style style:name="T25" style:family="text">
      <style:text-properties officeooo:rsid="02a358aa"/>
    </style:style>
    <style:style style:name="T26" style:family="text">
      <style:text-properties officeooo:rsid="02a67b7f"/>
    </style:style>
    <style:style style:name="T27" style:family="text">
      <style:text-properties style:font-name="MathJax_Typewriter"/>
    </style:style>
    <style:style style:name="T28" style:family="text">
      <style:text-properties style:font-name="MathJax_Typewriter" style:text-underline-style="solid" style:text-underline-width="auto" style:text-underline-color="font-color"/>
    </style:style>
    <style:style style:name="T29" style:family="text">
      <style:text-properties style:font-name="MathJax_Typewriter" style:text-underline-style="solid" style:text-underline-width="auto" style:text-underline-color="font-color" officeooo:rsid="02bb3e73"/>
    </style:style>
    <style:style style:name="T30" style:family="text">
      <style:text-properties style:font-name="MathJax_Typewriter" style:text-underline-style="solid" style:text-underline-width="auto" style:text-underline-color="font-color" officeooo:rsid="02bb588e"/>
    </style:style>
    <style:style style:name="T31" style:family="text">
      <style:text-properties style:font-name="MathJax_Typewriter" officeooo:rsid="02b58d36"/>
    </style:style>
    <style:style style:name="T32" style:family="text">
      <style:text-properties style:font-name="MathJax_Typewriter" fo:font-style="italic" style:text-underline-style="solid" style:text-underline-width="auto" style:text-underline-color="font-color" style:font-style-asian="italic" style:font-style-complex="italic"/>
    </style:style>
    <style:style style:name="T33" style:family="text">
      <style:text-properties style:font-name="MathJax_Typewriter" officeooo:rsid="02da256d"/>
    </style:style>
    <style:style style:name="T34" style:family="text">
      <style:text-properties style:font-name="MathJax_Typewriter" officeooo:rsid="02dcaf04"/>
    </style:style>
    <style:style style:name="T35" style:family="text">
      <style:text-properties officeooo:rsid="02abd977"/>
    </style:style>
    <style:style style:name="T36" style:family="text">
      <style:text-properties officeooo:rsid="02ac6913"/>
    </style:style>
    <style:style style:name="T37" style:family="text">
      <style:text-properties officeooo:rsid="02af86f5"/>
    </style:style>
    <style:style style:name="T38" style:family="text">
      <style:text-properties officeooo:rsid="02b58d36"/>
    </style:style>
    <style:style style:name="T39" style:family="text">
      <style:text-properties style:font-name="Liberation Serif"/>
    </style:style>
    <style:style style:name="T40" style:family="text">
      <style:text-properties style:font-name="Liberation Serif" officeooo:rsid="02b58d36"/>
    </style:style>
    <style:style style:name="T41" style:family="text">
      <style:text-properties style:font-name="Liberation Serif" officeooo:rsid="02da256d"/>
    </style:style>
    <style:style style:name="T42" style:family="text">
      <style:text-properties style:font-name="Liberation Serif" officeooo:rsid="02dcaf04"/>
    </style:style>
    <style:style style:name="T43" style:family="text">
      <style:text-properties officeooo:rsid="02b6aef1"/>
    </style:style>
    <style:style style:name="T44" style:family="text">
      <style:text-properties officeooo:rsid="02b82856"/>
    </style:style>
    <style:style style:name="T45" style:family="text">
      <style:text-properties officeooo:rsid="02bdd420"/>
    </style:style>
    <style:style style:name="T46" style:family="text">
      <style:text-properties officeooo:rsid="02bf64f4"/>
    </style:style>
    <style:style style:name="T47" style:family="text">
      <style:text-properties officeooo:rsid="02c12b95"/>
    </style:style>
    <style:style style:name="T48" style:family="text">
      <style:text-properties officeooo:rsid="02c32b4a"/>
    </style:style>
    <style:style style:name="T49" style:family="text">
      <style:text-properties officeooo:rsid="02c5df56"/>
    </style:style>
    <style:style style:name="T50" style:family="text">
      <style:text-properties officeooo:rsid="02cb9335"/>
    </style:style>
    <style:style style:name="T51" style:family="text">
      <style:text-properties officeooo:rsid="02ccb9d6"/>
    </style:style>
    <style:style style:name="T52" style:family="text">
      <style:text-properties officeooo:rsid="02cfd2e7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officeooo:rsid="02d30ac1"/>
    </style:style>
    <style:style style:name="T55" style:family="text">
      <style:text-properties officeooo:rsid="02d6b94c"/>
    </style:style>
    <style:style style:name="T56" style:family="text">
      <style:text-properties officeooo:rsid="02e0959e"/>
    </style:style>
    <style:style style:name="T57" style:family="text">
      <style:text-properties officeooo:rsid="02e18ebb"/>
    </style:style>
    <style:style style:name="T58" style:family="text">
      <style:text-properties style:font-name="MathJax_SansSerif" fo:font-size="40pt" style:text-underline-style="none" fo:font-weight="bold" style:font-size-asian="40pt" style:font-weight-asian="bold" style:font-size-complex="40pt" style:font-weight-complex="bold"/>
    </style:style>
    <style:style style:name="T59" style:family="text">
      <style:text-properties style:font-name="MathJax_Typewriter" fo:font-size="26pt" style:text-underline-style="none" style:font-size-asian="26pt" style:font-size-complex="26pt"/>
    </style:style>
    <style:style style:name="T60" style:family="text"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1.4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3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29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55308d" draw:fill="solid" draw:fill-color="#dedce6" draw:textarea-horizontal-align="justify" draw:textarea-vertical-align="middle" draw:auto-grow-height="false" fo:min-height="29.794cm" fo:min-width="10.6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2.448cm" fo:min-width="2.4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Forma 1" draw:style-name="gr4" draw:text-style-name="P38" svg:width="10.699cm" svg:height="29.795cm" svg:x="-2.833cm" svg:y="-2.82cm"><text:p/><draw:enhanced-geometry svg:viewBox="0 0 21600 21600" draw:type="rectangle" draw:enhanced-path="M 0 0 L 21600 0 21600 21600 0 21600 0 0 Z N"/></draw:custom-shape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draw:frame draw:style-name="fr1" draw:name="Imagen2" text:anchor-type="char" svg:x="-0.647cm" svg:y="0.125cm" svg:width="7.987cm" svg:height="7.987cm" draw:z-index="2"><draw:image xlink:href="Pictures/10000001000001B0000001B04AB7F566.png" xlink:type="simple" xlink:show="embed" xlink:actuate="onLoad" draw:mime-type="image/png"/></draw:frame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draw:frame text:anchor-type="paragraph" draw:z-index="3" draw:name="Marco de texto 1" draw:style-name="gr3" draw:text-style-name="P37" svg:width="9.129cm" svg:height="4.296cm" svg:x="1.757cm" svg:y="0.247cm"><draw:text-box><text:p text:style-name="P34"><text:span text:style-name="T60">Planificación </text:span><text:span text:style-name="T60">del Proyecto - </text:span><text:span text:style-name="T60">Scrum</text:span></text:p></draw:text-box></draw:frame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draw:frame text:anchor-type="paragraph" draw:z-index="5" draw:name="Marco de texto 3" draw:style-name="gr1" draw:text-style-name="P35" svg:width="7.873cm" svg:height="1.414cm" svg:x="-0.6cm" svg:y="0.312cm"><draw:text-box><text:p text:style-name="P34"><text:span text:style-name="T58">Temporis:</text:span></text:p></draw:text-box></draw:frame><text:span text:style-name="T11"/></text:p>
      <text:p text:style-name="P2"><text:span text:style-name="T11"/></text:p>
      <text:p text:style-name="P2"><text:span text:style-name="T11"/></text:p>
      <text:p text:style-name="P2"><draw:frame text:anchor-type="paragraph" draw:z-index="4" draw:name="Marco de texto 2" draw:style-name="gr2" draw:text-style-name="P36" svg:width="7.839cm" svg:height="4.329cm" svg:x="-0.563cm" svg:y="0.381cm"><draw:text-box><text:p text:style-name="P34"><text:span text:style-name="T59">Una herramienta </text:span><text:span text:style-name="T59">accesible para el </text:span><text:span text:style-name="T59">control y la </text:span><text:span text:style-name="T59">optimización de </text:span><text:span text:style-name="T59">nuestro tiempo</text:span></text:p></draw:text-box></draw:frame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draw:custom-shape text:anchor-type="paragraph" draw:z-index="0" draw:name="Forma 2" draw:style-name="gr5" draw:text-style-name="P39" svg:width="2.449cm" svg:height="2.449cm" svg:x="8.46cm" svg:y="0.646cm"><text:p/><draw:enhanced-geometry svg:viewBox="0 0 21600 21600" draw:type="rectangle" draw:enhanced-path="M 0 0 L 21600 0 21600 21600 0 21600 0 0 Z N"/></draw:custom-shape><text:span text:style-name="T11"/></text:p>
      <text:p text:style-name="P3"><text:span text:style-name="T12"/></text:p>
      <text:h text:style-name="P5" text:outline-level="2"><text:soft-page-break/>1. Introducción y Metodología</text:h>
      <text:p text:style-name="P10">Para el desarrollo de <text:span text:style-name="T5">Temporis</text:span>, se adopta el marco de trabajo ágil <text:span text:style-name="T5">Scrum</text:span>, adaptando estratégicamente sus <text:span text:style-name="T25">eventos, ceremonias</text:span> y artefactos a un entorno de <text:span text:style-name="T5">desarrollo individual (Solo-Scrum)</text:span>. El ciclo de vida del proyecto se divide de forma estricta en <text:span text:style-name="T5">Sprints fijos de dos semanas de duración</text:span>.</text:p>
      <text:p text:style-name="P6">Esta ventana temporal garantiza un ritmo de inspección y adaptación constante, permitiendo desplegar <text:span text:style-name="T5">incrementos de software potencialmente entregables</text:span> tras cada ciclo. La flexibilidad de este enfoque facilita la integración inmediata de las pautas de accesibilidad y las correcciones de diseño identificadas durante las fases de <text:span text:style-name="T25">prueba</text:span> continu<text:span text:style-name="T25">a</text:span>, mitigando <text:span text:style-name="T25">así posibles</text:span> riesgos de desviación, en el alcance final.</text:p>
      <text:p text:style-name="P6"/>
      <text:p text:style-name="P6"/>
      <text:h text:style-name="P5" text:outline-level="2">2. Product Backlog (Pila del Producto)</text:h>
      <text:p text:style-name="P6">El <text:span text:style-name="T14">Product Backlog</text:span> se compone de historias de usuario y requerimientos técnicos desglosados y ponderados según su valor para el <text:span text:style-name="T5">Mínimo Producto Viable (MVP)</text:span> y su impacto en la <text:span text:style-name="T5">inclusión digital</text:span>. La priorización sigue una taxonomía estricta de dependencias técnicas:</text:p>
      <text:p text:style-name="P6"/>
      <text:list text:style-name="L3">
        <text:list-item>
          <text:p text:style-name="P23">Prioridad Alta (Bloque de Infraestructura y Core CRUD):</text:p>
          <text:list>
            <text:list-item>
              <text:p text:style-name="P12">Aprovisionamiento del entorno de desarrollo y SDKs esenciales.</text:p>
            </text:list-item>
            <text:list-item>
              <text:p text:style-name="P12">Capa de persistencia <text:span text:style-name="T14">cloud</text:span> y aislamiento criptográfico de datos (<text:span text:style-name="T14">Firebase</text:span>).</text:p>
            </text:list-item>
            <text:list-item>
              <text:p text:style-name="P12">Gestión de la lógica operacional y transaccional del temporizador.</text:p>
              <text:p text:style-name="P12"/>
            </text:list-item>
          </text:list>
        </text:list-item>
        <text:list-item>
          <text:p text:style-name="P23">Prioridad Media (Lógica del Contador, Arquitectura y UI Base):</text:p>
          <text:list>
            <text:list-item>
              <text:p text:style-name="P12">Sincronización asíncrona en segundo plano (Corrutinas de <text:span text:style-name="T14">Kotlin</text:span> y Servicios nativos).</text:p>
            </text:list-item>
            <text:list-item>
              <text:p text:style-name="P12">Estructura arquitectónica limpia siguiendo el patrón MVVM.</text:p>
            </text:list-item>
            <text:list-item>
              <text:p text:style-name="P12">Implementación de la interfaz responsiva y soporte nativo para el Modo Oscuro.</text:p>
              <text:p text:style-name="P12"/>
            </text:list-item>
          </text:list>
        </text:list-item>
        <text:list-item>
          <text:p text:style-name="P23">Prioridad Baja (Analítica Avanzada y Optimización de la Accesibilidad):</text:p>
          <text:list>
            <text:list-item>
              <text:p text:style-name="P12">Módulo estadístico y renderizado del mapa de calor de productividad (<text:span text:style-name="T13">heatmap</text:span>).</text:p>
            </text:list-item>
            <text:list-item>
              <text:p text:style-name="P12">Temas de interfaz adaptados a entornos de baja visión (Modo de Alto Contraste).</text:p>
            </text:list-item>
            <text:list-item>
              <text:p text:style-name="P12">Pulido fino de microinteracciones, transiciones visuales y animaciones inclusivas.</text:p>
            </text:list-item>
          </text:list>
        </text:list-item>
      </text:list>
      <text:p text:style-name="P33"/>
      <text:p text:style-name="P33"/>
      <text:p text:style-name="P33"/>
      <text:h text:style-name="P5" text:outline-level="2"><text:soft-page-break/><text:span text:style-name="T11">3. </text:span>Planificación de <text:span text:style-name="T14">Sprints</text:span> (<text:span text:style-name="T14">Sprint Backlog</text:span>)</text:h>
      <text:h text:style-name="P8" text:outline-level="4"><text:span text:style-name="T28">Sprint </text:span><text:span text:style-name="T29">0</text:span><text:span text:style-name="T28">: I</text:span><text:span text:style-name="T29">ncialización de la </text:span><text:span text:style-name="T30">I</text:span><text:span text:style-name="T28">nfraestructura Base y Modelo de Datos </text:span><text:span text:style-name="T32">Cloud</text:span></text:h>
      <text:list text:style-name="L8">
        <text:list-item>
          <text:p text:style-name="P17"><text:span text:style-name="T5">Duración:</text:span> “2 semanas.” <text:span text:style-name="T50">[</text:span><text:span text:style-name="T49">desarrollado aprovechando momentos libres durante un periodo de unos dos meses y medio. Resulta complicado definir una duración concreta para esta primera fase del desarrollo debido a que, en ese momento, el tiempo libre disponible era bastante limitado, compaginando el trabajo, el desarrollo de las tareas (</text:span><text:span text:style-name="T18">relacionadas con las otras asignaturas </text:span><text:span text:style-name="T19">del CFGS en DAM</text:span><text:span text:style-name="T49">) y el desarrollo del proyecto en cuestión</text:span><text:span text:style-name="T50">]</text:span></text:p>
        </text:list-item>
        <text:list-item>
          <text:p text:style-name="P27">Tareas Programadas y Desglose Granular:</text:p>
          <text:list>
            <text:list-item>
              <text:p text:style-name="P13">Configuración inicial del proyecto <text:span text:style-name="T35">mediante el uso del </text:span><text:span text:style-name="T16">IDE</text:span><text:span text:style-name="T35"> </text:span>Android Studio, <text:span text:style-name="T36">de</text:span> <text:span text:style-name="T14">Gradle</text:span> <text:span text:style-name="T36">(como herramienta de </text:span><text:span text:style-name="T35">Gestión de dependencias) </text:span>y <text:span text:style-name="T36">también el</text:span> control de versiones <text:span text:style-name="T14">Git</text:span>, <text:span text:style-name="T36">a través de </text:span><text:span text:style-name="T17">Github</text:span>.</text:p>
            </text:list-item>
            <text:list-item>
              <text:p text:style-name="P13">Vinculación y autenticación del proyecto con la consola de Firebase.</text:p>
            </text:list-item>
            <text:list-item>
              <text:p text:style-name="P13">Implementación <text:span text:style-name="T37">inicial </text:span>de las <text:span text:style-name="T13">Security Rules</text:span> de <text:span text:style-name="T14">Cloud Firestore</text:span>, para el aislamiento de <text:span text:style-name="T37">los</text:span> datos, <text:span text:style-name="T37">filtrando por el</text:span> UID de <text:span text:style-name="T37">cada</text:span> usuario.</text:p>
            </text:list-item>
            <text:list-item>
              <text:p text:style-name="P14">Diseño y codificación de las clases de datos base (POJOs (<text:span text:style-name="Emphasis">Plain Old Java Object</text:span>)/<text:span text:style-name="T14">Data Classes</text:span>) en <text:span text:style-name="T14">Kotlin</text:span>: <text:span text:style-name="Source_20_Text"><text:span text:style-name="T27">User.</text:span></text:span><text:span text:style-name="Source_20_Text"><text:span text:style-name="T31">java</text:span></text:span>, <text:span text:style-name="Source_20_Text"><text:span text:style-name="T27">Timer.</text:span></text:span><text:span text:style-name="Source_20_Text"><text:span text:style-name="T31">java</text:span></text:span><text:span text:style-name="Source_20_Text"><text:span text:style-name="T40">,</text:span></text:span> <text:span text:style-name="Source_20_Text"><text:span text:style-name="T27">TimeRegister.</text:span></text:span><text:span text:style-name="Source_20_Text"><text:span text:style-name="T31">java</text:span></text:span> <text:span text:style-name="T38">y </text:span><text:span text:style-name="Source_20_Text"><text:span text:style-name="T27">Post.kt</text:span></text:span><text:span text:style-name="T38">.</text:span></text:p>
            </text:list-item>
            <text:list-item>
              <text:p text:style-name="P19">Integración del SDK de <text:span text:style-name="T13">Firebase Auth</text:span> y maquetación <text:span text:style-name="T43">inicial </text:span>de la<text:span text:style-name="T52">s</text:span> pantalla<text:span text:style-name="T52">s</text:span> de: <text:span text:style-name="T14">Login</text:span><text:span text:style-name="T53">,</text:span> <text:span text:style-name="T20">Register, Timers, Timer y “User Dashboard”</text:span>.</text:p>
            </text:list-item>
          </text:list>
        </text:list-item>
        <text:list-item>
          <text:p text:style-name="P20"><text:span text:style-name="T5">Estado de Entrega (Tareas Realizadas):</text:span> “100%” completado y verificado en entorno local, <text:span text:style-name="T44">aunque con ciertos errores, </text:span><text:span text:style-name="T54">sobretodo relacionados con la actualización de los datos del usuario con la sesión iniciada, tratando de sincronizar e insertar/actualizar los nuevos datos, en </text:span><text:span text:style-name="T21">Firebase Firestore</text:span>.</text:p>
        </text:list-item>
        <text:list-item>
          <text:p text:style-name="P18"><text:span text:style-name="T9">Comentario acerca del “</text:span><text:span text:style-name="T23">sprint</text:span><text:span text:style-name="T9"> inic</text:span><text:span text:style-name="T10">i</text:span><text:span text:style-name="T9">al”</text:span><text:span text:style-name="T5">:</text:span> <text:span text:style-name="T45">Esta primera fase del desarrollo del proyecto se realizó durante el periodo de tiempo aproximado que comprendió desde mediados de </text:span><text:span text:style-name="T51">Febrero</text:span><text:span text:style-name="T45"> hasta mediados de Mayo (ambos del año 2025)</text:span>, <text:span text:style-name="T47">durante el desarrollo de la propuesta inicial de aplicación para Android. Se entregó en tiempo y forma adecuados, aunque</text:span><text:span text:style-name="T44"> </text:span><text:span text:style-name="T46">manifestando </text:span><text:span text:style-name="T48">y “manteniendo”</text:span><text:span text:style-name="T44"> ciertos errores/</text:span><text:span text:style-name="T48">disfunciones,</text:span><text:span text:style-name="T44"> </text:span><text:span text:style-name="T46">de forma </text:span><text:span text:style-name="T47">continuada</text:span>.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h text:style-name="P9" text:outline-level="4"><text:soft-page-break/><text:span text:style-name="T28">Sprint 1: Infraestructura Base y Modelo de Datos </text:span><text:span text:style-name="T32">Cloud</text:span></text:h>
      <text:list text:continue-numbering="true" text:style-name="L8">
        <text:list-item>
          <text:p text:style-name="P32"><text:span text:style-name="T5">Duración:</text:span> 2 semanas.</text:p>
        </text:list-item>
        <text:list-item>
          <text:p text:style-name="P28">Tareas Programadas:</text:p>
          <text:list>
            <text:list-item>
              <text:p text:style-name="P15"><text:span text:style-name="T56">Ajuste y mejora de la c</text:span>onfiguración del proyecto <text:span text:style-name="T35">mediante el uso del </text:span><text:span text:style-name="T16">IDE</text:span><text:span text:style-name="T35"> </text:span>Android Studio, <text:span text:style-name="T36">de</text:span> <text:span text:style-name="T14">Gradle</text:span> <text:span text:style-name="T36">(como herramienta de </text:span><text:span text:style-name="T35">Gestión de dependencias) </text:span>y <text:span text:style-name="T36">también el</text:span> control de versiones <text:span text:style-name="T14">Git</text:span>, <text:span text:style-name="T36">a través de </text:span><text:span text:style-name="T17">Github</text:span>. <text:span text:style-name="T55">En esta primera etapa se tratan de solucionar o mejorar los errores relacionados </text:span><text:span text:style-name="T57">principalmente con la sincronización/actualización de los datos del usuario, al tratar de actualizarlos y guardarlos en </text:span><text:span text:style-name="T22">Firebase Firestore</text:span><text:span text:style-name="T57">.</text:span></text:p>
            </text:list-item>
            <text:list-item>
              <text:p text:style-name="P15">Vinculación y autenticación del proyecto con la consola de Firebase.</text:p>
            </text:list-item>
            <text:list-item>
              <text:p text:style-name="P15">Implementación <text:span text:style-name="T37">inicial </text:span>de las <text:span text:style-name="T13">Security Rules</text:span> de <text:span text:style-name="T14">Cloud Firestore</text:span>, para el aislamiento de <text:span text:style-name="T37">los</text:span> datos, <text:span text:style-name="T37">filtrando por el</text:span> UID de <text:span text:style-name="T37">cada</text:span> usuario.</text:p>
            </text:list-item>
            <text:list-item>
              <text:p text:style-name="P15">Diseño y codificación de las clases de datos base (POJOs (<text:span text:style-name="Emphasis">Plain Old Java Object</text:span>)/<text:span text:style-name="T14">Data Classes</text:span>) en <text:span text:style-name="T14">Kotlin</text:span>: <text:span text:style-name="Source_20_Text"><text:span text:style-name="T27">User.</text:span></text:span><text:span text:style-name="Source_20_Text"><text:span text:style-name="T31">java</text:span></text:span>, <text:span text:style-name="Source_20_Text"><text:span text:style-name="T27">Timer.</text:span></text:span><text:span text:style-name="Source_20_Text"><text:span text:style-name="T31">java</text:span></text:span><text:span text:style-name="Source_20_Text"><text:span text:style-name="T40">,</text:span></text:span> <text:span text:style-name="Source_20_Text"><text:span text:style-name="T27">TimeRegister.</text:span></text:span><text:span text:style-name="Source_20_Text"><text:span text:style-name="T31">java</text:span></text:span> <text:span text:style-name="T38">y </text:span><text:span text:style-name="Source_20_Text"><text:span text:style-name="T27">Post.kt</text:span></text:span><text:span text:style-name="T38">.</text:span></text:p>
            </text:list-item>
            <text:list-item>
              <text:p text:style-name="P15">Integración del SDK de <text:span text:style-name="T13">Firebase Auth</text:span> y maquetación <text:span text:style-name="T43">inicial </text:span>de la pantalla de <text:span text:style-name="T14">Login</text:span> tradicional.</text:p>
            </text:list-item>
          </text:list>
        </text:list-item>
        <text:list-item>
          <text:p text:style-name="P16"><text:span text:style-name="T7">Estado de Entrega (Tareas Realizadas): “100%” completado y verificado en entorno local, </text:span><text:span text:style-name="T8">aunque con ciertos errores</text:span><text:span text:style-name="T7">.</text:span></text:p>
        </text:list-item>
      </text:list>
      <text:h text:style-name="P7" text:outline-level="4">Sprint 2: Arquitectura MVVM y Lógica de Negocio (<text:span text:style-name="T14">Core Engine</text:span>)</text:h>
      <text:list text:style-name="L5">
        <text:list-item>
          <text:p text:style-name="P29"><text:span text:style-name="T5">Duración:</text:span> 2 semanas.</text:p>
        </text:list-item>
        <text:list-item>
          <text:p text:style-name="P24">Tareas Programadas:</text:p>
          <text:list>
            <text:list-item>
              <text:p text:style-name="P22">Creación de la estructura de paquetes según <text:span text:style-name="T14">Clean Architecture</text:span> (<text:span text:style-name="Source_20_Text"><text:span text:style-name="T33">adapter</text:span></text:span><text:span text:style-name="Source_20_Text"><text:span text:style-name="T41">,</text:span></text:span><text:span text:style-name="Source_20_Text"><text:span text:style-name="T33"> model</text:span></text:span><text:span text:style-name="Source_20_Text"><text:span text:style-name="T41">,</text:span></text:span><text:span text:style-name="Source_20_Text"><text:span text:style-name="T33"> repository</text:span></text:span><text:span text:style-name="Source_20_Text"><text:span text:style-name="T41">,</text:span></text:span><text:span text:style-name="Source_20_Text"><text:span text:style-name="T33"> ui</text:span></text:span><text:span text:style-name="Source_20_Text"><text:span text:style-name="T41"> y </text:span></text:span><text:span text:style-name="Source_20_Text"><text:span text:style-name="T33">util</text:span></text:span>).</text:p>
            </text:list-item>
            <text:list-item>
              <text:p text:style-name="P29">Implementación del patrón <text:span text:style-name="T14">Repository</text:span> (<text:span text:style-name="Source_20_Text"><text:span text:style-name="T27">TimerRepository.kt</text:span></text:span><text:span text:style-name="Source_20_Text"><text:span text:style-name="T39">,</text:span></text:span><text:span text:style-name="Source_20_Text"><text:span text:style-name="T27"> </text:span></text:span><text:span text:style-name="Source_20_Text"><text:span text:style-name="T34">UserRepository.kt</text:span></text:span><text:span text:style-name="Source_20_Text"><text:span text:style-name="T42"> y</text:span></text:span><text:span text:style-name="Source_20_Text"><text:span text:style-name="T34"> PostRepository.kt</text:span></text:span>) para la abstracción de operaciones CRUD con Firestore.</text:p>
            </text:list-item>
            <text:list-item>
              <text:p text:style-name="P22">Desarrollo de los <text:span text:style-name="T14">ViewModels</text:span> (<text:span text:style-name="Source_20_Text"><text:span text:style-name="T27">TimerViewModel.kt</text:span></text:span>) con control <text:span text:style-name="T14">de</text:span> estado mediante <text:span text:style-name="Source_20_Text"><text:span text:style-name="T27">MutableStateFlow</text:span></text:span>.</text:p>
            </text:list-item>
            <text:list-item>
              <text:p text:style-name="P22">Despliegue del motor de cuenta atrás del temporizador mediante hilos asíncronos eficientes (<text:span text:style-name="T13">Kotlin Coroutines</text:span>).</text:p>
            </text:list-item>
          </text:list>
        </text:list-item>
        <text:list-item>
          <text:p text:style-name="P29"><text:span text:style-name="T5">Estado de Entrega (Tareas Realizadas):</text:span> Completado. Código integrado en la rama principal (<text:span text:style-name="T13">main</text:span>) tras superar los test unitarios.</text:p>
        </text:list-item>
      </text:list>
      <text:h text:style-name="Heading_20_3" text:outline-level="3">Sprint 3: Diseño de Interfaces Responsivas y Accesibilidad Universal (LSE/WCAG)</text:h>
      <text:list text:style-name="L6">
        <text:list-item>
          <text:p text:style-name="P30"><text:span text:style-name="T5">Duración:</text:span> 2 semanas.</text:p>
        </text:list-item>
        <text:list-item>
          <text:p text:style-name="P25">Tareas Programadas y Desglose Granular:</text:p>
          <text:list>
            <text:list-item>
              <text:p text:style-name="P30"><text:soft-page-break/>Diseño y maquetación del árbol de vistas XML utilizando componentes adaptativos (<text:span text:style-name="Source_20_Text">ConstraintLayout</text:span>).</text:p>
            </text:list-item>
            <text:list-item>
              <text:p text:style-name="P30">Implementación y unificación del sistema de diseño visual (estilos de botones redondeados, gradientes y jerarquía tipográfica).</text:p>
            </text:list-item>
            <text:list-item>
              <text:p text:style-name="P30">Creación e integración de los recursos de color para soporte nativo de <text:span text:style-name="T5">Modo Oscuro</text:span> y <text:span text:style-name="T5">Modo de Alto Contraste</text:span>.</text:p>
            </text:list-item>
            <text:list-item>
              <text:p text:style-name="P30">Inyección de atributos <text:span text:style-name="Source_20_Text">contentDescription</text:span> en todos los componentes interactivos e imágenes para la correcta verbalización en el lector de pantallas <text:span text:style-name="T13">TalkBack</text:span>.</text:p>
            </text:list-item>
            <text:list-item>
              <text:p text:style-name="P30">Ajuste del escalado tipográfico adaptativo dinámico en unidades <text:span text:style-name="Source_20_Text">sp</text:span> (hasta 30sp) previniendo el desbordamiento o colapso de las vistas de la interfaz.</text:p>
            </text:list-item>
          </text:list>
        </text:list-item>
        <text:list-item>
          <text:p text:style-name="P30"><text:span text:style-name="T5">Estado de Entrega (Tareas Realizadas):</text:span> Completado. Las vistas de configuración de accesibilidad y selección de modos son completamente funcionales.</text:p>
        </text:list-item>
      </text:list>
      <text:h text:style-name="Heading_20_3" text:outline-level="3">Sprint 4: Control de Calidad (QA), Inspección Estática y Cierre</text:h>
      <text:list text:style-name="L7">
        <text:list-item>
          <text:p text:style-name="P31"><text:span text:style-name="T5">Duración:</text:span> 2 semanas.</text:p>
        </text:list-item>
        <text:list-item>
          <text:p text:style-name="P26">Tareas Programadas y Desglose Granular:</text:p>
          <text:list>
            <text:list-item>
              <text:p text:style-name="P31">Configuración del servidor local de <text:span text:style-name="T5">SonarQube</text:span> y ejecución del plugin de Gradle para análisis estático de código.</text:p>
            </text:list-item>
            <text:list-item>
              <text:p text:style-name="P31">Refactorización y limpieza de la complejidad ciclomática en ViewModels y erradicación de <text:span text:style-name="T13">code smells</text:span> detectados.</text:p>
            </text:list-item>
            <text:list-item>
              <text:p text:style-name="P31">Escritura y ejecución de baterías de pruebas unitarias con JUnit e instrumentales de interfaz con el framework Espresso.</text:p>
            </text:list-item>
            <text:list-item>
              <text:p text:style-name="P31">Auditoría de campo final de accesibilidad móvil con la herramienta de diagnóstico <text:span text:style-name="T13">Accessibility Scanner</text:span> de Google.</text:p>
            </text:list-item>
            <text:list-item>
              <text:p text:style-name="P31">Compilación del artefacto final corregido y redacción de las memorias técnicas y de control de calidad.</text:p>
            </text:list-item>
          </text:list>
        </text:list-item>
        <text:list-item>
          <text:p text:style-name="P31"><text:span text:style-name="T5">Estado de Entrega (Tareas “Realizadas”):</text:span> <text:span text:style-name="T26">En proceso</text:span>. <text:span text:style-name="T26">El objetivo de la c</text:span>obertura de código <text:span text:style-name="T26">que queremos validar en un futuro, debería de encontrarse </text:span>por encima del 85% y <text:span text:style-name="T26">con la </text:span>pasarela de calidad (<text:span text:style-name="T13">Quality Gate</text:span>) aprobada.</text:p>
        </text:list-item>
      </text:list>
      <text:p text:style-name="P6"/>
      <text:h text:style-name="P5" text:outline-level="2">4. Tablero Kanban (Herramienta de Gestión)</text:h>
      <text:p text:style-name="P6">Para el seguimiento visual, <text:span text:style-name="T24">se ha </text:span>utiliz<text:span text:style-name="T24">ado</text:span> un tablero <text:span text:style-name="T5">Kanban, </text:span><text:span text:style-name="T6">creado y administrado mediante</text:span><text:span text:style-name="T5"> GitHub Projects</text:span>, <text:span text:style-name="T24">en el cual,</text:span> las tareas, <text:span text:style-name="T24">han ido</text:span> transitan<text:span text:style-name="T24">do/desplazándose</text:span> por/<text:span text:style-name="T24">a través de</text:span> las columnas <text:span text:style-name="T24">definidas</text:span>: <text:span text:style-name="T15">New issues, Ice Box, Product Backlog, Sprint </text:span><text:span text:style-name="T14">Backlog, In Progress, </text:span><text:span text:style-name="T15">In Review</text:span><text:span text:style-name="T14"> y Done.</text:span> Esto me permite detectar cuellos de botella en la fase de diseño de interfaces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MT1" style:family="text">
      <style:text-properties style:font-name="MathJax_Typewriter" fo:font-size="15pt" fo:font-weight="normal" officeooo:rsid="0203eef7" style:font-size-asian="15pt" style:font-weight-asian="normal" style:font-size-complex="15pt" style:font-weight-complex="normal"/>
    </style:style>
    <style:style style:name="MT2" style:family="text">
      <style:text-properties style:font-name="MathJax_Typewriter" fo:font-size="15pt" fo:font-weight="normal" officeooo:rsid="018c626a" style:font-size-asian="15pt" style:font-weight-asian="normal" style:font-size-complex="15pt" style:font-weight-complex="normal"/>
    </style:style>
    <style:style style:name="MT3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MT4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page-layout style:name="Mpm1">
      <style:page-layout-properties fo:page-width="21.001cm" fo:page-height="29.7cm" style:num-format="1" style:print-orientation="portrait" fo:margin-top="1.67cm" fo:margin-bottom="1.319cm" fo:margin-left="2cm" fo:margin-right="1.1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36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lanificación del Proyecto - Scrum</text:span><text:span text:style-name="MT2"><text:tab/></text:span><text:span text:style-name="MT3">Kevin Zamora </text:span><text:span text:style-name="MT4">Amela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24.2.7.2$Linux_X86_64 LibreOffice_project/420$Build-2</meta:generator>
    <dc:date>2026-05-27T00:19:42.873307677</dc:date>
    <meta:editing-duration>P1DT1H32M45S</meta:editing-duration>
    <meta:editing-cycles>645</meta:editing-cycles>
    <meta:print-date>2026-04-25T00:02:49.450270482</meta:print-date>
    <meta:printed-by>Archivos PDF</meta:printed-by>
    <meta:document-statistic meta:table-count="0" meta:image-count="1" meta:object-count="0" meta:page-count="5" meta:paragraph-count="68" meta:word-count="1205" meta:character-count="8026" meta:non-whitespace-character-count="6941"/>
  </office:meta>
</office:document-meta>
</file>
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50000003F4FC6F812F.png" manifest:media-type="image/png"/>
  <manifest:file-entry manifest:full-path="Pictures/100000010000077D0000038016F93D3D.png" manifest:media-type="image/png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Mona Sans VF" svg:font-family="'Mona Sans VF', apple-system, BlinkMacSystemFont, 'Segoe UI', 'Noto Sans', Helvetica, Arial, sans-serif, 'Apple Color Emoji', 'Segoe UI Emoji'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MathJax_Typewriter" style:text-underline-style="solid" style:text-underline-width="auto" style:text-underline-color="font-color" fo:font-weight="normal" officeooo:rsid="00cc3084" officeooo:paragraph-rsid="00cc3084" style:font-weight-asian="normal" style:font-weight-complex="normal"/>
    </style:style>
    <style:style style:name="P4" style:family="paragraph" style:parent-style-name="Heading_20_2">
      <style:paragraph-properties fo:line-height="150%" fo:text-align="center" style:justify-single-word="false" fo:keep-with-next="always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86b18" officeooo:paragraph-rsid="02434674" style:font-size-asian="15pt" style:font-weight-asian="normal" style:font-size-complex="15pt" style:font-weight-complex="normal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2a358aa"/>
    </style:style>
    <style:style style:name="P7" style:family="paragraph" style:parent-style-name="Text_20_body">
      <style:paragraph-properties fo:margin-top="0.101cm" fo:margin-bottom="0.347cm" style:contextual-spacing="false" fo:text-align="justify" style:justify-single-word="false"/>
      <style:text-properties officeooo:paragraph-rsid="02bcef5b"/>
    </style:style>
    <style:style style:name="P8" style:family="paragraph" style:parent-style-name="Heading_20_4">
      <style:paragraph-properties fo:margin-top="0.212cm" fo:margin-bottom="0.212cm" style:contextual-spacing="false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Heading_20_4">
      <style:paragraph-properties fo:margin-top="0.212cm" fo:margin-bottom="0.212cm" style:contextual-spacing="false" fo:text-align="center" style:justify-single-word="false"/>
      <style:text-properties fo:font-weight="bold" officeooo:paragraph-rsid="02b99699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officeooo:rsid="02aaa695" officeooo:paragraph-rsid="02aaa695"/>
    </style:style>
    <style:style style:name="P11" style:family="paragraph" style:parent-style-name="Heading_20_4">
      <style:paragraph-properties fo:text-align="center" style:justify-single-word="false" fo:keep-with-next="always"/>
      <style:text-properties style:font-name="MathJax_Typewriter" style:text-underline-style="solid" style:text-underline-width="auto" style:text-underline-color="font-color" officeooo:paragraph-rsid="02b99699"/>
    </style:style>
    <style:style style:name="P12" style:family="paragraph" style:parent-style-name="Heading_20_4">
      <style:paragraph-properties fo:text-align="start" style:justify-single-word="false" fo:keep-with-next="always"/>
      <style:text-properties style:font-name="MathJax_Typewriter" style:text-underline-style="solid" style:text-underline-width="auto" style:text-underline-color="font-color" officeooo:rsid="03080393" officeooo:paragraph-rsid="02b99699"/>
    </style:style>
    <style:style style:name="P13" style:family="paragraph" style:parent-style-name="Heading_20_4">
      <style:paragraph-properties fo:margin-top="0.714cm" fo:margin-bottom="0.714cm" style:contextual-spacing="false" fo:text-align="start" style:justify-single-word="false" fo:keep-with-next="always"/>
      <style:text-properties style:font-name="MathJax_Typewriter" officeooo:rsid="03080393" officeooo:paragraph-rsid="02b99699"/>
    </style:style>
    <style:style style:name="P14" style:family="paragraph" style:parent-style-name="Text_20_body" style:list-style-name="L1">
      <style:paragraph-properties fo:text-align="justify" style:justify-single-word="false"/>
      <style:text-properties fo:font-weight="bold"/>
    </style:style>
    <style:style style:name="P15" style:family="paragraph" style:parent-style-name="Text_20_body" style:list-style-name="L2">
      <style:paragraph-properties fo:margin-top="0.101cm" fo:margin-bottom="0.247cm" style:contextual-spacing="false"/>
      <style:text-properties fo:font-weight="bold"/>
    </style:style>
    <style:style style:name="P16" style:family="paragraph" style:parent-style-name="Text_20_body" style:list-style-name="L2">
      <style:paragraph-properties fo:margin-top="0.101cm" fo:margin-bottom="0.247cm" style:contextual-spacing="false"/>
      <style:text-properties fo:font-weight="bold" officeooo:paragraph-rsid="02b99699"/>
    </style:style>
    <style:style style:name="P17" style:family="paragraph" style:parent-style-name="Text_20_body" style:list-style-name="L4">
      <style:text-properties fo:font-weight="bold"/>
    </style:style>
    <style:style style:name="P18" style:family="paragraph" style:parent-style-name="Text_20_body" style:list-style-name="L5">
      <style:text-properties fo:font-weight="bold"/>
    </style:style>
    <style:style style:name="P19" style:family="paragraph" style:parent-style-name="Text_20_body" style:list-style-name="L1">
      <style:paragraph-properties fo:text-align="justify" style:justify-single-word="false"/>
    </style:style>
    <style:style style:name="P20" style:family="paragraph" style:parent-style-name="Text_20_body" style:list-style-name="L2">
      <style:paragraph-properties fo:margin-top="0.302cm" fo:margin-bottom="0.549cm" style:contextual-spacing="false" fo:text-align="justify" style:justify-single-word="false"/>
    </style:style>
    <style:style style:name="P21" style:family="paragraph" style:parent-style-name="Text_20_body" style:list-style-name="L2">
      <style:paragraph-properties fo:text-align="justify" style:justify-single-word="false"/>
    </style:style>
    <style:style style:name="P22" style:family="paragraph" style:parent-style-name="Text_20_body" style:list-style-name="L2">
      <style:paragraph-properties fo:text-align="justify" style:justify-single-word="false"/>
      <style:text-properties officeooo:paragraph-rsid="02b21a47"/>
    </style:style>
    <style:style style:name="P23" style:family="paragraph" style:parent-style-name="Text_20_body" style:list-style-name="L2">
      <style:paragraph-properties fo:margin-top="0.804cm" fo:margin-bottom="1.051cm" style:contextual-spacing="false" fo:text-align="justify" style:justify-single-word="false"/>
    </style:style>
    <style:style style:name="P24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officeooo:paragraph-rsid="02bcef5b"/>
    </style:style>
    <style:style style:name="P25" style:family="paragraph" style:parent-style-name="Text_20_body" style:list-style-name="L2">
      <style:paragraph-properties fo:text-align="justify" style:justify-single-word="false"/>
      <style:text-properties officeooo:paragraph-rsid="02b99699"/>
    </style:style>
    <style:style style:name="P26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officeooo:paragraph-rsid="02b99699"/>
    </style:style>
    <style:style style:name="P27" style:family="paragraph" style:parent-style-name="Text_20_body" style:list-style-name="L2">
      <style:paragraph-properties fo:text-align="justify" style:justify-single-word="false"/>
      <style:text-properties officeooo:paragraph-rsid="02f5f524"/>
    </style:style>
    <style:style style:name="P28" style:family="paragraph" style:parent-style-name="Text_20_body" style:list-style-name="L2">
      <style:paragraph-properties fo:margin-top="0cm" fo:margin-bottom="0.247cm" style:contextual-spacing="false" fo:text-align="justify" style:justify-single-word="false"/>
      <style:text-properties officeooo:paragraph-rsid="02fcde76"/>
    </style:style>
    <style:style style:name="P29" style:family="paragraph" style:parent-style-name="Text_20_body" style:list-style-name="L2">
      <style:paragraph-properties fo:text-align="justify" style:justify-single-word="false"/>
      <style:text-properties officeooo:paragraph-rsid="02fcedd8"/>
    </style:style>
    <style:style style:name="P30" style:family="paragraph" style:parent-style-name="Text_20_body" style:list-style-name="L2">
      <style:paragraph-properties fo:margin-top="0.402cm" fo:margin-bottom="0.649cm" style:contextual-spacing="false" fo:text-align="justify" style:justify-single-word="false"/>
      <style:text-properties officeooo:paragraph-rsid="03062065"/>
    </style:style>
    <style:style style:name="P31" style:family="paragraph" style:parent-style-name="Text_20_body" style:list-style-name="L2">
      <style:paragraph-properties fo:text-align="justify" style:justify-single-word="false"/>
      <style:text-properties officeooo:paragraph-rsid="030aa924"/>
    </style:style>
    <style:style style:name="P32" style:family="paragraph" style:parent-style-name="Text_20_body" style:list-style-name="L2">
      <style:paragraph-properties fo:text-align="justify" style:justify-single-word="false"/>
      <style:text-properties officeooo:paragraph-rsid="030b636e"/>
    </style:style>
    <style:style style:name="P33" style:family="paragraph" style:parent-style-name="Text_20_body" style:list-style-name="L2">
      <style:paragraph-properties fo:text-align="justify" style:justify-single-word="false"/>
      <style:text-properties officeooo:paragraph-rsid="030cadf3"/>
    </style:style>
    <style:style style:name="P34" style:family="paragraph" style:parent-style-name="Text_20_body" style:list-style-name="L2">
      <style:paragraph-properties fo:text-align="justify" style:justify-single-word="false"/>
      <style:text-properties officeooo:paragraph-rsid="030e76fa"/>
    </style:style>
    <style:style style:name="P35" style:family="paragraph" style:parent-style-name="Text_20_body" style:list-style-name="L2">
      <style:paragraph-properties fo:margin-top="0.402cm" fo:margin-bottom="0.402cm" style:contextual-spacing="false" fo:text-align="justify" style:justify-single-word="false"/>
      <style:text-properties officeooo:paragraph-rsid="03027c92"/>
    </style:style>
    <style:style style:name="P36" style:family="paragraph" style:parent-style-name="Text_20_body" style:list-style-name="L4">
      <style:paragraph-properties fo:margin-top="1.106cm" fo:margin-bottom="1.353cm" style:contextual-spacing="false" fo:text-align="justify" style:justify-single-word="false"/>
      <style:text-properties officeooo:paragraph-rsid="0312c8c5"/>
    </style:style>
    <style:style style:name="P37" style:family="paragraph" style:parent-style-name="Text_20_body" style:list-style-name="L4">
      <style:paragraph-properties fo:text-align="justify" style:justify-single-word="false"/>
    </style:style>
    <style:style style:name="P38" style:family="paragraph" style:parent-style-name="Text_20_body">
      <style:paragraph-properties fo:margin-top="0.402cm" fo:margin-bottom="0.649cm" style:contextual-spacing="false" fo:text-align="justify" style:justify-single-word="false"/>
      <style:text-properties officeooo:paragraph-rsid="03062065"/>
    </style:style>
    <style:style style:name="P39" style:family="paragraph" style:parent-style-name="Text_20_body">
      <style:paragraph-properties fo:text-align="justify" style:justify-single-word="false"/>
    </style:style>
    <style:style style:name="P40" style:family="paragraph" style:parent-style-name="Text_20_body" style:list-style-name="L5">
      <style:paragraph-properties fo:margin-top="0.402cm" fo:margin-bottom="0.649cm" style:contextual-spacing="false" fo:text-align="justify" style:justify-single-word="false"/>
      <style:text-properties officeooo:paragraph-rsid="03231fb6"/>
    </style:style>
    <style:style style:name="P41" style:family="paragraph" style:parent-style-name="Text_20_body">
      <style:paragraph-properties fo:margin-top="0.402cm" fo:margin-bottom="0.649cm" style:contextual-spacing="false" fo:text-align="justify" style:justify-single-word="false"/>
      <style:text-properties officeooo:paragraph-rsid="03231fb6"/>
    </style:style>
    <style:style style:name="P42" style:family="paragraph" style:parent-style-name="Text_20_body" style:list-style-name="L2">
      <style:paragraph-properties fo:margin-top="0cm" fo:margin-bottom="0cm" style:contextual-spacing="false"/>
      <style:text-properties officeooo:paragraph-rsid="02b99699"/>
    </style:style>
    <style:style style:name="P43" style:family="paragraph" style:parent-style-name="Text_20_body" style:list-style-name="L4"/>
    <style:style style:name="P44" style:family="paragraph" style:parent-style-name="Text_20_body" style:list-style-name="L5"/>
    <style:style style:name="P45" style:family="paragraph" style:parent-style-name="Text_20_body" style:list-style-name="L5">
      <style:paragraph-properties fo:margin-top="0.503cm" fo:margin-bottom="0.75cm" style:contextual-spacing="false"/>
    </style:style>
    <style:style style:name="P46" style:family="paragraph" style:parent-style-name="Text_20_body" style:list-style-name="L5">
      <style:text-properties officeooo:paragraph-rsid="031bd7c2"/>
    </style:style>
    <style:style style:name="P47" style:family="paragraph" style:parent-style-name="Text_20_body" style:list-style-name="L2">
      <style:paragraph-properties fo:text-align="justify" style:justify-single-word="false"/>
      <style:text-properties officeooo:rsid="02e9b5fc" officeooo:paragraph-rsid="02e9b5fc"/>
    </style:style>
    <style:style style:name="P48" style:family="paragraph" style:parent-style-name="Text_20_body" style:list-style-name="L2">
      <style:paragraph-properties fo:text-align="justify" style:justify-single-word="false"/>
      <style:text-properties officeooo:rsid="02f939f1" officeooo:paragraph-rsid="02f939f1"/>
    </style:style>
    <style:style style:name="P49" style:family="paragraph" style:parent-style-name="Text_20_body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fo:padding="0cm" fo:border="none"/>
      <style:text-properties style:font-name="Liberation Serif" officeooo:rsid="031cdb06" officeooo:paragraph-rsid="031daf5f"/>
    </style:style>
    <style:style style:name="P50" style:family="paragraph" style:parent-style-name="Text_20_body">
      <style:paragraph-properties fo:margin-top="0.402cm" fo:margin-bottom="0.649cm" style:contextual-spacing="false" fo:text-align="justify" style:justify-single-word="false"/>
      <style:text-properties officeooo:rsid="0324cbe0" officeooo:paragraph-rsid="0324cbe0"/>
    </style:style>
    <style:style style:name="P51" style:family="paragraph">
      <style:paragraph-properties fo:text-align="center"/>
    </style:style>
    <style:style style:name="P52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53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54" style:family="paragraph">
      <loext:graphic-properties draw:fill="none" draw:fill-color="#ffffff"/>
      <style:paragraph-properties fo:text-align="center"/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P55" style:family="paragraph">
      <loext:graphic-properties draw:fill="solid" draw:fill-color="#dedce6"/>
      <style:paragraph-properties style:writing-mode="lr-tb"/>
    </style:style>
    <style:style style:name="P56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/>
    </style:style>
    <style:style style:name="T2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T3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T4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5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6" style:family="text">
      <style:text-properties style:font-name="MathJax_Typewriter" style:text-underline-style="solid" style:text-underline-width="auto" style:text-underline-color="font-color"/>
    </style:style>
    <style:style style:name="T7" style:family="text">
      <style:text-properties style:font-name="MathJax_Typewriter" style:text-underline-style="solid" style:text-underline-width="auto" style:text-underline-color="font-color" officeooo:rsid="02bb3e73"/>
    </style:style>
    <style:style style:name="T8" style:family="text">
      <style:text-properties style:font-name="MathJax_Typewriter" style:text-underline-style="solid" style:text-underline-width="auto" style:text-underline-color="font-color" officeooo:rsid="02bb588e"/>
    </style:style>
    <style:style style:name="T9" style:family="text">
      <style:text-properties style:font-name="MathJax_Typewriter" officeooo:rsid="02b58d36"/>
    </style:style>
    <style:style style:name="T10" style:family="text">
      <style:text-properties style:font-name="MathJax_Typewriter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style:font-name="MathJax_Typewriter" fo:font-style="italic" style:text-underline-style="solid" style:text-underline-width="auto" style:text-underline-color="font-color" officeooo:rsid="02bb3e73" style:font-style-asian="italic" style:font-style-complex="italic"/>
    </style:style>
    <style:style style:name="T12" style:family="text">
      <style:text-properties style:font-name="MathJax_Typewriter" officeooo:rsid="02da256d"/>
    </style:style>
    <style:style style:name="T13" style:family="text">
      <style:text-properties style:font-name="MathJax_Typewriter" officeooo:rsid="02dcaf04"/>
    </style:style>
    <style:style style:name="T14" style:family="text">
      <style:text-properties fo:font-weight="bold"/>
    </style:style>
    <style:style style:name="T15" style:family="text">
      <style:text-properties fo:font-weight="bold" officeooo:rsid="02a0362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2b513e8" style:font-weight-asian="bold" style:font-weight-complex="bold"/>
    </style:style>
    <style:style style:name="T18" style:family="text">
      <style:text-properties fo:font-weight="bold" officeooo:rsid="03027c92" style:font-weight-asian="bold" style:font-weight-complex="bold"/>
    </style:style>
    <style:style style:name="T19" style:family="text">
      <style:text-properties fo:font-weight="bold" officeooo:rsid="02bcef5b"/>
    </style:style>
    <style:style style:name="T20" style:family="text">
      <style:text-properties fo:font-weight="bold" officeooo:rsid="02cf7fba"/>
    </style:style>
    <style:style style:name="T21" style:family="text">
      <style:text-properties style:text-underline-style="none"/>
    </style:style>
    <style:style style:name="T22" style:family="text">
      <style:text-properties fo:color="#000000" loext:opacity="100%" fo:font-size="15pt" style:font-size-asian="15pt" style:font-size-complex="15pt"/>
    </style:style>
    <style:style style:name="T23" style:family="text">
      <style:text-properties fo:font-style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2a2311e" style:font-style-asian="italic" style:font-style-complex="italic"/>
    </style:style>
    <style:style style:name="T26" style:family="text">
      <style:text-properties fo:font-style="italic" officeooo:rsid="02abd977" style:font-style-asian="italic" style:font-style-complex="italic"/>
    </style:style>
    <style:style style:name="T27" style:family="text">
      <style:text-properties fo:font-style="italic" officeooo:rsid="02ac6913" style:font-style-asian="italic" style:font-style-complex="italic"/>
    </style:style>
    <style:style style:name="T28" style:family="text">
      <style:text-properties fo:font-style="italic" officeooo:rsid="02c5df56" style:font-style-asian="italic" style:font-style-complex="italic"/>
    </style:style>
    <style:style style:name="T29" style:family="text">
      <style:text-properties fo:font-style="italic" officeooo:rsid="02c8c348" style:font-style-asian="italic" style:font-style-complex="italic"/>
    </style:style>
    <style:style style:name="T30" style:family="text">
      <style:text-properties fo:font-style="italic" officeooo:rsid="02cfd2e7" style:font-style-asian="italic" style:font-style-complex="italic"/>
    </style:style>
    <style:style style:name="T31" style:family="text">
      <style:text-properties fo:font-style="italic" officeooo:rsid="02d30ac1" style:font-style-asian="italic" style:font-style-complex="italic"/>
    </style:style>
    <style:style style:name="T32" style:family="text">
      <style:text-properties fo:font-style="italic" officeooo:rsid="02e18ebb" style:font-style-asian="italic" style:font-style-complex="italic"/>
    </style:style>
    <style:style style:name="T33" style:family="text">
      <style:text-properties fo:font-style="italic" officeooo:rsid="02e59d83" style:font-style-asian="italic" style:font-style-complex="italic"/>
    </style:style>
    <style:style style:name="T34" style:family="text">
      <style:text-properties fo:font-style="italic" officeooo:rsid="02fcbd3b" style:font-style-asian="italic" style:font-style-complex="italic"/>
    </style:style>
    <style:style style:name="T35" style:family="text">
      <style:text-properties fo:font-style="italic" officeooo:rsid="0311049d" style:font-style-asian="italic" style:font-style-complex="italic"/>
    </style:style>
    <style:style style:name="T36" style:family="text">
      <style:text-properties fo:font-style="italic" officeooo:rsid="031563f7" style:font-style-asian="italic" style:font-style-complex="italic"/>
    </style:style>
    <style:style style:name="T37" style:family="text">
      <style:text-properties fo:font-style="italic" officeooo:rsid="0318f697" style:font-style-asian="italic" style:font-style-complex="italic"/>
    </style:style>
    <style:style style:name="T38" style:family="text">
      <style:text-properties fo:font-style="italic" officeooo:rsid="031a9ced" style:font-style-asian="italic" style:font-style-complex="italic"/>
    </style:style>
    <style:style style:name="T39" style:family="text">
      <style:text-properties fo:font-style="italic" fo:font-weight="bold" style:font-style-asian="italic" style:font-style-complex="italic"/>
    </style:style>
    <style:style style:name="T40" style:family="text">
      <style:text-properties fo:font-style="italic" fo:font-weight="bold" officeooo:rsid="02bcef5b" style:font-style-asian="italic" style:font-style-complex="italic"/>
    </style:style>
    <style:style style:name="T41" style:family="text">
      <style:text-properties fo:font-style="italic" officeooo:rsid="02fcde76"/>
    </style:style>
    <style:style style:name="T42" style:family="text">
      <style:text-properties fo:font-style="italic" fo:font-weight="normal" officeooo:rsid="0304558a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3027c92" style:font-style-asian="italic" style:font-weight-asian="normal" style:font-style-complex="italic" style:font-weight-complex="normal"/>
    </style:style>
    <style:style style:name="T44" style:family="text">
      <style:text-properties officeooo:rsid="02a0362d"/>
    </style:style>
    <style:style style:name="T45" style:family="text">
      <style:text-properties officeooo:rsid="02a358aa"/>
    </style:style>
    <style:style style:name="T46" style:family="text">
      <style:text-properties officeooo:rsid="02a67b7f"/>
    </style:style>
    <style:style style:name="T47" style:family="text">
      <style:text-properties officeooo:rsid="02abd977"/>
    </style:style>
    <style:style style:name="T48" style:family="text">
      <style:text-properties officeooo:rsid="02ac6913"/>
    </style:style>
    <style:style style:name="T49" style:family="text">
      <style:text-properties officeooo:rsid="02af86f5"/>
    </style:style>
    <style:style style:name="T50" style:family="text">
      <style:text-properties officeooo:rsid="02b58d36"/>
    </style:style>
    <style:style style:name="T51" style:family="text">
      <style:text-properties style:font-name="Liberation Serif"/>
    </style:style>
    <style:style style:name="T52" style:family="text">
      <style:text-properties style:font-name="Liberation Serif" officeooo:rsid="02b58d36"/>
    </style:style>
    <style:style style:name="T53" style:family="text">
      <style:text-properties style:font-name="Liberation Serif" officeooo:rsid="02da256d"/>
    </style:style>
    <style:style style:name="T54" style:family="text">
      <style:text-properties style:font-name="Liberation Serif" officeooo:rsid="02dcaf04"/>
    </style:style>
    <style:style style:name="T55" style:family="text">
      <style:text-properties officeooo:rsid="02b6aef1"/>
    </style:style>
    <style:style style:name="T56" style:family="text">
      <style:text-properties officeooo:rsid="02b82856"/>
    </style:style>
    <style:style style:name="T57" style:family="text">
      <style:text-properties officeooo:rsid="02bdd420"/>
    </style:style>
    <style:style style:name="T58" style:family="text">
      <style:text-properties officeooo:rsid="02bf64f4"/>
    </style:style>
    <style:style style:name="T59" style:family="text">
      <style:text-properties officeooo:rsid="02c12b95"/>
    </style:style>
    <style:style style:name="T60" style:family="text">
      <style:text-properties officeooo:rsid="02c32b4a"/>
    </style:style>
    <style:style style:name="T61" style:family="text">
      <style:text-properties officeooo:rsid="02c5df56"/>
    </style:style>
    <style:style style:name="T62" style:family="text">
      <style:text-properties officeooo:rsid="02cb9335"/>
    </style:style>
    <style:style style:name="T63" style:family="text">
      <style:text-properties officeooo:rsid="02ccb9d6"/>
    </style:style>
    <style:style style:name="T64" style:family="text">
      <style:text-properties officeooo:rsid="02cfd2e7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officeooo:rsid="02fcde76" style:font-style-asian="normal" style:font-style-complex="normal"/>
    </style:style>
    <style:style style:name="T67" style:family="text">
      <style:text-properties fo:font-style="normal" officeooo:rsid="02fdaec0" style:font-style-asian="normal" style:font-style-complex="normal"/>
    </style:style>
    <style:style style:name="T68" style:family="text">
      <style:text-properties fo:font-style="normal" officeooo:rsid="02fcedd8" style:font-style-asian="normal" style:font-style-complex="normal"/>
    </style:style>
    <style:style style:name="T69" style:family="text">
      <style:text-properties officeooo:rsid="02d30ac1"/>
    </style:style>
    <style:style style:name="T70" style:family="text">
      <style:text-properties officeooo:rsid="02d6b94c"/>
    </style:style>
    <style:style style:name="T71" style:family="text">
      <style:text-properties officeooo:rsid="02e0959e"/>
    </style:style>
    <style:style style:name="T72" style:family="text">
      <style:text-properties officeooo:rsid="02e18ebb"/>
    </style:style>
    <style:style style:name="T73" style:family="text">
      <style:text-properties officeooo:rsid="02e3aec2"/>
    </style:style>
    <style:style style:name="T74" style:family="text">
      <style:text-properties officeooo:rsid="02e4ae06"/>
    </style:style>
    <style:style style:name="T75" style:family="text">
      <style:text-properties officeooo:rsid="02e59739"/>
    </style:style>
    <style:style style:name="T76" style:family="text">
      <style:text-properties officeooo:rsid="02e59d83"/>
    </style:style>
    <style:style style:name="T77" style:family="text">
      <style:text-properties officeooo:rsid="02e6c43b"/>
    </style:style>
    <style:style style:name="T78" style:family="text">
      <style:text-properties officeooo:rsid="02e87977"/>
    </style:style>
    <style:style style:name="T79" style:family="text">
      <style:text-properties officeooo:rsid="02eb7c15"/>
    </style:style>
    <style:style style:name="T80" style:family="text">
      <style:text-properties fo:font-weight="normal" officeooo:rsid="02b513e8" style:font-weight-asian="normal" style:font-weight-complex="normal"/>
    </style:style>
    <style:style style:name="T81" style:family="text">
      <style:text-properties fo:font-weight="normal" officeooo:rsid="02ed7361" style:font-weight-asian="normal" style:font-weight-complex="normal"/>
    </style:style>
    <style:style style:name="T82" style:family="text">
      <style:text-properties fo:font-weight="normal" officeooo:rsid="02ef4cba" style:font-weight-asian="normal" style:font-weight-complex="normal"/>
    </style:style>
    <style:style style:name="T83" style:family="text">
      <style:text-properties fo:font-weight="normal" officeooo:rsid="0304558a" style:font-weight-asian="normal" style:font-weight-complex="normal"/>
    </style:style>
    <style:style style:name="T84" style:family="text">
      <style:text-properties fo:font-weight="normal" officeooo:rsid="03027c92" style:font-weight-asian="normal" style:font-weight-complex="normal"/>
    </style:style>
    <style:style style:name="T85" style:family="text">
      <style:text-properties officeooo:rsid="02f1cae3"/>
    </style:style>
    <style:style style:name="T86" style:family="text">
      <style:text-properties officeooo:rsid="02f377fe"/>
    </style:style>
    <style:style style:name="T87" style:family="text">
      <style:text-properties officeooo:rsid="02f5f524"/>
    </style:style>
    <style:style style:name="T88" style:family="text">
      <style:text-properties officeooo:rsid="02f783f8"/>
    </style:style>
    <style:style style:name="T89" style:family="text">
      <style:text-properties officeooo:rsid="02f7871b"/>
    </style:style>
    <style:style style:name="T90" style:family="text">
      <style:text-properties officeooo:rsid="02fa3ab5"/>
    </style:style>
    <style:style style:name="T91" style:family="text">
      <style:text-properties officeooo:rsid="02fbee53"/>
    </style:style>
    <style:style style:name="T92" style:family="text">
      <style:text-properties officeooo:rsid="02fcbd3b"/>
    </style:style>
    <style:style style:name="T93" style:family="text">
      <style:text-properties officeooo:rsid="02fcde76"/>
    </style:style>
    <style:style style:name="T94" style:family="text">
      <style:text-properties officeooo:rsid="02fcedd8"/>
    </style:style>
    <style:style style:name="T95" style:family="text">
      <style:text-properties officeooo:rsid="02fdaec0"/>
    </style:style>
    <style:style style:name="T96" style:family="text">
      <style:text-properties officeooo:rsid="03080393"/>
    </style:style>
    <style:style style:name="T97" style:family="text">
      <style:text-properties style:font-name="MathJax_Typewriter"/>
    </style:style>
    <style:style style:name="T98" style:family="text">
      <style:text-properties officeooo:rsid="030aa924"/>
    </style:style>
    <style:style style:name="T99" style:family="text">
      <style:text-properties officeooo:rsid="030b636e"/>
    </style:style>
    <style:style style:name="T100" style:family="text">
      <style:text-properties officeooo:rsid="030cadf3"/>
    </style:style>
    <style:style style:name="T101" style:family="text">
      <style:text-properties officeooo:rsid="030e76fa"/>
    </style:style>
    <style:style style:name="T102" style:family="text">
      <style:text-properties officeooo:rsid="0311049d"/>
    </style:style>
    <style:style style:name="T103" style:family="text">
      <style:text-properties officeooo:rsid="0312c8c5"/>
    </style:style>
    <style:style style:name="T104" style:family="text">
      <style:text-properties officeooo:rsid="0316eb30"/>
    </style:style>
    <style:style style:name="T105" style:family="text">
      <style:text-properties officeooo:rsid="031a9ced"/>
    </style:style>
    <style:style style:name="T106" style:family="text">
      <style:text-properties officeooo:rsid="031ac508"/>
    </style:style>
    <style:style style:name="T107" style:family="text">
      <style:text-properties officeooo:rsid="031bd7c2"/>
    </style:style>
    <style:style style:name="T108" style:family="text">
      <style:text-properties style:text-underline-style="solid" style:text-underline-width="auto" style:text-underline-color="font-color"/>
    </style:style>
    <style:style style:name="T109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110" style:family="text">
      <style:text-properties style:font-name="MathJax_Typewriter" fo:font-size="26pt" style:text-underline-style="none" style:font-size-asian="26pt" style:font-size-complex="26pt"/>
    </style:style>
    <style:style style:name="T111" style:family="text"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2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Forma 1" draw:style-name="gr4" draw:text-style-name="P55" svg:width="10.699cm" svg:height="29.795cm" svg:x="-2.833cm" svg:y="-2.82cm"><text:p/><draw:enhanced-geometry svg:viewBox="0 0 21600 21600" draw:type="rectangle" draw:enhanced-path="M 0 0 L 21600 0 21600 21600 0 21600 0 0 Z N"/></draw:custom-shape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draw:frame draw:style-name="fr1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draw:frame text:anchor-type="paragraph" draw:z-index="3" draw:name="Marco de texto 1" draw:style-name="gr3" draw:text-style-name="P54" svg:width="9.129cm" svg:height="4.296cm" svg:x="1.757cm" svg:y="0.247cm"><draw:text-box><text:p text:style-name="P51"><text:span text:style-name="T111">Planificació</text:span><text:span text:style-name="T111">n del </text:span><text:span text:style-name="T111">Proyecto - </text:span><text:span text:style-name="T111">Scrum</text:span></text:p></draw:text-box></draw:frame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draw:frame text:anchor-type="paragraph" draw:z-index="5" draw:name="Marco de texto 3" draw:style-name="gr1" draw:text-style-name="P52" svg:width="7.873cm" svg:height="1.414cm" svg:x="-0.6cm" svg:y="0.312cm"><draw:text-box><text:p text:style-name="P51"><text:span text:style-name="T109">Temporis:</text:span></text:p></draw:text-box></draw:frame><text:span text:style-name="T21"/></text:p>
      <text:p text:style-name="P2"><text:span text:style-name="T21"/></text:p>
      <text:p text:style-name="P2"><text:span text:style-name="T21"/></text:p>
      <text:p text:style-name="P2"><draw:frame text:anchor-type="paragraph" draw:z-index="4" draw:name="Marco de texto 2" draw:style-name="gr2" draw:text-style-name="P53" svg:width="7.839cm" svg:height="4.329cm" svg:x="-0.563cm" svg:y="0.381cm"><draw:text-box><text:p text:style-name="P51"><text:span text:style-name="T110">Una herramienta </text:span><text:span text:style-name="T110">accesible para el </text:span><text:span text:style-name="T110">control y la </text:span><text:span text:style-name="T110">optimización de </text:span><text:span text:style-name="T110">nuestro tiempo</text:span></text:p></draw:text-box></draw:frame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draw:custom-shape text:anchor-type="paragraph" draw:z-index="0" draw:name="Forma 2" draw:style-name="gr5" draw:text-style-name="P56" svg:width="2.449cm" svg:height="2.449cm" svg:x="8.46cm" svg:y="0.646cm"><text:p/><draw:enhanced-geometry svg:viewBox="0 0 21600 21600" draw:type="rectangle" draw:enhanced-path="M 0 0 L 21600 0 21600 21600 0 21600 0 0 Z N"/></draw:custom-shape><text:span text:style-name="T21"/></text:p>
      <text:p text:style-name="P3"><text:span text:style-name="T22"/></text:p>
      <text:h text:style-name="P4" text:outline-level="2"><text:soft-page-break/>1. Introducción y Metodología</text:h>
      <text:p text:style-name="P6">Para el desarrollo de <text:span text:style-name="T14">Temporis</text:span>, se adopta el marco de trabajo ágil <text:span text:style-name="T39">Scrum</text:span>, adaptando estratégicamente sus <text:span text:style-name="T45">eventos, ceremonias</text:span> y artefactos a un entorno de <text:span text:style-name="T14">desarrollo individual (</text:span><text:span text:style-name="T39">Solo-Scrum</text:span><text:span text:style-name="T14">)</text:span>. El ciclo de vida del proyecto se divide de forma estricta en <text:span text:style-name="T39">Sprints</text:span><text:span text:style-name="T14"> fijos de dos semanas de duración</text:span>.</text:p>
      <text:p text:style-name="P5">Esta ventana temporal garantiza un ritmo de inspección y adaptación constante, permitiendo desplegar <text:span text:style-name="T14">incrementos de </text:span><text:span text:style-name="T39">software</text:span><text:span text:style-name="T14"> potencialmente entregables</text:span> tras cada ciclo. La flexibilidad de este enfoque facilita la integración inmediata de las pautas de accesibilidad y las correcciones de diseño identificadas durante las fases de <text:span text:style-name="T45">prueba</text:span> continu<text:span text:style-name="T45">a</text:span>, mitigando <text:span text:style-name="T45">así posibles</text:span> riesgos de desviación, en el alcance final.</text:p>
      <text:p text:style-name="P5"/>
      <text:p text:style-name="P5"/>
      <text:h text:style-name="P4" text:outline-level="2">2. Product Backlog (Pila del Producto)</text:h>
      <text:p text:style-name="P5">El <text:span text:style-name="T24">Product Backlog</text:span> se compone de historias de usuario y requerimientos técnicos desglosados y ponderados según su valor para el <text:span text:style-name="T14">Mínimo Producto Viable (MVP)</text:span> y su impacto en la <text:span text:style-name="T14">inclusión digital</text:span>. La priorización sigue una taxonomía estricta de dependencias técnicas:</text:p>
      <text:p text:style-name="P5"/>
      <text:list text:style-name="L1">
        <text:list-item>
          <text:p text:style-name="P14">Prioridad Alta (Bloque de Infraestructura y Core CRUD):</text:p>
          <text:list>
            <text:list-item>
              <text:p text:style-name="P19">Aprovisionamiento del entorno de desarrollo y SDKs esenciales.</text:p>
            </text:list-item>
            <text:list-item>
              <text:p text:style-name="P19">Capa de persistencia <text:span text:style-name="T24">cloud</text:span> y aislamiento criptográfico de datos (<text:span text:style-name="T24">Firebase</text:span>).</text:p>
            </text:list-item>
            <text:list-item>
              <text:p text:style-name="P19">Gestión de la lógica operacional y transaccional del temporizador.</text:p>
              <text:p text:style-name="P19"/>
            </text:list-item>
          </text:list>
        </text:list-item>
        <text:list-item>
          <text:p text:style-name="P14">Prioridad Media (Lógica del Contador, Arquitectura y UI Base):</text:p>
          <text:list>
            <text:list-item>
              <text:p text:style-name="P19">Sincronización asíncrona en segundo plano (Corrutinas de <text:span text:style-name="T24">Kotlin</text:span> y Servicios nativos).</text:p>
            </text:list-item>
            <text:list-item>
              <text:p text:style-name="P19">Estructura arquitectónica limpia siguiendo el patrón MVVM.</text:p>
            </text:list-item>
            <text:list-item>
              <text:p text:style-name="P19">Implementación de la interfaz responsiva y soporte nativo para el Modo Oscuro.</text:p>
              <text:p text:style-name="P19"/>
            </text:list-item>
          </text:list>
        </text:list-item>
        <text:list-item>
          <text:p text:style-name="P14">Prioridad Baja (Analítica Avanzada y Optimización de la Accesibilidad):</text:p>
          <text:list>
            <text:list-item>
              <text:p text:style-name="P19">Módulo estadístico y renderizado del mapa de calor de productividad (<text:span text:style-name="T23">heatmap</text:span>).</text:p>
            </text:list-item>
            <text:list-item>
              <text:p text:style-name="P19">Temas de interfaz adaptados a entornos de baja visión (Modo de Alto Contraste).</text:p>
            </text:list-item>
            <text:list-item>
              <text:p text:style-name="P19">Pulido fino de microinteracciones, transiciones visuales y animaciones inclusivas.</text:p>
            </text:list-item>
          </text:list>
        </text:list-item>
      </text:list>
      <text:p text:style-name="P10"/>
      <text:p text:style-name="P10"/>
      <text:p text:style-name="P10"/>
      <text:h text:style-name="P4" text:outline-level="2"><text:soft-page-break/><text:span text:style-name="T21">3. </text:span>Planificación de <text:span text:style-name="T24">Sprints</text:span> (<text:span text:style-name="T24">Sprint Backlog</text:span>)</text:h>
      <text:h text:style-name="P8" text:outline-level="4"><text:span text:style-name="T10">Sprint </text:span><text:span text:style-name="T11">0</text:span><text:span text:style-name="T10">: </text:span><text:span text:style-name="T6">I</text:span><text:span text:style-name="T7">ncialización de la </text:span><text:span text:style-name="T8">I</text:span><text:span text:style-name="T6">nfraestructura Base y Modelo de Datos </text:span><text:span text:style-name="T10">Cloud</text:span></text:h>
      <text:list text:style-name="L2">
        <text:list-item>
          <text:p text:style-name="P20"><text:span text:style-name="T14">Duración:</text:span> “2 semanas.” <text:span text:style-name="T62">[</text:span><text:span text:style-name="T61">desarrollado aprovechando momentos libres durante un periodo de unos dos meses y medio. Resulta complicado definir una duración concreta para esta primera fase del desarrollo debido a que, en ese momento, el tiempo libre disponible era bastante limitado, compaginando el trabajo, el desarrollo de las tareas (</text:span><text:span text:style-name="T28">relacionadas con las otras asignaturas </text:span><text:span text:style-name="T29">del CFGS en DAM</text:span><text:span text:style-name="T61">) y el desarrollo del proyecto en cuestión </text:span><text:span text:style-name="T73">(en la asignatura PMDM)</text:span><text:span text:style-name="T62">]</text:span></text:p>
        </text:list-item>
        <text:list-item>
          <text:p text:style-name="P15">Tareas Programadas y Desglose Granular:</text:p>
          <text:list>
            <text:list-item>
              <text:p text:style-name="P21">Configuración inicial del proyecto <text:span text:style-name="T47">mediante el uso del </text:span><text:span text:style-name="T26">IDE</text:span><text:span text:style-name="T47"> </text:span>Android Studio, <text:span text:style-name="T48">de</text:span> <text:span text:style-name="T24">Gradle</text:span> <text:span text:style-name="T48">(como herramienta de </text:span><text:span text:style-name="T47">Gestión de dependencias) </text:span>y <text:span text:style-name="T48">también el</text:span> control de versiones <text:span text:style-name="T24">Git</text:span>, <text:span text:style-name="T48">a través de </text:span><text:span text:style-name="T27">Github</text:span>.</text:p>
            </text:list-item>
            <text:list-item>
              <text:p text:style-name="P21">Vinculación y autenticación del proyecto con la consola de Firebase.</text:p>
            </text:list-item>
            <text:list-item>
              <text:p text:style-name="P21">Implementación <text:span text:style-name="T49">inicial </text:span>de las <text:span text:style-name="T23">Security Rules</text:span> de <text:span text:style-name="T24">Cloud Firestore</text:span>, para el aislamiento de <text:span text:style-name="T49">los</text:span> datos, <text:span text:style-name="T49">filtrando por el</text:span> UID de <text:span text:style-name="T49">cada</text:span> usuario.</text:p>
            </text:list-item>
            <text:list-item>
              <text:p text:style-name="P22">Diseño y codificación de las clases de datos base (POJOs (<text:span text:style-name="Emphasis">Plain Old Java Object</text:span>)/<text:span text:style-name="T24">Data Classes</text:span>) en <text:span text:style-name="T24">Kotlin</text:span>: <text:span text:style-name="Source_20_Text"><text:span text:style-name="T1">User.</text:span></text:span><text:span text:style-name="Source_20_Text"><text:span text:style-name="T9">java</text:span></text:span>, <text:span text:style-name="Source_20_Text"><text:span text:style-name="T1">Timer.</text:span></text:span><text:span text:style-name="Source_20_Text"><text:span text:style-name="T9">java</text:span></text:span><text:span text:style-name="Source_20_Text"><text:span text:style-name="T52">,</text:span></text:span> <text:span text:style-name="Source_20_Text"><text:span text:style-name="T1">TimeRegister.</text:span></text:span><text:span text:style-name="Source_20_Text"><text:span text:style-name="T9">java</text:span></text:span> <text:span text:style-name="T50">y </text:span><text:span text:style-name="Source_20_Text"><text:span text:style-name="T1">Post.kt</text:span></text:span><text:span text:style-name="T50">.</text:span></text:p>
            </text:list-item>
            <text:list-item>
              <text:p text:style-name="P28">I<text:span text:style-name="T93">nicialización e i</text:span>ntegración <text:span text:style-name="T93">inicial</text:span> de/<text:span text:style-name="T93">con</text:span> <text:span text:style-name="T23">Firebase Auth</text:span><text:span text:style-name="T65"> </text:span><text:span text:style-name="T66">y </text:span><text:span text:style-name="T41">Firebase Firestore.</text:span></text:p>
            </text:list-item>
            <text:list-item>
              <text:p text:style-name="P28"><text:span text:style-name="T41">M</text:span>aquetación/<text:span text:style-name="T94">Programación</text:span> <text:span text:style-name="T55">inicial </text:span>de la<text:span text:style-name="T64">s</text:span> <text:span text:style-name="T94">vistas/</text:span>pantalla<text:span text:style-name="T64">s</text:span> de: <text:span text:style-name="T24">Login</text:span><text:span text:style-name="T65">,</text:span> <text:span text:style-name="T30">Register, Timers, Timer y “User Dashboard”</text:span>.</text:p>
            </text:list-item>
          </text:list>
        </text:list-item>
        <text:list-item>
          <text:p text:style-name="P23"><text:span text:style-name="T14">Estado de Entrega (Tareas Realizadas):</text:span> “100%” completado y verificado en entorno local, <text:span text:style-name="T56">aunque con ciertos errores, </text:span><text:span text:style-name="T69">sobretodo relacionados con la actualización de los datos del usuario con la sesión iniciada, tratando de sincronizar e insertar/actualizar los nuevos datos, en </text:span><text:span text:style-name="T31">Firebase Firestore</text:span>.</text:p>
        </text:list-item>
        <text:list-item>
          <text:p text:style-name="P24"><text:span text:style-name="T19">Comentario acerca del “</text:span><text:span text:style-name="T40">sprint</text:span><text:span text:style-name="T19"> inic</text:span><text:span text:style-name="T20">i</text:span><text:span text:style-name="T19">al”</text:span><text:span text:style-name="T14">:</text:span> <text:span text:style-name="T57">Esta primera fase del desarrollo del proyecto se realizó durante el periodo de tiempo aproximado que comprendió desde mediados de </text:span><text:span text:style-name="T63">Febrero</text:span><text:span text:style-name="T57"> hasta mediados de Mayo (ambos del año 2025)</text:span>, <text:span text:style-name="T59">durante el desarrollo de la propuesta inicial de aplicación para Android. Se entregó en tiempo y forma adecuados, aunque</text:span><text:span text:style-name="T56"> </text:span><text:span text:style-name="T58">manifestando </text:span><text:span text:style-name="T60">y “manteniendo”</text:span><text:span text:style-name="T56"> ciertos errores/</text:span><text:span text:style-name="T60">disfunciones,</text:span><text:span text:style-name="T56"> </text:span><text:span text:style-name="T58">de forma </text:span><text:span text:style-name="T59">continuada</text:span>.</text:p>
        </text:list-item>
      </text:list>
      <text:p text:style-name="P7"/>
      <text:p text:style-name="P7"/>
      <text:p text:style-name="P7"/>
      <text:p text:style-name="P7"/>
      <text:h text:style-name="P9" text:outline-level="4"><text:soft-page-break/><text:span text:style-name="T10">Sprint 1</text:span><text:span text:style-name="T6">: Infraestructura Base y Modelo de Datos </text:span><text:span text:style-name="T10">Cloud</text:span></text:h>
      <text:list xml:id="list190429688359981" text:continue-numbering="true" text:style-name="L2">
        <text:list-item>
          <text:p text:style-name="P42"><text:span text:style-name="T14">Duración:</text:span> 2 semanas.</text:p>
        </text:list-item>
        <text:list-item>
          <text:p text:style-name="P16">Tareas Programadas:</text:p>
          <text:list>
            <text:list-item>
              <text:p text:style-name="P27"><text:span text:style-name="T71">Ajuste, </text:span><text:span text:style-name="T89">reparación</text:span><text:span text:style-name="T71"> y mejora de la c</text:span>onfiguración del proyecto. </text:p>
              <text:p text:style-name="P27"><text:span text:style-name="T87">(Deuda técnica) </text:span><text:span text:style-name="T76">Durante </text:span><text:span text:style-name="T70">esta primera etapa, se </text:span><text:span text:style-name="T76">han solucionado</text:span><text:span text:style-name="T70"> los errores </text:span><text:span text:style-name="T76">que seguían presentes al finalizar la </text:span><text:span text:style-name="T33">release</text:span><text:span text:style-name="T76">/versión</text:span><text:span text:style-name="T70"> “</text:span><text:span text:style-name="T76">Temporis Pre-release v1.0.0”, </text:span><text:span text:style-name="T77">consistiendo</text:span><text:span text:style-name="T76"> </text:span><text:span text:style-name="T72">principalmente </text:span><text:span text:style-name="T77">en la funcionalidad </text:span><text:span text:style-name="T102">para actualizar los datos de </text:span><text:span text:style-name="T35">User</text:span><text:span text:style-name="T32"> </text:span><text:span text:style-name="T72">en </text:span><text:span text:style-name="T32">F. Firestore</text:span><text:span text:style-name="T72">.</text:span></text:p>
              <text:p text:style-name="P48">(Deuda técnica) Ajuste de la apariencia estética. Corregimos el límite de <text:span text:style-name="T24">scroll</text:span> vertical (en la lista de contadores). Y mejoramos/rediseñamos la apariencia de las tarjetas (o <text:span text:style-name="T24">card</text:span>) utilizadas para presentar los diferentes temporizadores/contadores.</text:p>
            </text:list-item>
            <text:list-item>
              <text:p text:style-name="P25"><text:span text:style-name="T90">(Mejora) </text:span><text:span text:style-name="T78">Resetructuración, </text:span><text:span text:style-name="T88">preparación</text:span><text:span text:style-name="T78"> y mejora de la interfaz de la aplicación, para poder añadir las nuevas funcionalidades y secciones</text:span>.</text:p>
            </text:list-item>
            <text:list-item>
              <text:p text:style-name="P47"><text:span text:style-name="T90">(Mejora) </text:span><text:span text:style-name="T85">Inicialización </text:span>de las nuevas vistas/secciones y modificación/ajuste de las preexistentes.</text:p>
            </text:list-item>
            <text:list-item>
              <text:p text:style-name="P25"><text:span text:style-name="T90">(Deuda técnica) </text:span><text:span text:style-name="T74">Ajuste</text:span><text:span text:style-name="T49"> </text:span>de las <text:span text:style-name="T23">Security Rules</text:span> de <text:span text:style-name="T24">Cloud Firestore</text:span>, para el aislamiento de <text:span text:style-name="T49">los</text:span> datos, <text:span text:style-name="T49">filtrando por el</text:span> UID de <text:span text:style-name="T49">cada</text:span> usuario. <text:span text:style-name="T74">El error a la hora de actualizar los datos del usuario se debía a un desajuste en la definición de las reglas de seguridad, relacionadas con la clase usuario.</text:span></text:p>
            </text:list-item>
            <text:list-item>
              <text:p text:style-name="P25"><text:span text:style-name="T91">(Mejora) </text:span><text:span text:style-name="T76">Ajuste del d</text:span>iseño y codificación de las clases de datos base (<text:span text:style-name="T24">POJOs</text:span> (<text:span text:style-name="Emphasis">Plain Old Java Object</text:span>)/<text:span text:style-name="T24">Data Classes</text:span>), <text:span text:style-name="T79">codificadas</text:span> en <text:span text:style-name="T74">Java o </text:span><text:span text:style-name="T24">Kotlin</text:span>: <text:span text:style-name="Source_20_Text"><text:span text:style-name="T1">User.</text:span></text:span><text:span text:style-name="Source_20_Text"><text:span text:style-name="T9">java</text:span></text:span>, <text:span text:style-name="Source_20_Text"><text:span text:style-name="T1">Timer.</text:span></text:span><text:span text:style-name="Source_20_Text"><text:span text:style-name="T9">java</text:span></text:span><text:span text:style-name="Source_20_Text"><text:span text:style-name="T52">,</text:span></text:span> <text:span text:style-name="Source_20_Text"><text:span text:style-name="T1">TimeRegister.</text:span></text:span><text:span text:style-name="Source_20_Text"><text:span text:style-name="T9">java</text:span></text:span> <text:span text:style-name="T50">y </text:span><text:span text:style-name="Source_20_Text"><text:span text:style-name="T1">Post.kt</text:span></text:span><text:span text:style-name="T50">. </text:span><text:span text:style-name="T74">En nuestro caso, la única clase que se encuentra programada en Kotlin es Post.kt.</text:span></text:p>
            </text:list-item>
            <text:list-item>
              <text:p text:style-name="P29"><text:span text:style-name="T92">(Mejora) </text:span><text:span text:style-name="T75">Ajuste de la i</text:span>ntegración <text:span text:style-name="T92">y de la funcionalidad</text:span> de <text:span text:style-name="T23">Firebase Auth</text:span> y <text:span text:style-name="T34">Firebase Firestore</text:span><text:span text:style-name="T92">.</text:span></text:p>
            </text:list-item>
            <text:list-item>
              <text:p text:style-name="P29"><text:span text:style-name="T67">(Mejora) </text:span><text:span text:style-name="T68">Dediseño, reestructuración y mejora de las vistas existentes: </text:span><text:span text:style-name="T24">Login</text:span><text:span text:style-name="T65">,</text:span> <text:span text:style-name="T30">Register, Timers, Timer y “User Dashboard”</text:span>.</text:p>
            </text:list-item>
            <text:list-item>
              <text:p text:style-name="P31"><text:span text:style-name="T95">(Mejora) </text:span><text:span text:style-name="T94">Inicialización preliminar de las nuevas vistas (vacías) y ajuste de las redirecciones necesarias para poder acceder a estas.</text:span></text:p>
            </text:list-item>
            <text:list-item>
              <text:p text:style-name="P32"><text:span text:style-name="T98">(Deuda técnica) </text:span><text:span text:style-name="T86">Reorganización</text:span> de la estructura de paquetes <text:span text:style-name="T86">del proyecto</text:span> según <text:span text:style-name="T86">los principios de</text:span> <text:span text:style-name="T24">Clean Architecture</text:span> (<text:span text:style-name="T86">directorios: </text:span><text:span text:style-name="Source_20_Text"><text:span text:style-name="T12">adapter</text:span></text:span><text:span text:style-name="Source_20_Text"><text:span text:style-name="T53">,</text:span></text:span><text:span text:style-name="Source_20_Text"><text:span text:style-name="T12"> model</text:span></text:span><text:span text:style-name="Source_20_Text"><text:span text:style-name="T53">,</text:span></text:span><text:span text:style-name="Source_20_Text"><text:span text:style-name="T12"> repository</text:span></text:span><text:span text:style-name="Source_20_Text"><text:span text:style-name="T53">,</text:span></text:span><text:span text:style-name="Source_20_Text"><text:span text:style-name="T12"> ui</text:span></text:span><text:span text:style-name="Source_20_Text"><text:span text:style-name="T53"> y </text:span></text:span><text:span text:style-name="Source_20_Text"><text:span text:style-name="T12">util</text:span></text:span>).</text:p>
            </text:list-item>
            <text:list-item>
              <text:p text:style-name="P33"><text:span text:style-name="T98">(Deuda técnica) </text:span>Implementación del patrón <text:span text:style-name="T24">Repository</text:span> (<text:span text:style-name="Source_20_Text"><text:span text:style-name="T1">TimerRepository.kt</text:span></text:span><text:span text:style-name="Source_20_Text"><text:span text:style-name="T51">,</text:span></text:span><text:span text:style-name="Source_20_Text"><text:span text:style-name="T1"> </text:span></text:span><text:span text:style-name="Source_20_Text"><text:span text:style-name="T13">UserRepository.kt</text:span></text:span><text:span text:style-name="Source_20_Text"><text:span text:style-name="T54"> y</text:span></text:span><text:span text:style-name="Source_20_Text"><text:span text:style-name="T13"> PostRepository.kt</text:span></text:span>) para la abstracción de operaciones <text:span text:style-name="T24">CRUD</text:span> con <text:span text:style-name="T24">Firestore</text:span>.</text:p>
            </text:list-item>
            <text:list-item>
              <text:p text:style-name="P34"><text:span text:style-name="T100">(Deuda técnica) </text:span>Desarrollo de los <text:span text:style-name="T24">ViewModels</text:span> (<text:span text:style-name="T99">ej: </text:span><text:span text:style-name="Source_20_Text"><text:span text:style-name="T1">TimerViewModel.kt</text:span></text:span>) con control <text:span text:style-name="T24">de</text:span> estado mediante <text:span text:style-name="Source_20_Text"><text:span text:style-name="T1">MutableStateFlow</text:span></text:span>.</text:p>
            </text:list-item>
            <text:list-item>
              <text:p text:style-name="P34"><text:span text:style-name="T104">(Mejora) </text:span>Despliegue <text:span text:style-name="T101">y mejora</text:span> del motor de cuenta atrás del temporizador mediante hilos asíncronos eficientes (<text:span text:style-name="T23">Kotlin Coroutines</text:span>).</text:p>
            </text:list-item>
          </text:list>
        </text:list-item>
        <text:list-item>
          <text:p text:style-name="P26"><text:soft-page-break/><text:span text:style-name="T17">Estado de Entrega (Tareas Realizadas):</text:span><text:span text:style-name="T80"> </text:span><text:span text:style-name="T81">Se han</text:span><text:span text:style-name="T80"> completado </text:span><text:span text:style-name="T82">y verificado</text:span><text:span text:style-name="T80"> </text:span><text:span text:style-name="T81">en base a nuestra definición de “hecho”</text:span><text:span text:style-name="T80">.</text:span></text:p>
        </text:list-item>
        <text:list-item>
          <text:p text:style-name="P35"><text:span text:style-name="T18">Comentario adicional: </text:span><text:span text:style-name="T84">En una mayoría de las tareas definidas en el tablero </text:span><text:span text:style-name="T43">Kanban</text:span><text:span text:style-name="T84">, también se ha definido una historia de usuario, redactada con el lenguaje estructurado </text:span><text:span text:style-name="T43">G</text:span><text:span text:style-name="T42">h</text:span><text:span text:style-name="T43">erkin</text:span><text:span text:style-name="T84">, </text:span><text:span text:style-name="T83">en el interior de cada tarjeta (o </text:span><text:span text:style-name="T42">card</text:span><text:span text:style-name="T83">)</text:span><text:span text:style-name="T84">.</text:span></text:p>
        </text:list-item>
      </text:list>
      <text:h text:style-name="P11" text:outline-level="4"><text:span text:style-name="T24">Sprint </text:span><text:span text:style-name="T36">2</text:span>: Diseño de Interfaces Responsivas y Accesibilidad Universal (LSE/WCAG)</text:h>
      <text:list text:style-name="L4">
        <text:list-item>
          <text:p text:style-name="P43"><text:span text:style-name="T14">Duración:</text:span> 2 semanas.</text:p>
        </text:list-item>
        <text:list-item>
          <text:p text:style-name="P17">Tareas Programadas:</text:p>
          <text:list>
            <text:list-item>
              <text:p text:style-name="P37">Diseño y maquetación del árbol de vistas XML utilizando componentes adaptativos (<text:span text:style-name="Source_20_Text"><text:span text:style-name="T1">ConstraintLayout</text:span></text:span>).</text:p>
            </text:list-item>
            <text:list-item>
              <text:p text:style-name="P37">Implementación y unificación del sistema de diseño visual (estilos de botones redondeados, gradientes y jerarquía tipográfica).</text:p>
            </text:list-item>
            <text:list-item>
              <text:p text:style-name="P37">Creación e integración de los recursos de color para soporte nativo de <text:span text:style-name="T14">Modo Oscuro</text:span> y <text:span text:style-name="T14">Modo de Alto Contraste</text:span>.</text:p>
            </text:list-item>
            <text:list-item>
              <text:p text:style-name="P37">Inyección de atributos <text:span text:style-name="Source_20_Text"><text:span text:style-name="T1">contentDescription</text:span></text:span> en todos los componentes interactivos e imágenes para la correcta verbalización en el lector de pantallas <text:span text:style-name="T23">TalkBack</text:span>.</text:p>
            </text:list-item>
            <text:list-item>
              <text:p text:style-name="P37">Ajuste del escalado tipográfico adaptativo dinámico en unidades <text:span text:style-name="Source_20_Text">sp</text:span> (hasta 30sp) previniendo el desbordamiento o colapso de las vistas de la interfaz.</text:p>
            </text:list-item>
          </text:list>
        </text:list-item>
        <text:list-item>
          <text:p text:style-name="P36"><text:span text:style-name="T14">Estado de Entrega (Tareas Realizadas):</text:span> Completado. Las vistas de configuración de accesibilidad y selección de modos son completamente funcionales. Código integrado en la rama principal (<text:span text:style-name="T23">main</text:span>) tras <text:span text:style-name="T103">haber</text:span> supera<text:span text:style-name="T103">do primero las pruebas manuales y posteriormente, también</text:span> los <text:span text:style-name="T24">test</text:span> unitarios <text:span text:style-name="T103">y de integración</text:span>.</text:p>
        </text:list-item>
      </text:list>
      <text:list text:continue-list="list190429688359981" text:style-name="L2">
        <text:list-item>
          <text:p text:style-name="P30"><text:span text:style-name="T18">Comentario adicional: </text:span><text:span text:style-name="T84">En una mayoría de las tareas definidas en el tablero </text:span><text:span text:style-name="T43">Kanban</text:span><text:span text:style-name="T84">, también se ha definido una historia de usuario, redactada con el lenguaje estructurado </text:span><text:span text:style-name="T43">G</text:span><text:span text:style-name="T42">h</text:span><text:span text:style-name="T43">erkin</text:span><text:span text:style-name="T84">, </text:span><text:span text:style-name="T83">en el interior de cada tarjeta (o </text:span><text:span text:style-name="T42">card</text:span><text:span text:style-name="T83">)</text:span><text:span text:style-name="T84">.</text:span></text:p>
        </text:list-item>
      </text:list>
      <text:p text:style-name="P38"><text:span text:style-name="T84"/></text:p>
      <text:p text:style-name="P38"><text:span text:style-name="T84"/></text:p>
      <text:p text:style-name="P38"><text:span text:style-name="T84"/></text:p>
      <text:h text:style-name="P11" text:outline-level="4"><text:soft-page-break/><text:span text:style-name="T24">Sprint </text:span><text:span text:style-name="T37">3</text:span><text:span text:style-name="T65">:</text:span> <text:span text:style-name="T96">Documentación, </text:span>Control de Calidad (QA), Inspección Estática y Cierre</text:h>
      <text:list text:style-name="L5">
        <text:list-item>
          <text:p text:style-name="P45"><text:span text:style-name="T14">Duración:</text:span> 2 semanas.</text:p>
        </text:list-item>
        <text:list-item>
          <text:p text:style-name="P18">Tareas Programadas:</text:p>
          <text:list>
            <text:list-item>
              <text:p text:style-name="P44">Configuración del servidor <text:span text:style-name="T106">remoto mediante Github Action,</text:span> de <text:span text:style-name="T106">la exportación de los datos hacia</text:span> <text:span text:style-name="T39">SonarQube</text:span> y <text:span text:style-name="T106">de la</text:span> ejecución del plugin de Gradle, para análisis estático de código.</text:p>
            </text:list-item>
            <text:list-item>
              <text:p text:style-name="P44">Refactorización y limpieza de la complejidad ciclomática en ViewModels y erradicación de <text:span text:style-name="T23">code smells</text:span> detectados.</text:p>
            </text:list-item>
            <text:list-item>
              <text:p text:style-name="P46">Escritura y ejecución de baterías de pruebas unitarias con JUnit e instrumentales de interfaz con el framework Espresso.</text:p>
            </text:list-item>
            <text:list-item>
              <text:p text:style-name="P46">Escritura y ejecución de baterías de pruebas <text:span text:style-name="T107">de integración entre componentes.</text:span></text:p>
            </text:list-item>
            <text:list-item>
              <text:p text:style-name="P44"><text:span text:style-name="T105">Comprobación manual</text:span> de <text:span text:style-name="T105">la </text:span>accesibilidad móvil <text:span text:style-name="T105">desde un </text:span><text:span text:style-name="T38">smartphone</text:span><text:span text:style-name="T105"> físico</text:span>.</text:p>
            </text:list-item>
            <text:list-item>
              <text:p text:style-name="P44">Compilación del artefacto final corregido y redacción de las memorias técnicas y de control de calidad.</text:p>
            </text:list-item>
          </text:list>
        </text:list-item>
        <text:list-item>
          <text:p text:style-name="P44"><text:span text:style-name="T14">Estado de Entrega (Tareas “Realizadas”):</text:span> <text:span text:style-name="T46">En proceso</text:span>. <text:span text:style-name="T46">El objetivo de la c</text:span>obertura de código <text:span text:style-name="T46">que queremos validar en un futuro, debería de encontrarse </text:span>por encima del 85% y <text:span text:style-name="T46">con la </text:span>pasarela de calidad (<text:span text:style-name="T23">Quality Gate</text:span>) aprobada.</text:p>
        </text:list-item>
        <text:list-item>
          <text:p text:style-name="P40"><text:span text:style-name="T18">Comentario adicional: </text:span><text:span text:style-name="T84">En una mayoría de las tareas definidas en el tablero </text:span><text:span text:style-name="T43">Kanban</text:span><text:span text:style-name="T84">, también se ha definido una historia de usuario, redactada con el lenguaje estructurado </text:span><text:span text:style-name="T43">G</text:span><text:span text:style-name="T42">h</text:span><text:span text:style-name="T43">erkin</text:span><text:span text:style-name="T84">, </text:span><text:span text:style-name="T83">en el interior de cada tarjeta (o </text:span><text:span text:style-name="T42">card</text:span><text:span text:style-name="T83">)</text:span><text:span text:style-name="T84">.</text:span></text:p>
        </text:list-item>
      </text:list>
      <text:p text:style-name="P41"><text:span text:style-name="T84"/></text:p>
      <text:p text:style-name="P41"><text:span text:style-name="T84"/></text:p>
      <text:p text:style-name="P41"><text:span text:style-name="T84"/></text:p>
      <text:p text:style-name="P41"><text:span text:style-name="T84"/></text:p>
      <text:p text:style-name="P50"><text:span text:style-name="T16">PD:</text:span> Durante el desarrollo de alguno de los <text:span text:style-name="T24">sprints</text:span> definidos, hemos sufrido algunos pequeños retrasos, debido principalmente a la limitada disponibilidad de tiempo operativo, aunque hemos sido capaces de reajustar los flujos de trabajo y continuar con el desarrollo favorable del proyecto.</text:p>
      <text:p text:style-name="P5"/>
      <text:p text:style-name="P5"/>
      <text:h text:style-name="P4" text:outline-level="2"><text:soft-page-break/>4. Tablero Kanban (Herramienta de Gestión)</text:h>
      <text:p text:style-name="P5">Para el seguimiento visual, <text:span text:style-name="T44">se ha </text:span>utiliz<text:span text:style-name="T44">ado</text:span> un tablero <text:span text:style-name="T14">Kanban, </text:span><text:span text:style-name="T15">creado y administrado mediante</text:span><text:span text:style-name="T14"> GitHub Projects</text:span>, <text:span text:style-name="T44">en el cual,</text:span> las tareas, <text:span text:style-name="T44">han ido</text:span> transitan<text:span text:style-name="T44">do/desplazándose</text:span> por/<text:span text:style-name="T44">a través de</text:span> las columnas <text:span text:style-name="T44">definidas</text:span>: <text:span text:style-name="T25">New issues, Ice Box, Product Backlog, Sprint </text:span><text:span text:style-name="T24">Backlog, In Progress, </text:span><text:span text:style-name="T25">In Review</text:span><text:span text:style-name="T24"> y Done.</text:span> Esto me permite detectar cuellos de botella en la fase de diseño de interfaces.</text:p>
      <text:h text:style-name="P12" text:outline-level="4">Estado inicial:</text:h>
      <text:h text:style-name="P13" text:outline-level="4"><draw:frame draw:style-name="fr2" draw:name="Imagen1" text:anchor-type="char" svg:width="17.806cm" svg:height="8.322cm" draw:z-index="6"><draw:image xlink:href="Pictures/100000010000077D0000038016F93D3D.png" xlink:type="simple" xlink:show="embed" xlink:actuate="onLoad" draw:mime-type="image/png"/></draw:frame><text:span text:style-name="T108">Estado actual (a 27/5/2026):</text:span></text:h>
      <text:p text:style-name="P49"><draw:frame draw:style-name="fr1" draw:name="Imagen3" text:anchor-type="char" svg:x="0.056cm" svg:y="-0.005cm" svg:width="17.806cm" svg:height="11.15cm" draw:z-index="7"><draw:image xlink:href="Pictures/1000000100000650000003F4FC6F81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Mona Sans VF" svg:font-family="'Mona Sans VF', apple-system, BlinkMacSystemFont, 'Segoe UI', 'Noto Sans', Helvetica, Arial, sans-serif, 'Apple Color Emoji', 'Segoe UI Emoji'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MT2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MT3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4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67cm" fo:margin-bottom="1.154cm" fo:margin-left="2cm" fo:margin-right="1.1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lanificación del Proyecto - Scrum</text:span><text:span text:style-name="MT2"><text:tab/></text:span><text:span text:style-name="MT3">Kevin Zamora </text:span><text:span text:style-name="MT4">Amela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5-27T19:04:29.330945366</dc:date>
    <meta:editing-duration>P1DT2H57M30S</meta:editing-duration>
    <meta:editing-cycles>705</meta:editing-cycles>
    <meta:print-date>2026-04-25T00:02:49.450270482</meta:print-date>
    <meta:printed-by>Archivos PDF</meta:printed-by>
    <meta:document-statistic meta:table-count="0" meta:image-count="3" meta:object-count="0" meta:page-count="7" meta:paragraph-count="77" meta:word-count="1505" meta:character-count="10081" meta:non-whitespace-character-count="8709"/>
  </office:meta>
</office:document-meta>
</file>
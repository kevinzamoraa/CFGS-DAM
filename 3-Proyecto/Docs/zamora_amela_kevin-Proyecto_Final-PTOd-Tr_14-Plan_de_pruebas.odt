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7A000004620EF53577.png" manifest:media-type="image/png"/>
  <manifest:file-entry manifest:full-path="Pictures/10000001000001B0000001B04AB7F5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Arial Black" svg:font-family="'Arial Black'"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SansSerif" svg:font-family="MathJax_SansSerif" style:font-family-generic="swiss" style:font-pitch="variable"/>
    <style:font-face style:name="MathJax_Typewriter" svg:font-family="MathJax_Typewriter" style:font-family-generic="moder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DetalladaDeEstrategiaDePruebas" style:family="table">
      <style:table-properties style:width="17.806cm" table:align="margins"/>
    </style:style>
    <style:style style:name="TablaDetalladaDeEstrategiaDePruebas.A" style:family="table-column">
      <style:table-column-properties style:column-width="2.896cm" style:rel-column-width="10659*"/>
    </style:style>
    <style:style style:name="TablaDetalladaDeEstrategiaDePruebas.B" style:family="table-column">
      <style:table-column-properties style:column-width="4.791cm" style:rel-column-width="17631*"/>
    </style:style>
    <style:style style:name="TablaDetalladaDeEstrategiaDePruebas.C" style:family="table-column">
      <style:table-column-properties style:column-width="3.926cm" style:rel-column-width="14450*"/>
    </style:style>
    <style:style style:name="TablaDetalladaDeEstrategiaDePruebas.D" style:family="table-column">
      <style:table-column-properties style:column-width="6.193cm" style:rel-column-width="22795*"/>
    </style:style>
    <style:style style:name="TablaDetalladaDeEstrategiaDePruebas.A1" style:family="table-cell">
      <style:table-cell-properties style:vertical-align="middle" fo:background-color="transparent" fo:padding="0cm" fo:border-left="none" fo:border-right="none" fo:border-top="2pt solid #000000" fo:border-bottom="0.75pt solid #000000" style:writing-mode="page">
        <style:background-image/>
      </style:table-cell-properties>
    </style:style>
    <style:style style:name="TablaDetalladaDeEstrategiaDePruebas.2" style:family="table-row">
      <style:table-row-properties style:min-row-height="2.016cm"/>
    </style:style>
    <style:style style:name="TablaDetalladaDeEstrategiaDePruebas.A2"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TablaDetalladaDeEstrategiaDePruebas.3" style:family="table-row">
      <style:table-row-properties style:min-row-height="2.006cm"/>
    </style:style>
    <style:style style:name="TablaDetalladaDeEstrategiaDePruebas.4" style:family="table-row">
      <style:table-row-properties style:min-row-height="2.702cm"/>
    </style:style>
    <style:style style:name="TablaDetalladaDeEstrategiaDePruebas.5" style:family="table-row">
      <style:table-row-properties style:min-row-height="1.81cm"/>
    </style:style>
    <style:style style:name="TablaDetalladaDeEstrategiaDePruebas.6" style:family="table-row">
      <style:table-row-properties style:min-row-height="2.312cm"/>
    </style:style>
    <style:style style:name="TablaDetalladaDeEstrategiaDePruebas.A6"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la2" style:family="table" style:master-page-name="">
      <style:table-properties style:width="17.806cm" style:page-number="auto" table:align="margins"/>
    </style:style>
    <style:style style:name="Tabla2.A" style:family="table-column">
      <style:table-column-properties style:column-width="1.81cm" style:rel-column-width="1026*"/>
    </style:style>
    <style:style style:name="Tabla2.B" style:family="table-column">
      <style:table-column-properties style:column-width="3.789cm" style:rel-column-width="2148*"/>
    </style:style>
    <style:style style:name="Tabla2.C" style:family="table-column">
      <style:table-column-properties style:column-width="3.508cm" style:rel-column-width="1989*"/>
    </style:style>
    <style:style style:name="Tabla2.D" style:family="table-column">
      <style:table-column-properties style:column-width="3.092cm" style:rel-column-width="1753*"/>
    </style:style>
    <style:style style:name="Tabla2.E" style:family="table-column">
      <style:table-column-properties style:column-width="5.607cm" style:rel-column-width="3179*"/>
    </style:style>
    <style:style style:name="Tabla2.A1" style:family="table-cell">
      <style:table-cell-properties style:vertical-align="middle" fo:background-color="transparent" fo:padding="0cm" fo:border-left="none" fo:border-right="none" fo:border-top="2pt solid #000000" fo:border-bottom="0.75pt solid #000000" style:writing-mode="page">
        <style:background-image/>
      </style:table-cell-properties>
    </style:style>
    <style:style style:name="Tabla2.2" style:family="table-row">
      <style:table-row-properties style:min-row-height="2.002cm"/>
    </style:style>
    <style:style style:name="Tabla2.A2" style:family="table-cell">
      <style:table-cell-properties style:vertical-align="middle" fo:background-color="#eeeeee" fo:padding="0cm" fo:border-left="none" fo:border-right="none" fo:border-top="none" fo:border-bottom="0.75pt solid #999999" loext:writing-mode="bt-lr">
        <style:background-image/>
      </style:table-cell-properties>
    </style:style>
    <style:style style:name="Tabla2.B2"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Tabla2.3" style:family="table-row">
      <style:table-row-properties style:min-row-height="5.865cm"/>
    </style:style>
    <style:style style:name="Tabla2.4" style:family="table-row">
      <style:table-row-properties style:min-row-height="5.339cm"/>
    </style:style>
    <style:style style:name="Tabla2.A7" style:family="table-cell">
      <style:table-cell-properties style:vertical-align="middle" fo:background-color="transparent" fo:padding="0cm" fo:border-left="none" fo:border-right="none" fo:border-top="0.75pt solid #999999" fo:border-bottom="2pt solid #000000" loext:writing-mode="bt-lr">
        <style:background-image/>
      </style:table-cell-properties>
    </style:style>
    <style:style style:name="Tabla2.B7"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Footer">
      <style:paragraph-properties>
        <style:tab-stops>
          <style:tab-stop style:position="8.5cm" style:type="center"/>
          <style:tab-stop style:position="17.397cm" style:type="right"/>
        </style:tab-stops>
      </style:paragraph-properties>
      <style:text-properties officeooo:paragraph-rsid="003bb751"/>
    </style:style>
    <style:style style:name="P2" style:family="paragraph" style:parent-style-name="Standard">
      <style:paragraph-properties fo:text-align="start" style:justify-single-word="false"/>
      <style:text-properties style:font-name="Arial Black" style:text-underline-style="solid" style:text-underline-width="auto" style:text-underline-color="font-color" fo:font-weight="normal" officeooo:rsid="00161dc6" officeooo:paragraph-rsid="00161dc6" style:font-weight-asian="normal" style:font-weight-complex="normal"/>
    </style:style>
    <style:style style:name="P3" style:family="paragraph" style:parent-style-name="Standard">
      <style:paragraph-properties fo:line-height="150%" fo:text-align="center" style:justify-single-word="false"/>
      <style:text-properties style:font-name="MathJax_Typewriter" style:text-underline-style="solid" style:text-underline-width="auto" style:text-underline-color="font-color" fo:font-weight="normal" officeooo:rsid="00cc3084" officeooo:paragraph-rsid="00cc3084" style:font-weight-asian="normal" style:font-weight-complex="normal"/>
    </style:style>
    <style:style style:name="P4" style:family="paragraph" style:parent-style-name="Heading_20_4">
      <style:paragraph-properties fo:text-align="center" style:justify-single-word="false"/>
      <style:text-properties style:font-name="MathJax_Typewriter" style:text-underline-style="solid" style:text-underline-width="auto" style:text-underline-color="font-color" fo:font-weight="normal" style:font-weight-asian="normal" style:font-weight-complex="normal"/>
    </style:style>
    <style:style style:name="P5" style:family="paragraph" style:parent-style-name="Heading_20_2">
      <style:paragraph-properties fo:margin-top="0cm" fo:margin-bottom="0cm" style:contextual-spacing="false" fo:line-height="150%" fo:text-align="center" style:justify-single-word="false"/>
      <style:text-properties style:font-name="MathJax_Typewriter" officeooo:paragraph-rsid="02434674"/>
    </style:style>
    <style:style style:name="P6" style:family="paragraph" style:parent-style-name="Text_20_body">
      <style:paragraph-properties fo:margin-top="0cm" fo:margin-bottom="0cm" style:contextual-spacing="false" fo:line-height="150%" fo:text-align="center" style:justify-single-word="false"/>
      <style:text-properties style:font-name="MathJax_Typewriter" officeooo:paragraph-rsid="02434674"/>
    </style:style>
    <style:style style:name="P7" style:family="paragraph" style:parent-style-name="Heading_20_2">
      <style:paragraph-properties fo:line-height="150%" fo:text-align="justify" style:justify-single-word="false" fo:keep-with-next="always"/>
      <style:text-properties style:font-name="MathJax_Typewriter" officeooo:paragraph-rsid="02434674"/>
    </style:style>
    <style:style style:name="P8" style:family="paragraph" style:parent-style-name="Heading_20_2">
      <style:paragraph-properties fo:margin-top="0cm" fo:margin-bottom="0cm" style:contextual-spacing="false" fo:line-height="150%" fo:text-align="justify" style:justify-single-word="false"/>
      <style:text-properties style:font-name="MathJax_Typewriter" officeooo:paragraph-rsid="02434674"/>
    </style:style>
    <style:style style:name="P9" style:family="paragraph" style:parent-style-name="Heading_20_3">
      <style:paragraph-properties fo:text-align="center" style:justify-single-word="false"/>
      <style:text-properties style:font-name="MathJax_Typewriter" fo:font-weight="normal" style:font-weight-asian="normal" style:font-weight-complex="normal"/>
    </style:style>
    <style:style style:name="P10" style:family="paragraph" style:parent-style-name="Heading_20_4">
      <style:paragraph-properties fo:margin-top="0.413cm" fo:margin-bottom="0.413cm" style:contextual-spacing="false" fo:text-align="center" style:justify-single-word="false"/>
      <style:text-properties style:font-name="MathJax_Typewriter" fo:font-size="12pt" style:font-size-asian="12pt" style:font-size-complex="12pt"/>
    </style:style>
    <style:style style:name="P11" style:family="paragraph" style:parent-style-name="Heading_20_2">
      <style:paragraph-properties fo:line-height="150%" fo:text-align="center" style:justify-single-word="false" fo:keep-with-next="always"/>
      <style:text-properties fo:color="#000000" loext:opacity="100%" style:font-name="MathJax_Typewriter" fo:font-size="15pt" style:text-underline-style="solid" style:text-underline-width="auto" style:text-underline-color="font-color" fo:font-weight="normal" officeooo:rsid="02086b18" officeooo:paragraph-rsid="02434674" style:font-size-asian="15pt" style:font-weight-asian="normal" style:font-size-complex="15pt" style:font-weight-complex="normal"/>
    </style:style>
    <style:style style:name="P12" style:family="paragraph" style:parent-style-name="Heading_20_4">
      <style:paragraph-properties fo:margin-top="0.413cm" fo:margin-bottom="0.413cm" style:contextual-spacing="false" fo:text-align="center" style:justify-single-word="false" fo:keep-with-next="always"/>
      <style:text-properties fo:color="#000000" loext:opacity="100%" style:font-name="MathJax_Typewriter" style:text-underline-style="none" fo:font-weight="normal" officeooo:rsid="02086b18" style:font-weight-asian="normal" style:font-weight-complex="normal"/>
    </style:style>
    <style:style style:name="P13"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Liberation Serif"/>
    </style:style>
    <style:style style:name="P14" style:family="paragraph" style:parent-style-name="Table_20_Contents">
      <style:paragraph-properties fo:margin-left="0cm" fo:margin-right="0cm" fo:margin-top="0cm" fo:margin-bottom="0.247cm" style:contextual-spacing="false" fo:line-height="114%" fo:text-align="center" style:justify-single-word="false" fo:text-indent="0cm" style:auto-text-indent="false"/>
      <style:text-properties style:font-name="Liberation Serif" officeooo:paragraph-rsid="028dd0b4"/>
    </style:style>
    <style:style style:name="P15" style:family="paragraph" style:parent-style-name="Table_20_Contents">
      <style:paragraph-properties fo:margin-left="0cm" fo:margin-right="0cm" fo:margin-top="0cm" fo:margin-bottom="0cm" style:contextual-spacing="false" fo:line-height="114%" fo:text-align="center" style:justify-single-word="false" fo:text-indent="0cm" style:auto-text-indent="false"/>
      <style:text-properties style:font-name="Liberation Serif" officeooo:paragraph-rsid="028dd0b4"/>
    </style:style>
    <style:style style:name="P16" style:family="paragraph" style:parent-style-name="Table_20_Contents">
      <style:paragraph-properties fo:margin-left="0cm" fo:margin-right="0cm" fo:margin-top="0cm" fo:margin-bottom="0cm" style:contextual-spacing="false" fo:line-height="114%" fo:text-align="center" style:justify-single-word="false" fo:text-indent="0cm" style:auto-text-indent="false"/>
      <style:text-properties style:font-name="Liberation Serif"/>
    </style:style>
    <style:style style:name="P17"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Liberation Serif" fo:font-size="12pt" style:font-size-asian="12pt" style:font-size-complex="12pt"/>
    </style:style>
    <style:style style:name="P18"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Liberation Serif" fo:font-size="12pt" officeooo:paragraph-rsid="02971d57" style:font-size-asian="12pt" style:font-size-complex="12pt"/>
    </style:style>
    <style:style style:name="P19" style:family="paragraph" style:parent-style-name="Table_20_Contents">
      <style:paragraph-properties fo:margin-left="0cm" fo:margin-right="0cm" fo:margin-top="0cm" fo:margin-bottom="0.247cm" style:contextual-spacing="false" fo:line-height="114%" fo:text-align="center" style:justify-single-word="false" fo:text-indent="0cm" style:auto-text-indent="false"/>
      <style:text-properties style:font-name="Liberation Serif" fo:font-style="italic" officeooo:paragraph-rsid="028dd0b4" style:font-style-asian="italic" style:font-style-complex="italic"/>
    </style:style>
    <style:style style:name="P20" style:family="paragraph" style:parent-style-name="Table_20_Contents">
      <style:paragraph-properties fo:margin-left="0cm" fo:margin-right="0cm" fo:margin-top="0cm" fo:margin-bottom="0cm" style:contextual-spacing="false" fo:line-height="114%" fo:text-align="center" style:justify-single-word="false" fo:text-indent="0cm" style:auto-text-indent="false"/>
      <style:text-properties style:font-name="Liberation Serif" fo:font-style="italic" officeooo:paragraph-rsid="028dd0b4" style:font-style-asian="italic" style:font-style-complex="italic"/>
    </style:style>
    <style:style style:name="P21" style:family="paragraph" style:parent-style-name="Text_20_body">
      <style:paragraph-properties fo:margin-left="0cm" fo:margin-right="0cm" fo:margin-top="0cm" fo:margin-bottom="0.247cm" style:contextual-spacing="false" fo:line-height="114%" fo:text-align="center" style:justify-single-word="false" fo:text-indent="0cm" style:auto-text-indent="false"/>
      <style:text-properties style:font-name="Liberation Serif" fo:font-style="italic" fo:font-weight="bold" style:font-style-asian="italic" style:font-weight-asian="bold" style:font-style-complex="italic" style:font-weight-complex="bold"/>
    </style:style>
    <style:style style:name="P22" style:family="paragraph" style:parent-style-name="Table_20_Contents">
      <loext:graphic-properties draw:fill="none"/>
      <style:paragraph-properties fo:margin-left="0.199cm" fo:margin-right="0.199cm" fo:margin-top="0cm" fo:margin-bottom="0.247cm" style:contextual-spacing="false" fo:line-height="114%" fo:text-align="center" style:justify-single-word="false" fo:orphans="0" fo:widows="0" fo:text-indent="0cm" style:auto-text-indent="false" fo:background-color="transparent" text:number-lines="false" text:line-number="0"/>
      <style:text-properties style:font-name="Liberation Serif" fo:font-weight="bold" style:font-weight-asian="bold" style:font-weight-complex="bold"/>
    </style:style>
    <style:style style:name="P23" style:family="paragraph" style:parent-style-name="Table_20_Contents">
      <loext:graphic-properties draw:fill="none"/>
      <style:paragraph-properties fo:margin-left="0.199cm" fo:margin-right="0.199cm" fo:margin-top="0cm" fo:margin-bottom="0cm" style:contextual-spacing="false" fo:line-height="114%" fo:text-align="center" style:justify-single-word="false" fo:orphans="0" fo:widows="0" fo:text-indent="0cm" style:auto-text-indent="false" fo:background-color="transparent" text:number-lines="false" text:line-number="0"/>
      <style:text-properties style:font-name="Liberation Serif" fo:font-weight="bold" style:font-weight-asian="bold" style:font-weight-complex="bold"/>
    </style:style>
    <style:style style:name="P24" style:family="paragraph" style:parent-style-name="Table_20_Contents">
      <loext:graphic-properties draw:fill="none"/>
      <style:paragraph-properties fo:margin-left="0.199cm" fo:margin-right="0.199cm" fo:margin-top="0cm" fo:margin-bottom="0cm" style:contextual-spacing="false" fo:line-height="114%" fo:text-align="center" style:justify-single-word="false" fo:orphans="0" fo:widows="0" fo:text-indent="0cm" style:auto-text-indent="false" fo:background-color="transparent" text:number-lines="false" text:line-number="0"/>
      <style:text-properties style:font-name="Liberation Serif" officeooo:rsid="028dd0b4" officeooo:paragraph-rsid="028dd0b4"/>
    </style:style>
    <style:style style:name="P25" style:family="paragraph" style:parent-style-name="Table_20_Contents">
      <style:paragraph-properties fo:margin-left="0cm" fo:margin-right="0cm" fo:margin-top="0cm" fo:margin-bottom="0cm" style:contextual-spacing="false" fo:line-height="114%" fo:text-align="center" style:justify-single-word="false" fo:text-indent="0cm" style:auto-text-indent="false"/>
    </style:style>
    <style:style style:name="P26" style:family="paragraph" style:parent-style-name="Heading_20_2" style:list-style-name="L1">
      <style:paragraph-properties fo:margin-left="0cm" fo:margin-right="0cm" fo:margin-top="0cm" fo:margin-bottom="0.247cm" style:contextual-spacing="false" fo:line-height="114%" fo:text-align="justify" style:justify-single-word="false" fo:text-indent="0cm" style:auto-text-indent="false"/>
      <style:text-properties style:font-name="Liberation Serif" fo:font-size="12pt" officeooo:paragraph-rsid="02971d57" style:font-size-asian="12pt" style:font-size-complex="12pt"/>
    </style:style>
    <style:style style:name="P27" style:family="paragraph" style:parent-style-name="Heading_20_2">
      <style:paragraph-properties fo:margin-left="0cm" fo:margin-right="0cm" fo:margin-top="0cm" fo:margin-bottom="0.247cm" style:contextual-spacing="false" fo:line-height="114%" fo:text-align="justify" style:justify-single-word="false" fo:text-indent="0cm" style:auto-text-indent="false"/>
      <style:text-properties style:font-name="Liberation Serif"/>
    </style:style>
    <style:style style:name="P28" style:family="paragraph" style:parent-style-name="Heading_20_4" style:list-style-name="L1">
      <style:paragraph-properties fo:text-align="center" style:justify-single-word="false" fo:keep-with-next="always"/>
      <style:text-properties style:font-name="MathJax_Typewriter" style:text-underline-style="none" fo:font-weight="normal" style:font-weight-asian="normal" style:font-weight-complex="normal"/>
    </style:style>
    <style:style style:name="P29" style:family="paragraph" style:parent-style-name="Table_20_Contents">
      <loext:graphic-properties draw:fill="none"/>
      <style:paragraph-properties fo:margin-left="0.101cm" fo:margin-right="0.101cm" fo:margin-top="0cm" fo:margin-bottom="0.247cm" style:contextual-spacing="false" fo:line-height="114%" fo:text-align="center" style:justify-single-word="false" fo:orphans="0" fo:widows="0" fo:text-indent="0cm" style:auto-text-indent="false" fo:background-color="transparent" text:number-lines="false" text:line-number="0"/>
      <style:text-properties style:font-name="Liberation Serif" fo:font-size="12pt" style:font-size-asian="12pt" style:font-size-complex="12pt"/>
    </style:style>
    <style:style style:name="P30" style:family="paragraph" style:parent-style-name="Table_20_Contents">
      <loext:graphic-properties draw:fill="none"/>
      <style:paragraph-properties fo:margin-left="0.101cm" fo:margin-right="0.101cm" fo:margin-top="0.402cm" fo:margin-bottom="0.649cm" style:contextual-spacing="false" fo:line-height="114%" fo:text-align="center" style:justify-single-word="false" fo:orphans="0" fo:widows="0" fo:text-indent="0cm" style:auto-text-indent="false" fo:background-color="transparent" text:number-lines="false" text:line-number="0"/>
      <style:text-properties style:font-name="Liberation Serif" fo:font-size="12pt" style:font-size-asian="12pt" style:font-size-complex="12pt"/>
    </style:style>
    <style:style style:name="P31" style:family="paragraph" style:parent-style-name="Table_20_Contents">
      <loext:graphic-properties draw:fill="none"/>
      <style:paragraph-properties fo:margin-left="0.101cm" fo:margin-right="0.101cm" fo:margin-top="0cm" fo:margin-bottom="0.247cm" style:contextual-spacing="false" fo:line-height="114%" fo:text-align="center" style:justify-single-word="false" fo:orphans="0" fo:widows="0" fo:text-indent="0cm" style:auto-text-indent="false" fo:background-color="transparent" text:number-lines="false" text:line-number="0"/>
      <style:text-properties style:font-name="Liberation Serif" fo:font-size="12pt" officeooo:paragraph-rsid="02b2ed99" style:font-size-asian="12pt" style:font-size-complex="12pt"/>
    </style:style>
    <style:style style:name="P32" style:family="paragraph" style:parent-style-name="Table_20_Contents">
      <loext:graphic-properties draw:fill="none"/>
      <style:paragraph-properties fo:margin-left="0.199cm" fo:margin-right="0.101cm" fo:margin-top="0.201cm" fo:margin-bottom="0.448cm" style:contextual-spacing="false" fo:line-height="94%" fo:text-align="center" style:justify-single-word="false" fo:orphans="0" fo:widows="0" fo:text-indent="0cm" style:auto-text-indent="false" fo:background-color="transparent" text:number-lines="false" text:line-number="0"/>
      <style:text-properties style:font-name="Liberation Serif" fo:font-size="12pt" style:font-size-asian="12pt" style:font-size-complex="12pt"/>
    </style:style>
    <style:style style:name="P33" style:family="paragraph" style:parent-style-name="Table_20_Contents">
      <loext:graphic-properties draw:fill="none"/>
      <style:paragraph-properties fo:margin-left="0.199cm" fo:margin-right="0.101cm" fo:margin-top="0.101cm" fo:margin-bottom="0.347cm" style:contextual-spacing="false" fo:line-height="94%" fo:text-align="center" style:justify-single-word="false" fo:orphans="0" fo:widows="0" fo:text-indent="0cm" style:auto-text-indent="false" fo:background-color="transparent" text:number-lines="false" text:line-number="0"/>
      <style:text-properties style:font-name="Liberation Serif" fo:font-size="12pt" style:font-size-asian="12pt" style:font-size-complex="12pt"/>
    </style:style>
    <style:style style:name="P34" style:family="paragraph" style:parent-style-name="Table_20_Contents">
      <loext:graphic-properties draw:fill="none"/>
      <style:paragraph-properties fo:margin-left="0.199cm" fo:margin-right="0.101cm" fo:margin-top="0cm" fo:margin-bottom="0cm" style:contextual-spacing="false" fo:line-height="94%" fo:text-align="center" style:justify-single-word="false" fo:orphans="0" fo:widows="0" fo:text-indent="0cm" style:auto-text-indent="false" fo:background-color="transparent" text:number-lines="false" text:line-number="0"/>
      <style:text-properties style:font-name="Liberation Serif" fo:font-size="12pt" style:font-size-asian="12pt" style:font-size-complex="12pt"/>
    </style:style>
    <style:style style:name="P35" style:family="paragraph" style:parent-style-name="Table_20_Contents">
      <loext:graphic-properties draw:fill="none"/>
      <style:paragraph-properties fo:margin-left="0.101cm" fo:margin-right="0.199cm" fo:margin-top="0cm" fo:margin-bottom="0.247cm" style:contextual-spacing="false" fo:line-height="94%" fo:text-align="center" style:justify-single-word="false" fo:orphans="0" fo:widows="0" fo:text-indent="0cm" style:auto-text-indent="false" fo:background-color="transparent" text:number-lines="false" text:line-number="0"/>
      <style:text-properties style:font-name="Liberation Serif" fo:font-size="12pt" style:font-size-asian="12pt" style:font-size-complex="12pt"/>
    </style:style>
    <style:style style:name="P36" style:family="paragraph" style:parent-style-name="Table_20_Contents">
      <loext:graphic-properties draw:fill="none"/>
      <style:paragraph-properties fo:margin-left="0.101cm" fo:margin-right="0.199cm" fo:margin-top="0.101cm" fo:margin-bottom="0.347cm" style:contextual-spacing="false" fo:line-height="94%" fo:text-align="center" style:justify-single-word="false" fo:orphans="0" fo:widows="0" fo:text-indent="0cm" style:auto-text-indent="false" fo:background-color="transparent" text:number-lines="false" text:line-number="0"/>
      <style:text-properties style:font-name="Liberation Serif" fo:font-size="12pt" style:font-size-asian="12pt" style:font-size-complex="12pt"/>
    </style:style>
    <style:style style:name="P37" style:family="paragraph" style:parent-style-name="Table_20_Contents">
      <loext:graphic-properties draw:fill="none"/>
      <style:paragraph-properties fo:margin-left="0.101cm" fo:margin-right="0.199cm" fo:margin-top="0.201cm" fo:margin-bottom="0.448cm" style:contextual-spacing="false" fo:line-height="94%" fo:text-align="center" style:justify-single-word="false" fo:orphans="0" fo:widows="0" fo:text-indent="0cm" style:auto-text-indent="false" fo:background-color="transparent" text:number-lines="false" text:line-number="0"/>
      <style:text-properties style:font-name="Liberation Serif" fo:font-size="12pt" style:font-size-asian="12pt" style:font-size-complex="12pt"/>
    </style:style>
    <style:style style:name="P38" style:family="paragraph" style:parent-style-name="Table_20_Contents">
      <style:paragraph-properties fo:margin-left="0cm" fo:margin-right="0cm" fo:margin-top="0.201cm" fo:margin-bottom="0.448cm" style:contextual-spacing="false" fo:line-height="94%" fo:text-align="center" style:justify-single-word="false" fo:text-indent="0cm" style:auto-text-indent="false"/>
      <style:text-properties style:font-name="Liberation Serif" fo:font-size="12pt" style:font-size-asian="12pt" style:font-size-complex="12pt"/>
    </style:style>
    <style:style style:name="P39" style:family="paragraph" style:parent-style-name="Table_20_Contents">
      <style:paragraph-properties fo:margin-left="0cm" fo:margin-right="0cm" fo:margin-top="0.503cm" fo:margin-bottom="0.75cm" style:contextual-spacing="false" fo:line-height="114%" fo:text-align="center" style:justify-single-word="false" fo:text-indent="0cm" style:auto-text-indent="false"/>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40" style:family="paragraph" style:parent-style-name="Table_20_Contents">
      <style:paragraph-properties fo:margin-left="0cm" fo:margin-right="0cm" fo:margin-top="0cm" fo:margin-bottom="0.247cm" style:contextual-spacing="false" fo:line-height="114%" fo:text-align="center" style:justify-single-word="false" fo:text-indent="0cm" style:auto-text-indent="false"/>
      <style:text-properties style:font-name="Liberation Serif" fo:font-size="12pt" fo:font-weight="bold" style:font-size-asian="12pt" style:font-weight-asian="bold" style:font-size-complex="12pt" style:font-weight-complex="bold"/>
    </style:style>
    <style:style style:name="P41" style:family="paragraph" style:parent-style-name="Table_20_Contents">
      <loext:graphic-properties draw:fill="none"/>
      <style:paragraph-properties fo:margin-left="0.101cm" fo:margin-right="0.101cm" fo:margin-top="0cm" fo:margin-bottom="0.247cm" style:contextual-spacing="false" fo:line-height="114%" fo:text-align="center" style:justify-single-word="false" fo:orphans="0" fo:widows="0" fo:text-indent="0cm" style:auto-text-indent="false" fo:background-color="transparent" text:number-lines="false" text:line-number="0"/>
      <style:text-properties style:font-name="Liberation Serif" fo:font-size="12pt" fo:font-weight="bold" style:font-size-asian="12pt" style:font-weight-asian="bold" style:font-size-complex="12pt" style:font-weight-complex="bold"/>
    </style:style>
    <style:style style:name="P42" style:family="paragraph" style:parent-style-name="Table_20_Contents">
      <style:paragraph-properties fo:margin-left="0cm" fo:margin-right="0cm" fo:margin-top="0.101cm" fo:margin-bottom="0.101cm" style:contextual-spacing="false" fo:line-height="114%" fo:text-align="center" style:justify-single-word="false" fo:text-indent="0cm" style:auto-text-indent="false"/>
      <style:text-properties officeooo:paragraph-rsid="02c4c052"/>
    </style:style>
    <style:style style:name="P43" style:family="paragraph" style:parent-style-name="Table_20_Contents">
      <style:paragraph-properties fo:margin-left="0cm" fo:margin-right="0cm" fo:margin-top="0cm" fo:margin-bottom="0cm" style:contextual-spacing="false" fo:line-height="114%" fo:text-align="center" style:justify-single-word="false" fo:text-indent="0cm" style:auto-text-indent="false"/>
      <style:text-properties officeooo:paragraph-rsid="02c4c052"/>
    </style:style>
    <style:style style:name="P44" style:family="paragraph" style:parent-style-name="Table_20_Contents">
      <loext:graphic-properties draw:fill="none"/>
      <style:paragraph-properties fo:margin-left="0.101cm" fo:margin-right="0.199cm" fo:margin-top="0cm" fo:margin-bottom="0.247cm" style:contextual-spacing="false" fo:line-height="94%" fo:text-align="center" style:justify-single-word="false" fo:orphans="0" fo:widows="0" fo:text-indent="0cm" style:auto-text-indent="false" fo:background-color="transparent" text:number-lines="false" text:line-number="0"/>
    </style:style>
    <style:style style:name="P45" style:family="paragraph" style:parent-style-name="Table_20_Contents">
      <loext:graphic-properties draw:fill="none"/>
      <style:paragraph-properties fo:margin-left="0.101cm" fo:margin-right="0.199cm" fo:margin-top="0.201cm" fo:margin-bottom="0.448cm" style:contextual-spacing="false" fo:line-height="94%" fo:text-align="center" style:justify-single-word="false" fo:orphans="0" fo:widows="0" fo:text-indent="0cm" style:auto-text-indent="false" fo:background-color="transparent" text:number-lines="false" text:line-number="0"/>
    </style:style>
    <style:style style:name="P46" style:family="paragraph" style:parent-style-name="Text_20_body" style:list-style-name="L1">
      <style:paragraph-properties fo:margin-left="0cm" fo:margin-right="0cm" fo:margin-top="0cm" fo:margin-bottom="0.247cm" style:contextual-spacing="false" fo:line-height="114%" fo:text-align="justify" style:justify-single-word="false" fo:text-indent="0cm" style:auto-text-indent="false"/>
      <style:text-properties style:font-name="Liberation Serif" fo:font-size="12pt" officeooo:paragraph-rsid="02971d57" style:font-size-asian="12pt" style:font-size-complex="12pt"/>
    </style:style>
    <style:style style:name="P47" style:family="paragraph" style:parent-style-name="Text_20_body" style:list-style-name="L1">
      <style:paragraph-properties fo:margin-left="0cm" fo:margin-right="0cm" fo:margin-top="0cm" fo:margin-bottom="0.247cm" style:contextual-spacing="false" fo:line-height="114%" fo:text-align="justify" style:justify-single-word="false" fo:text-indent="0cm" style:auto-text-indent="false" fo:padding="0cm" fo:border="none"/>
      <style:text-properties style:font-name="Liberation Serif" fo:font-size="12pt" officeooo:paragraph-rsid="02971d57" style:font-size-asian="12pt" style:font-size-complex="12pt"/>
    </style:style>
    <style:style style:name="P48" style:family="paragraph" style:parent-style-name="Text_20_body" style:list-style-name="L2">
      <style:paragraph-properties fo:margin-left="0cm" fo:margin-right="0cm" fo:margin-top="0cm" fo:margin-bottom="0.247cm" style:contextual-spacing="false" fo:line-height="114%" fo:text-align="justify" style:justify-single-word="false" fo:text-indent="0cm" style:auto-text-indent="false" fo:padding="0cm" fo:border="none"/>
      <style:text-properties style:font-name="Liberation Serif" fo:font-size="12pt" style:font-size-asian="12pt" style:font-size-complex="12pt"/>
    </style:style>
    <style:style style:name="P49" style:family="paragraph" style:parent-style-name="Text_20_body" style:list-style-name="L1">
      <style:paragraph-properties fo:margin-left="0cm" fo:margin-right="0cm" fo:margin-top="0cm" fo:margin-bottom="0.247cm" style:contextual-spacing="false" fo:line-height="114%" fo:text-align="justify" style:justify-single-word="false" fo:text-indent="0cm" style:auto-text-indent="false" fo:padding="0cm" fo:border="none"/>
      <style:text-properties officeooo:paragraph-rsid="02971d57"/>
    </style:style>
    <style:style style:name="P50" style:family="paragraph">
      <style:paragraph-properties fo:text-align="center"/>
    </style:style>
    <style:style style:name="P51" style:family="paragraph">
      <loext:graphic-properties draw:fill="none" draw:fill-color="#ffffff"/>
      <style:paragraph-properties fo:text-align="center"/>
      <style:text-properties style:font-name="MathJax_SansSerif" fo:font-size="40pt" style:font-size-asian="40pt" style:font-size-complex="40pt"/>
    </style:style>
    <style:style style:name="P52" style:family="paragraph">
      <loext:graphic-properties draw:fill="none" draw:fill-color="#ffffff"/>
      <style:paragraph-properties fo:text-align="center"/>
      <style:text-properties style:font-name="MathJax_Typewriter" fo:font-size="26pt" style:font-size-asian="26pt" style:font-size-complex="26pt"/>
    </style:style>
    <style:style style:name="P53" style:family="paragraph">
      <loext:graphic-properties draw:fill="none" draw:fill-color="#ffffff"/>
      <style:paragraph-properties fo:text-align="center"/>
      <style:text-properties style:font-name="MathJax_Typewriter" fo:font-size="35pt" fo:font-weight="normal" style:font-size-asian="35pt" style:font-weight-asian="normal" style:font-size-complex="35pt" style:font-weight-complex="normal"/>
    </style:style>
    <style:style style:name="P54" style:family="paragraph">
      <loext:graphic-properties draw:fill="solid" draw:fill-color="#dedce6"/>
      <style:paragraph-properties style:writing-mode="lr-tb"/>
    </style:style>
    <style:style style:name="P55" style:family="paragraph">
      <loext:graphic-properties draw:fill-color="#ffffff"/>
      <style:paragraph-properties fo:text-align="center"/>
    </style:style>
    <style:style style:name="T1" style:family="text">
      <style:text-properties style:font-name="MathJax_Typewriter"/>
    </style:style>
    <style:style style:name="T2" style:family="text">
      <style:text-properties style:font-name="MathJax_Typewriter" fo:font-size="15pt" fo:font-weight="normal" officeooo:rsid="0294c5ee" style:font-size-asian="15pt" style:font-weight-asian="normal" style:font-size-complex="15pt" style:font-weight-complex="normal"/>
    </style:style>
    <style:style style:name="T3" style:family="text">
      <style:text-properties style:font-name="MathJax_Typewriter" fo:font-size="15pt" fo:font-weight="normal" officeooo:rsid="021a3964" style:font-size-asian="15pt" style:font-weight-asian="normal" style:font-size-complex="15pt" style:font-weight-complex="normal"/>
    </style:style>
    <style:style style:name="T4" style:family="text">
      <style:text-properties style:font-name="MathJax_Typewriter" fo:font-size="15pt" fo:font-weight="normal" officeooo:rsid="018c626a" style:font-size-asian="15pt" style:font-weight-asian="normal" style:font-size-complex="15pt" style:font-weight-complex="normal"/>
    </style:style>
    <style:style style:name="T5" style:family="text">
      <style:text-properties style:font-name="MathJax_Typewriter" fo:font-size="15pt" fo:font-weight="normal" officeooo:rsid="003bb751" style:font-size-asian="15pt" style:font-weight-asian="normal" style:font-size-complex="15pt" style:font-weight-complex="normal"/>
    </style:style>
    <style:style style:name="T6" style:family="text">
      <style:text-properties style:font-name="MathJax_Typewriter" fo:font-size="15pt" fo:font-weight="normal" officeooo:rsid="006b4a44" style:font-size-asian="15pt" style:font-weight-asian="normal" style:font-size-complex="15pt" style:font-weight-complex="normal"/>
    </style:style>
    <style:style style:name="T7" style:family="text">
      <style:text-properties style:font-name="MathJax_Typewriter" fo:font-style="normal" style:font-style-asian="normal" style:font-style-complex="normal"/>
    </style:style>
    <style:style style:name="T8" style:family="text">
      <style:text-properties style:font-name="MathJax_Typewriter" fo:font-size="8pt" fo:font-style="italic" style:font-size-asian="8pt" style:font-size-complex="8pt"/>
    </style:style>
    <style:style style:name="T9" style:family="text">
      <style:text-properties style:font-name="MathJax_Typewriter" fo:font-style="italic"/>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bold" officeooo:rsid="02ab569e" style:font-weight-asian="bold" style:font-weight-complex="bold"/>
    </style:style>
    <style:style style:name="T13" style:family="text">
      <style:text-properties style:text-underline-style="none"/>
    </style:style>
    <style:style style:name="T14" style:family="text">
      <style:text-properties fo:color="#000000" loext:opacity="100%" fo:font-size="15pt" style:font-size-asian="15pt" style:font-size-complex="15pt"/>
    </style:style>
    <style:style style:name="T15" style:family="text">
      <style:text-properties fo:color="#000000" loext:opacity="100%" fo:font-size="15pt" style:text-underline-style="none" fo:font-weight="normal" officeooo:rsid="02086b18" style:font-size-asian="15pt" style:font-weight-asian="normal" style:font-size-complex="15pt" style:font-weight-complex="normal"/>
    </style:style>
    <style:style style:name="T16" style:family="text">
      <style:text-properties fo:color="#000000" loext:opacity="100%" style:text-underline-style="none" fo:font-weight="normal" officeooo:rsid="02086b18" style:font-weight-asian="normal" style:font-weight-complex="normal"/>
    </style:style>
    <style:style style:name="T17" style:family="text">
      <style:text-properties fo:color="#000000" loext:opacity="100%" style:text-underline-style="solid" style:text-underline-width="auto" style:text-underline-color="font-color" fo:font-weight="normal" officeooo:rsid="02086b18" style:font-weight-asian="normal" style:font-weight-complex="normal"/>
    </style:style>
    <style:style style:name="T18" style:family="text">
      <style:text-properties fo:color="#000000" loext:opacity="100%" style:text-underline-style="solid" style:text-underline-width="auto" style:text-underline-color="font-color" fo:font-weight="normal" officeooo:rsid="0294c974" style:font-weight-asian="normal" style:font-weight-complex="normal"/>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style:text-underline-style="none" style:font-style-asian="italic" style:font-style-complex="italic"/>
    </style:style>
    <style:style style:name="T22" style:family="text">
      <style:text-properties style:font-name="Liberation Serif"/>
    </style:style>
    <style:style style:name="T23" style:family="text">
      <style:text-properties style:font-name="Liberation Serif" fo:font-style="italic" style:font-style-asian="italic" style:font-style-complex="italic"/>
    </style:style>
    <style:style style:name="T24" style:family="text">
      <style:text-properties style:font-name="Liberation Serif" fo:font-size="12pt" fo:font-weight="bold" style:font-size-asian="12pt" style:font-size-complex="12pt"/>
    </style:style>
    <style:style style:name="T25" style:family="text">
      <style:text-properties style:font-name="Liberation Serif" fo:font-size="12pt" style:font-size-asian="12pt" style:font-size-complex="12pt"/>
    </style:style>
    <style:style style:name="T26" style:family="text">
      <style:text-properties style:font-name="Liberation Serif" fo:font-size="12pt" fo:font-style="italic" style:font-size-asian="12pt" style:font-size-complex="12pt"/>
    </style:style>
    <style:style style:name="T27" style:family="text">
      <style:text-properties style:font-name="Liberation Serif" fo:font-size="12pt" fo:font-style="italic" style:font-size-asian="12pt" style:font-style-asian="italic" style:font-size-complex="12pt" style:font-style-complex="italic"/>
    </style:style>
    <style:style style:name="T28" style:family="text">
      <style:text-properties style:font-name="Liberation Sans"/>
    </style:style>
    <style:style style:name="T29" style:family="text">
      <style:text-properties style:font-name="Liberation Sans" fo:font-size="13pt" style:font-size-asian="13pt" style:font-size-complex="13pt"/>
    </style:style>
    <style:style style:name="T30" style:family="text">
      <style:text-properties style:font-name="Liberation Sans" fo:font-size="12pt" style:font-size-asian="12pt" style:font-size-complex="12pt"/>
    </style:style>
    <style:style style:name="T31" style:family="text">
      <style:text-properties officeooo:rsid="028dd0b4"/>
    </style:style>
    <style:style style:name="T32" style:family="text">
      <style:text-properties fo:font-size="10pt" style:font-size-asian="10pt" style:font-size-complex="10pt"/>
    </style:style>
    <style:style style:name="T33" style:family="text">
      <style:text-properties fo:font-size="10pt" officeooo:rsid="029cfa51" style:font-size-asian="10pt" style:font-size-complex="10pt"/>
    </style:style>
    <style:style style:name="T34" style:family="text">
      <style:text-properties fo:font-size="10pt" fo:font-style="italic" style:font-size-asian="10pt" style:font-style-asian="italic" style:font-size-complex="10pt" style:font-style-complex="italic"/>
    </style:style>
    <style:style style:name="T35" style:family="text">
      <style:text-properties fo:font-size="10pt" fo:font-style="italic" officeooo:rsid="029cfa51" style:font-size-asian="10pt" style:font-style-asian="italic" style:font-size-complex="10pt" style:font-style-complex="italic"/>
    </style:style>
    <style:style style:name="T36" style:family="text">
      <style:text-properties style:text-underline-style="solid" style:text-underline-width="auto" style:text-underline-color="font-color"/>
    </style:style>
    <style:style style:name="T37" style:family="text">
      <style:text-properties officeooo:rsid="029e3d71"/>
    </style:style>
    <style:style style:name="T38" style:family="text">
      <style:text-properties officeooo:rsid="02a21868"/>
    </style:style>
    <style:style style:name="T39" style:family="text">
      <style:text-properties fo:font-weight="normal" style:font-weight-asian="normal" style:font-weight-complex="normal"/>
    </style:style>
    <style:style style:name="T40" style:family="text">
      <style:text-properties officeooo:rsid="02ab569e"/>
    </style:style>
    <style:style style:name="T41" style:family="text">
      <style:text-properties style:font-name="MathJax_Typewriter"/>
    </style:style>
    <style:style style:name="T42" style:family="text">
      <style:text-properties style:font-name="MathJax_Typewriter" fo:font-size="12pt" style:font-size-asian="12pt" style:font-size-complex="12pt"/>
    </style:style>
    <style:style style:name="T43" style:family="text">
      <style:text-properties officeooo:rsid="02d4d856"/>
    </style:style>
    <style:style style:name="T44" style:family="text">
      <style:text-properties fo:font-size="12pt" style:font-size-asian="12pt" style:font-size-complex="12pt"/>
    </style:style>
    <style:style style:name="T45" style:family="text">
      <style:text-properties style:font-name="MathJax_SansSerif" fo:font-size="40pt" style:text-underline-style="none" fo:font-weight="bold" style:font-size-asian="40pt" style:font-weight-asian="bold" style:font-size-complex="40pt" style:font-weight-complex="bold"/>
    </style:style>
    <style:style style:name="T46" style:family="text">
      <style:text-properties style:font-name="MathJax_Typewriter" fo:font-size="26pt" style:text-underline-style="none" style:font-size-asian="26pt" style:font-size-complex="26pt"/>
    </style:style>
    <style:style style:name="T47" style:family="text">
      <style:text-properties style:font-name="MathJax_Typewriter" fo:font-size="35pt" fo:font-weight="normal" style:font-size-asian="35pt" style:font-weight-asian="normal" style:font-size-complex="35pt" style:font-weight-complex="normal"/>
    </style:style>
    <style:style style:name="fr1" style:family="graphic" style:parent-style-name="Graphics">
      <style:graphic-properties style:vertical-pos="from-top" style:vertical-rel="paragraph" style:horizontal-pos="from-left" style:horizontal-rel="paragraph" style:mirror="none" fo:clip="rect(2.394cm, 0.374cm, 1.905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stroke="none" svg:stroke-color="#000000" draw:fill="none" draw:fill-color="#ffffff" fo:min-height="1.41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4.32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4.29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55308d" draw:fill="solid" draw:fill-color="#dedce6" draw:textarea-horizontal-align="justify" draw:textarea-vertical-align="middle" draw:auto-grow-height="false" fo:min-height="29.794cm" fo:min-width="10.698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ffffff" draw:fill-color="#ffffff" draw:textarea-horizontal-align="justify" draw:textarea-vertical-align="middle" draw:auto-grow-height="false" fo:min-height="2.448cm" fo:min-width="2.44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custom-shape text:anchor-type="paragraph" draw:z-index="1" draw:name="Forma 1" draw:style-name="gr4" draw:text-style-name="P54" svg:width="10.699cm" svg:height="29.795cm" svg:x="-2.833cm" svg:y="-2.82cm"><text:p/><draw:enhanced-geometry svg:viewBox="0 0 21600 21600" draw:type="rectangle" draw:enhanced-path="M 0 0 L 21600 0 21600 21600 0 21600 0 0 Z N"/></draw:custom-shape><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draw:frame draw:style-name="fr2" draw:name="Imagen2" text:anchor-type="char" svg:x="-0.647cm" svg:y="0.125cm" svg:width="7.987cm" svg:height="7.987cm" draw:z-index="2"><draw:image xlink:href="Pictures/10000001000001B0000001B04AB7F566.png" xlink:type="simple" xlink:show="embed" xlink:actuate="onLoad" draw:mime-type="image/png"/></draw:frame><text:span text:style-name="T13"/></text:p>
      <text:p text:style-name="P2"><text:span text:style-name="T13"/></text:p>
      <text:p text:style-name="P2"><text:span text:style-name="T13"/></text:p>
      <text:p text:style-name="P2"><text:span text:style-name="T13"/></text:p>
      <text:p text:style-name="P2"><draw:frame text:anchor-type="paragraph" draw:z-index="3" draw:name="Marco de texto 1" draw:style-name="gr3" draw:text-style-name="P53" svg:width="9.129cm" svg:height="4.296cm" svg:x="1.757cm" svg:y="0.247cm"><draw:text-box><text:p text:style-name="P50"><text:span text:style-name="T47">Plan</text:span></text:p><text:p text:style-name="P50"><text:span text:style-name="T47">De</text:span></text:p><text:p text:style-name="P50"><text:span text:style-name="T47">Pruebas</text:span></text:p></draw:text-box></draw:frame><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draw:frame text:anchor-type="paragraph" draw:z-index="5" draw:name="Marco de texto 3" draw:style-name="gr1" draw:text-style-name="P51" svg:width="7.873cm" svg:height="1.414cm" svg:x="-0.6cm" svg:y="0.312cm"><draw:text-box><text:p text:style-name="P50"><text:span text:style-name="T45">Temporis:</text:span></text:p></draw:text-box></draw:frame><text:span text:style-name="T13"/></text:p>
      <text:p text:style-name="P2"><text:span text:style-name="T13"/></text:p>
      <text:p text:style-name="P2"><text:span text:style-name="T13"/></text:p>
      <text:p text:style-name="P2"><draw:frame text:anchor-type="paragraph" draw:z-index="4" draw:name="Marco de texto 2" draw:style-name="gr2" draw:text-style-name="P52" svg:width="7.839cm" svg:height="4.329cm" svg:x="-0.563cm" svg:y="0.381cm"><draw:text-box><text:p text:style-name="P50"><text:span text:style-name="T46">Una herramienta </text:span><text:span text:style-name="T46">accesible para el </text:span><text:span text:style-name="T46">control y la </text:span><text:span text:style-name="T46">optimización de </text:span><text:span text:style-name="T46">nuestro tiempo</text:span></text:p></draw:text-box></draw:frame><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draw:custom-shape text:anchor-type="paragraph" draw:z-index="0" draw:name="Forma 2" draw:style-name="gr5" draw:text-style-name="P55" svg:width="2.449cm" svg:height="2.449cm" svg:x="8.46cm" svg:y="0.646cm"><text:p/><draw:enhanced-geometry svg:viewBox="0 0 21600 21600" draw:type="rectangle" draw:enhanced-path="M 0 0 L 21600 0 21600 21600 0 21600 0 0 Z N"/></draw:custom-shape><text:span text:style-name="T13"/></text:p>
      <text:p text:style-name="P3"><text:span text:style-name="T14"/></text:p>
      <text:h text:style-name="P11" text:outline-level="2"><text:soft-page-break/><text:span text:style-name="T13">1. </text:span>Definición del Alcance de la Calidad</text:h>
      <text:p text:style-name="P13">Para garantizar que <text:span text:style-name="T10">Temporis</text:span> sea una herramienta fiable y accesible, se han identificado los siguientes módulos y requisitos críticos como objetivos prioritarios del plan de calidad:</text:p>
      <text:h text:style-name="P9" text:outline-level="3">1. <text:span text:style-name="T36">Definición del Alcance de la Calidad</text:span></text:h>
      <text:list text:style-name="L1">
        <text:list-item>
          <text:p text:style-name="P46">Para garantizar que <text:span text:style-name="T10">Temporis</text:span> sea una herramienta informática robusta, estable, segura y completamente inclusiva, el alcance de las actividades de control de calidad, aseguramiento técnico e inspección se divide de forma rigurosa en dos grandes bloques organizativos:</text:p>
        </text:list-item>
      </text:list>
      <text:h text:style-name="P4" text:outline-level="4"><text:span text:style-name="T13">1.1. </text:span>Módulos Críticos del Sistema (Requisitos Funcionales)</text:h>
      <text:list text:continue-numbering="true" text:style-name="L1">
        <text:list-item>
          <text:p text:style-name="P49"><text:span text:style-name="T24">Gestión de Autenticación y Seguridad Multimodal:</text:span><text:span text:style-name="T25"> Verificación exhaustiva del acceso seguro, persistencia de sesión y protección de datos de usuario mediante </text:span><text:span text:style-name="T26">Firebase Auth</text:span><text:span text:style-name="T25">. Esto incluye la validación del registro/</text:span><text:span text:style-name="T27">login</text:span><text:span text:style-name="T25"> tradicional por credenciales, el Social Login con Google, y el flujo de extensión del </text:span><text:span text:style-name="Source_20_Text"><text:span text:style-name="T25">BiometricPrompt</text:span></text:span><text:span text:style-name="T25"> nativo (huella dactilar y reconocimiento facial) para asegurar un control de acceso robusto.</text:span></text:p>
        </text:list-item>
        <text:list-item>
          <text:p text:style-name="P47"><text:span text:style-name="T10">Motor de Temporizadores (Core):</text:span> Control y monitorización de la exactitud milimétrica en la cuenta atrás, la gestión de hilos en segundo plano mediante corrutinas de Kotlin, y la correcta persistencia de estados del ciclo de vida (activo, pausado, detenido) ante interrupciones externas o llamadas entrantes.</text:p>
        </text:list-item>
        <text:list-item>
          <text:p text:style-name="P47"><text:span text:style-name="T10">Sincronización Cloud Firestore:</text:span> Validación de la integridad transaccional de los datos al guardar, actualizar, eliminar y recuperar temporizadores y registros históricos en la nube en tiempo real.</text:p>
        </text:list-item>
        <text:list-item>
          <text:p text:style-name="P47"><text:span text:style-name="T10">Módulo Analítico y Visualización:</text:span> Renderizado dinámico y eficiente de la matriz de contribución anual (<text:span text:style-name="T7">heatmap</text:span>) mediante la librería <text:span text:style-name="T7">MPAndroidChart</text:span>, garantizando que el procesamiento de alta densidad de datos históricos no provoque bloqueos ni ralentizaciones en el hilo principal de la interfaz (<text:span text:style-name="T1">UI Thread</text:span>).</text:p>
          <text:h text:style-name="P28" text:outline-level="4">1.2. <text:span text:style-name="T36">Requisitos No Funcionales Críticos (Calidad de Software)</text:span></text:h>
        </text:list-item>
        <text:list-item>
          <text:p text:style-name="P47"><text:span text:style-name="T10">Accesibilidad Universal (Inclusión Digital):</text:span> Cumplimiento estricto de las pautas WCAG aplicadas a entornos móviles. Se audita de forma prioritaria el escalado adaptativo de fuentes (hasta 30sp) sin desbordamiento de componentes, el tamaño mínimo de las zonas de interacción táctil y la perfecta compatibilidad con el modo de alto contraste.</text:p>
        </text:list-item>
        <text:list-item>
          <text:p text:style-name="P47"><text:span text:style-name="T10">Rendimiento y Optimización:</text:span> Tiempo de respuesta mínimo en la carga de estadísticas, sincronización eficiente en la nube y consumo optimizado de batería en procesos en segundo plano.</text:p>
        </text:list-item>
        <text:list-item>
          <text:p text:style-name="P47"><text:span text:style-name="T10">Mantenibilidad y Código Limpio:</text:span> Control riguroso de la deuda técnica, erradicación de código duplicado, limitación de la complejidad ciclomática y adherencia estricta a la arquitectura limpia MVVM (<text:span text:style-name="T20">Model-View-ViewModel</text:span>).</text:p>
          <text:h text:style-name="P26" text:outline-level="2"/>
        </text:list-item>
      </text:list>
      <text:p text:style-name="P18"/>
      <text:h text:style-name="P11" text:outline-level="2"><text:soft-page-break/><text:span text:style-name="T13">2. </text:span>Diseño de la Estrategia de Pruebas</text:h>
      <text:p text:style-name="P18">Se adopta una estrategia de pruebas multinivel basada en la <text:span text:style-name="T10">Pirámide de Pruebas de Software</text:span>, la cual distribuye los esfuerzos de control de calidad desde el aislamiento técnico hasta la validación de la experiencia real del usuario final. Esta estrategia se ve reforzada desde el inicio del ciclo de vida con inspección estática automatizada.</text:p>
      <text:p text:style-name="P21">Pirámide de pruebas con pruebas de interfaz de usuario, pruebas de integración y pruebas unitarias </text:p>
      <text:h text:style-name="P7" text:outline-level="2"><draw:frame draw:style-name="fr1" draw:name="Imagen1" text:anchor-type="char" svg:x="2.404cm" svg:y="-0.295cm" svg:width="12.24cm" svg:height="8.461cm" draw:z-index="6"><draw:image xlink:href="Pictures/100000000000057A000004620EF53577.png" xlink:type="simple" xlink:show="embed" xlink:actuate="onLoad" draw:mime-type="image/png"/></draw:frame><text:span text:style-name="T15"/></text:h>
      <text:h text:style-name="P8" text:outline-level="2"><text:span text:style-name="T15"/></text:h>
      <text:h text:style-name="P8" text:outline-level="2"><text:span text:style-name="T15"/></text:h>
      <text:h text:style-name="P8" text:outline-level="2"><text:span text:style-name="T15"/></text:h>
      <text:h text:style-name="P8" text:outline-level="2"><text:span text:style-name="T15"/></text:h>
      <text:h text:style-name="P8" text:outline-level="2"><text:span text:style-name="T15"/></text:h>
      <text:h text:style-name="P5" text:outline-level="2"><text:span text:style-name="T15"/></text:h>
      <text:p text:style-name="P6"><text:span text:style-name="T15"/></text:p>
      <text:p text:style-name="P6"><text:span text:style-name="T15"/></text:p>
      <text:p text:style-name="P6"><text:span text:style-name="T15"/></text:p>
      <text:h text:style-name="P10" text:outline-level="4"><text:span text:style-name="T16">2.1. </text:span><text:span text:style-name="T17">Tabla </text:span><text:span text:style-name="T18">Introductoria</text:span><text:span text:style-name="T17"> de </text:span><text:span text:style-name="T18">la</text:span><text:span text:style-name="T17"> Estrategia de Pruebas</text:span></text:h>
      <table:table table:name="TablaDetalladaDeEstrategiaDePruebas" table:style-name="TablaDetalladaDeEstrategiaDePruebas" table:template-name="Elegant">
        <table:table-column table:style-name="TablaDetalladaDeEstrategiaDePruebas.A"/>
        <table:table-column table:style-name="TablaDetalladaDeEstrategiaDePruebas.B"/>
        <table:table-column table:style-name="TablaDetalladaDeEstrategiaDePruebas.C"/>
        <table:table-column table:style-name="TablaDetalladaDeEstrategiaDePruebas.D"/>
        <table:table-row>
          <table:table-cell table:style-name="TablaDetalladaDeEstrategiaDePruebas.A1" office:value-type="string">
            <text:p text:style-name="P25"><text:span text:style-name="Strong_20_Emphasis"><text:span text:style-name="T30">Tipo de Prueba</text:span></text:span></text:p>
          </table:table-cell>
          <table:table-cell table:style-name="TablaDetalladaDeEstrategiaDePruebas.A1" office:value-type="string">
            <text:p text:style-name="P25"><text:span text:style-name="Strong_20_Emphasis"><text:span text:style-name="T30">Objetivo</text:span></text:span></text:p>
          </table:table-cell>
          <table:table-cell table:style-name="TablaDetalladaDeEstrategiaDePruebas.A1" office:value-type="string">
            <text:p text:style-name="P25"><text:span text:style-name="Strong_20_Emphasis"><text:span text:style-name="T30">Entorno y Herramientas</text:span></text:span></text:p>
          </table:table-cell>
          <table:table-cell table:style-name="TablaDetalladaDeEstrategiaDePruebas.A1" office:value-type="string">
            <text:p text:style-name="P25"><text:span text:style-name="Strong_20_Emphasis"><text:span text:style-name="T30">Responsable</text:span></text:span></text:p>
          </table:table-cell>
        </table:table-row>
        <table:table-row table:style-name="TablaDetalladaDeEstrategiaDePruebas.2">
          <table:table-cell table:style-name="TablaDetalladaDeEstrategiaDePruebas.A2" office:value-type="string">
            <text:p text:style-name="P25"><text:span text:style-name="Strong_20_Emphasis"><text:span text:style-name="T30">Unitarias</text:span></text:span></text:p>
          </table:table-cell>
          <table:table-cell table:style-name="TablaDetalladaDeEstrategiaDePruebas.A2" office:value-type="string">
            <text:p text:style-name="P25"><text:span text:style-name="T22">Validar la lógica aislada de las clases (</text:span><text:span text:style-name="Source_20_Text"><text:span text:style-name="T23">User</text:span></text:span><text:span text:style-name="T23">, </text:span><text:span text:style-name="Source_20_Text"><text:span text:style-name="T23">Timer</text:span></text:span><text:span text:style-name="T23">, </text:span><text:span text:style-name="Source_20_Text"><text:span text:style-name="T23">TimeRegister</text:span></text:span><text:span text:style-name="T22">).</text:span></text:p>
          </table:table-cell>
          <table:table-cell table:style-name="TablaDetalladaDeEstrategiaDePruebas.A2" office:value-type="string">
            <text:p text:style-name="P15">Android Studio / </text:p>
            <text:p text:style-name="P15">JUnit &amp; Mockito</text:p>
          </table:table-cell>
          <table:table-cell table:style-name="TablaDetalladaDeEstrategiaDePruebas.A2" office:value-type="string">
            <text:p text:style-name="P23">Desarrollador</text:p>
          </table:table-cell>
        </table:table-row>
        <table:table-row table:style-name="TablaDetalladaDeEstrategiaDePruebas.3">
          <table:table-cell table:style-name="TablaDetalladaDeEstrategiaDePruebas.A2" office:value-type="string">
            <text:p text:style-name="P25"><text:span text:style-name="Strong_20_Emphasis"><text:span text:style-name="T30">Integración</text:span></text:span></text:p>
          </table:table-cell>
          <table:table-cell table:style-name="TablaDetalladaDeEstrategiaDePruebas.A2" office:value-type="string">
            <text:p text:style-name="P16">Verificar la comunicación correcta entre la <text:span text:style-name="T20">App</text:span> y <text:span text:style-name="T20">Firebase</text:span> (CRUD).</text:p>
          </table:table-cell>
          <table:table-cell table:style-name="TablaDetalladaDeEstrategiaDePruebas.A2" office:value-type="string">
            <text:p text:style-name="P15">Emulador Android /</text:p>
            <text:p text:style-name="P20">Firebase Emulator</text:p>
          </table:table-cell>
          <table:table-cell table:style-name="TablaDetalladaDeEstrategiaDePruebas.A2" office:value-type="string">
            <text:p text:style-name="P23">Desarrollador</text:p>
          </table:table-cell>
        </table:table-row>
        <table:table-row table:style-name="TablaDetalladaDeEstrategiaDePruebas.4">
          <table:table-cell table:style-name="TablaDetalladaDeEstrategiaDePruebas.A2" office:value-type="string">
            <text:p text:style-name="P25"><text:span text:style-name="Strong_20_Emphasis"><text:span text:style-name="T30">Sistema (UI)</text:span></text:span></text:p>
          </table:table-cell>
          <table:table-cell table:style-name="TablaDetalladaDeEstrategiaDePruebas.A2" office:value-type="string">
            <text:p text:style-name="P16">Simular el flujo completo del usuario: <text:span text:style-name="T20">Login</text:span> -&gt; Crear <text:span text:style-name="T20">Timer</text:span> -&gt; Ejecutar.</text:p>
          </table:table-cell>
          <table:table-cell table:style-name="TablaDetalladaDeEstrategiaDePruebas.A2" office:value-type="string">
            <text:p text:style-name="P15">Dispositivo Físico / </text:p>
            <text:p text:style-name="P19">Espresso Framework</text:p>
          </table:table-cell>
          <table:table-cell table:style-name="TablaDetalladaDeEstrategiaDePruebas.A2" office:value-type="string">
            <text:p text:style-name="P23">QA / Desarrollador</text:p>
            <text:p text:style-name="P24">( <text:span text:style-name="T33">Se </text:span><text:span text:style-name="T32">asumirá el rol de </text:span><text:span text:style-name="T34">QA Tester</text:span><text:span text:style-name="T32">, aplicando una separación de mentalidad entre la</text:span><text:span text:style-name="T33">s</text:span><text:span text:style-name="T32"> fase</text:span><text:span text:style-name="T33">s (</text:span><text:span text:style-name="T32">desarrollo y </text:span><text:span text:style-name="T35">testing</text:span><text:span text:style-name="T33">), preservando la objetividad</text:span><text:span text:style-name="T32">.</text:span> )</text:p>
          </table:table-cell>
        </table:table-row>
        <table:table-row table:style-name="TablaDetalladaDeEstrategiaDePruebas.5">
          <table:table-cell table:style-name="TablaDetalladaDeEstrategiaDePruebas.A2" office:value-type="string">
            <text:p text:style-name="P25"><text:span text:style-name="Strong_20_Emphasis"><text:span text:style-name="T30">Aceptación</text:span></text:span></text:p>
          </table:table-cell>
          <table:table-cell table:style-name="TablaDetalladaDeEstrategiaDePruebas.A2" office:value-type="string">
            <text:p text:style-name="P16">Validar que el diseño final coincide con los prototipos <text:span text:style-name="T31">definidos </text:span><text:span text:style-name="T37">una de</text:span><text:span text:style-name="T31"> la</text:span><text:span text:style-name="T37">s</text:span><text:span text:style-name="T31"> tarea</text:span>.</text:p>
          </table:table-cell>
          <table:table-cell table:style-name="TablaDetalladaDeEstrategiaDePruebas.A2" office:value-type="string">
            <text:p text:style-name="P20">Beta Test</text:p>
            <text:p text:style-name="P14">(Usuario final)</text:p>
          </table:table-cell>
          <table:table-cell table:style-name="TablaDetalladaDeEstrategiaDePruebas.A2" office:value-type="string">
            <text:p text:style-name="P22">Usuario / Analista</text:p>
          </table:table-cell>
        </table:table-row>
        <table:table-row table:style-name="TablaDetalladaDeEstrategiaDePruebas.6">
          <table:table-cell table:style-name="TablaDetalladaDeEstrategiaDePruebas.A6" office:value-type="string">
            <text:p text:style-name="P25"><text:span text:style-name="Strong_20_Emphasis"><text:span text:style-name="T30">Seguridad</text:span></text:span></text:p>
          </table:table-cell>
          <table:table-cell table:style-name="TablaDetalladaDeEstrategiaDePruebas.A6" office:value-type="string">
            <text:p text:style-name="P16">Comprobar que las <text:span text:style-name="T19">Security Rules</text:span> de <text:span text:style-name="T20">Firestore</text:span> impiden acceso no autorizado.</text:p>
          </table:table-cell>
          <table:table-cell table:style-name="TablaDetalladaDeEstrategiaDePruebas.A6" office:value-type="string">
            <text:p text:style-name="P15">Consola de <text:span text:style-name="T20">Firebase</text:span> /</text:p>
            <text:p text:style-name="P14">Pruebas de inyección</text:p>
          </table:table-cell>
          <table:table-cell table:style-name="TablaDetalladaDeEstrategiaDePruebas.A6" office:value-type="string">
            <text:p text:style-name="P22">Desarrollador</text:p>
          </table:table-cell>
        </table:table-row>
      </table:table>
      <text:h text:style-name="P12" text:outline-level="4"><text:soft-page-break/>2.2. Tabla Detallada de Estrategia de Pruebas</text:h>
      <table:table table:name="Tabla2" table:style-name="Tabla2" table:template-name="Elegant">
        <table:table-column table:style-name="Tabla2.A"/>
        <table:table-column table:style-name="Tabla2.B"/>
        <table:table-column table:style-name="Tabla2.C"/>
        <table:table-column table:style-name="Tabla2.D"/>
        <table:table-column table:style-name="Tabla2.E"/>
        <table:table-header-rows>
          <table:table-row>
            <table:table-cell table:style-name="Tabla2.A1" office:value-type="string">
              <text:p text:style-name="P25"><text:span text:style-name="Strong_20_Emphasis"><text:span text:style-name="T30">Tipo de Prueba</text:span></text:span></text:p>
            </table:table-cell>
            <table:table-cell table:style-name="Tabla2.A1" office:value-type="string">
              <text:p text:style-name="P25"><text:span text:style-name="Strong_20_Emphasis"><text:span text:style-name="T30">Objetivo Crítico</text:span></text:span></text:p>
            </table:table-cell>
            <table:table-cell table:style-name="Tabla2.A1" office:value-type="string">
              <text:p text:style-name="P25"><text:span text:style-name="Strong_20_Emphasis"><text:span text:style-name="T30">Entorno y Herramientas</text:span></text:span></text:p>
            </table:table-cell>
            <table:table-cell table:style-name="Tabla2.A1" office:value-type="string">
              <text:p text:style-name="P25"><text:span text:style-name="Strong_20_Emphasis"><text:span text:style-name="T30">Responsable</text:span></text:span></text:p>
            </table:table-cell>
            <table:table-cell table:style-name="Tabla2.A1" office:value-type="string">
              <text:p text:style-name="P25"><text:span text:style-name="Strong_20_Emphasis"><text:span text:style-name="T30">Logros, Retos y Avances Recientes</text:span></text:span></text:p>
            </table:table-cell>
          </table:table-row>
        </table:table-header-rows>
        <table:table-row table:style-name="Tabla2.2">
          <table:table-cell table:style-name="Tabla2.A2" office:value-type="string">
            <text:p text:style-name="P25"><text:span text:style-name="Strong_20_Emphasis"><text:span text:style-name="T30">Inspección Estática</text:span></text:span></text:p>
          </table:table-cell>
          <table:table-cell table:style-name="Tabla2.B2" office:value-type="string">
            <text:p text:style-name="P35">Análisis automatizado de la calidad del código fuente. Detección temprana de <text:span text:style-name="T20">bugs, code smells</text:span>, deuda técnica y vulneración de estándares.</text:p>
          </table:table-cell>
          <table:table-cell table:style-name="Tabla2.B2" office:value-type="string">
            <text:p text:style-name="P41">SonarQube Local Server <text:span text:style-name="T39">/ Gradle Plugins</text:span></text:p>
          </table:table-cell>
          <table:table-cell table:style-name="Tabla2.B2" office:value-type="string">
            <text:p text:style-name="P40">Desarrollador / QA Tester</text:p>
          </table:table-cell>
          <table:table-cell table:style-name="Tabla2.B2" office:value-type="string">
            <text:p text:style-name="P32"><text:span text:style-name="T10">Logro:</text:span> Integración exitosa de la pasarela de calidad (<text:span text:style-name="T19">Quality Gate</text:span>). Se refactorizó el <text:span text:style-name="T1">ViewModel</text:span> de los temporizadores reduciendo la complejidad ciclomática y se limpiaron variables duplicadas en las corrutinas de Kotlin, alcanzando un índice de deuda técnica "A".</text:p>
          </table:table-cell>
        </table:table-row>
        <table:table-row table:style-name="Tabla2.3">
          <table:table-cell table:style-name="Tabla2.A2" office:value-type="string">
            <text:p text:style-name="P25"><text:span text:style-name="Strong_20_Emphasis"><text:span text:style-name="T30">Unitarias</text:span></text:span></text:p>
          </table:table-cell>
          <table:table-cell table:style-name="Tabla2.B2" office:value-type="string">
            <text:p text:style-name="P44"><text:span text:style-name="T25">Validar de forma aislada e independiente las funciones matemáticas de conversión de tiempo y la lógica pura de negocio en los </text:span><text:span text:style-name="T42">ViewModels</text:span><text:span text:style-name="T25">. Clases objetivo: </text:span><text:span text:style-name="Source_20_Text"><text:span text:style-name="T42">User</text:span></text:span><text:span text:style-name="T42">, </text:span><text:span text:style-name="Source_20_Text"><text:span text:style-name="T42">Timer</text:span></text:span><text:span text:style-name="T42">, </text:span><text:span text:style-name="Source_20_Text"><text:span text:style-name="T42">TimeRegister</text:span></text:span><text:span text:style-name="T25">.</text:span></text:p>
          </table:table-cell>
          <table:table-cell table:style-name="Tabla2.B2" office:value-type="string">
            <text:p text:style-name="P29">Android Studio / <text:span text:style-name="T11">JUnit </text:span><text:span text:style-name="T12">4</text:span><text:span text:style-name="T11"> &amp; MockK</text:span> (o Mockito)</text:p>
          </table:table-cell>
          <table:table-cell table:style-name="Tabla2.B2" office:value-type="string">
            <text:p text:style-name="P40">Desarrollador</text:p>
          </table:table-cell>
          <table:table-cell table:style-name="Tabla2.B2" office:value-type="string">
            <text:p text:style-name="P33"><text:span text:style-name="T10">Avance:</text:span> Monitorización de la cobertura de código (<text:span text:style-name="T19">Code Coverage</text:span>) de las pruebas de regresión centralizada directamente en el panel de <text:span text:style-name="T1">SonarQube</text:span>, <text:span text:style-name="T38">con la intención de </text:span>asegura<text:span text:style-name="T38">r </text:span>un mínimo del 85% de cobertura en clases <text:span text:style-name="T40">y controladores</text:span>.</text:p>
          </table:table-cell>
        </table:table-row>
        <table:table-row table:style-name="Tabla2.4">
          <table:table-cell table:style-name="Tabla2.A2" office:value-type="string">
            <text:p text:style-name="P25"><text:span text:style-name="Strong_20_Emphasis"><text:span text:style-name="T30">Integración</text:span></text:span></text:p>
          </table:table-cell>
          <table:table-cell table:style-name="Tabla2.B2" office:value-type="string">
            <text:p text:style-name="P45"><text:span text:style-name="Source_20_Text"><text:span text:style-name="T25">Verificar la correcta comunicación, serialización e intercambio de datos entre los repositorios locales de la </text:span></text:span><text:span text:style-name="Source_20_Text"><text:span text:style-name="T27">App</text:span></text:span><text:span text:style-name="Source_20_Text"><text:span text:style-name="T25"> y los </text:span></text:span><text:span text:style-name="Source_20_Text"><text:span text:style-name="T27">endpoints cloud</text:span></text:span><text:span text:style-name="Source_20_Text"><text:span text:style-name="T25"> de </text:span></text:span><text:span text:style-name="Source_20_Text"><text:span text:style-name="T27">Firebase</text:span></text:span><text:span text:style-name="Source_20_Text"><text:span text:style-name="T25"> (operaciones </text:span></text:span><text:span text:style-name="Source_20_Text"><text:span text:style-name="T27">CRUD</text:span></text:span><text:span text:style-name="Source_20_Text"><text:span text:style-name="T25">).</text:span></text:span></text:p>
          </table:table-cell>
          <table:table-cell table:style-name="Tabla2.B2" office:value-type="string">
            <text:p text:style-name="P29"><text:span text:style-name="T11">Emulador Android</text:span> / <text:span text:style-name="T20">Firebase Local Emulator Suite</text:span></text:p>
          </table:table-cell>
          <table:table-cell table:style-name="Tabla2.B2" office:value-type="string">
            <text:p text:style-name="P40">Desarrollador / QA Tester</text:p>
          </table:table-cell>
          <table:table-cell table:style-name="Tabla2.B2" office:value-type="string">
            <text:p text:style-name="P32"><text:span text:style-name="T10">Reto Superado:</text:span> Controlar adecuadamente las excepciones de red y asegurar el mapeo exacto de los documentos de <text:span text:style-name="T21">Firestore</text:span> en situaciones de conectividad intermitente o Modo <text:span text:style-name="T20">Offline</text:span>.</text:p>
          </table:table-cell>
        </table:table-row>
        <table:table-row table:style-name="Tabla2.2">
          <table:table-cell table:style-name="Tabla2.A2" office:value-type="string">
            <text:p text:style-name="P42"><text:span text:style-name="Strong_20_Emphasis"><text:span text:style-name="T30">Sistema</text:span></text:span></text:p>
            <text:p text:style-name="P43"><text:span text:style-name="Strong_20_Emphasis"><text:span text:style-name="T30">(UI)</text:span></text:span></text:p>
          </table:table-cell>
          <table:table-cell table:style-name="Tabla2.B2" office:value-type="string">
            <text:p text:style-name="P36">Simular flujos completos de interacción dentro de las pantallas prototipadas, navegabilidad por el <text:span text:style-name="T19">Bottom Navigation Bar</text:span> y robustez del hilo de ejecución al pulsar el botón "Timer -&gt; Ejecutar".</text:p>
          </table:table-cell>
          <table:table-cell table:style-name="Tabla2.B2" office:value-type="string">
            <text:p text:style-name="P30"><text:span text:style-name="T11">Dispositivo Físico / </text:span><text:span text:style-name="T20">Espresso Framework</text:span> / <text:span text:style-name="T11">Emulador Android</text:span></text:p>
          </table:table-cell>
          <table:table-cell table:style-name="Tabla2.B2" office:value-type="string">
            <text:p text:style-name="P39">“QA Tester”</text:p>
          </table:table-cell>
          <table:table-cell table:style-name="Tabla2.B2" office:value-type="string">
            <text:p text:style-name="P34"><text:span text:style-name="T10">Avance:</text:span> Automatización del flujo de <text:span text:style-name="T20">Login</text:span> y del ‘modal’ de creación de tareas mediante <text:span text:style-name="T20">scripts</text:span> de <text:span text:style-name="T20">Espresso</text:span>, mitigando fallos por referencias nulas (<text:span text:style-name="T9">NullPointerException</text:span>).</text:p>
          </table:table-cell>
        </table:table-row>
        <text:soft-page-break/>
        <table:table-row table:style-name="Tabla2.2">
          <table:table-cell table:style-name="Tabla2.A2" office:value-type="string">
            <text:p text:style-name="P25"><text:span text:style-name="Strong_20_Emphasis"><text:span text:style-name="T30">Accesibilidad</text:span></text:span></text:p>
          </table:table-cell>
          <table:table-cell table:style-name="Tabla2.B2" office:value-type="string">
            <text:p text:style-name="P37">Garantizar que todos los componentes visuales cumplan con un área táctil mínima de 48x48dp y que las etiquetas sean interpretadas adecuadamente por herramientas de asistencia. Verificación de contrastes.</text:p>
          </table:table-cell>
          <table:table-cell table:style-name="Tabla2.B2" office:value-type="string">
            <text:p text:style-name="P31"><text:span text:style-name="T20">Accessibility Scanner</text:span> (Google) / <text:span text:style-name="T21">TalkBack</text:span> / Lector de pantalla</text:p>
          </table:table-cell>
          <table:table-cell table:style-name="Tabla2.B2" office:value-type="string">
            <text:p text:style-name="P40">Usuario Final / Analista de Accesibilidad</text:p>
          </table:table-cell>
          <table:table-cell table:style-name="Tabla2.B2" office:value-type="string">
            <text:p text:style-name="P38"><text:span text:style-name="T10">Hito:</text:span> Validación del comportamiento del slider dinámico de fuentes. Se constató que TalkBack verbaliza de manera correcta e inclusiva los estados de los temporizadores circulares activos. El diseño coincide con lo validado en la tarea <text:span text:style-name="T43">realizada</text:span>.</text:p>
          </table:table-cell>
        </table:table-row>
        <table:table-row table:style-name="Tabla2.2">
          <table:table-cell table:style-name="Tabla2.A7" office:value-type="string">
            <text:p text:style-name="P25"><text:span text:style-name="Strong_20_Emphasis"><text:span text:style-name="T30">Seguridad</text:span></text:span></text:p>
          </table:table-cell>
          <table:table-cell table:style-name="Tabla2.B7" office:value-type="string">
            <text:p text:style-name="P35">Comprobar que las reglas de escritura y lectura en la base de datos cloud estén completamente blindadas por token de usuario.</text:p>
          </table:table-cell>
          <table:table-cell table:style-name="Tabla2.B7" office:value-type="string">
            <text:p text:style-name="P29">Consola de <text:span text:style-name="T20">Firebase</text:span> / Pruebas de Inyección de <text:span text:style-name="T20">Tokens</text:span></text:p>
          </table:table-cell>
          <table:table-cell table:style-name="Tabla2.B7" office:value-type="string">
            <text:p text:style-name="P40">Desarrollador</text:p>
          </table:table-cell>
          <table:table-cell table:style-name="Tabla2.B7" office:value-type="string">
            <text:p text:style-name="P38"><text:span text:style-name="T10">Hito:</text:span> Verificación de las <text:span text:style-name="T19">Security Rules</text:span> de <text:span text:style-name="T20">Firestore</text:span>, garantizando criptográficamente que un usuario autenticado no pueda leer ni manipular las colecciones ni documentos pertenecientes a otro usuario.</text:p>
          </table:table-cell>
        </table:table-row>
      </table:table>
      <text:h text:style-name="P27" text:outline-level="2"><text:span text:style-name="T44"/></text:h>
      <text:h text:style-name="P27" text:outline-level="2"><text:span text:style-name="T44">3. Secuencia de Ejecución Lógica</text:span></text:h>
      <text:p text:style-name="P17">La ejecución de las pruebas en <text:span text:style-name="T10">Temporis</text:span> no se plantea de manera aleatoria, sino que obedece a una estricta secuencia de dependencia técnica y madurez del código para optimizar costes y tiempos de corrección:</text:p>
      <text:list text:style-name="L2">
        <text:list-item>
          <text:p text:style-name="P48"><text:span text:style-name="T10">Fase 1: Verificación Estática Automática (SonarQube):</text:span> Es el primer filtro de calidad e inspección. Cada cambio significativo en el código fuente es escaneado localmente. Si el código no supera los umbrales fijados en el <text:span text:style-name="T19">Quality Gate</text:span> (por presencia de <text:span text:style-name="T19">code smells</text:span> o vulnerabilidades de seguridad), se detiene el flujo de integración hasta que sea subsanado de raíz.</text:p>
        </text:list-item>
        <text:list-item>
          <text:p text:style-name="P48"><text:span text:style-name="T10">Fase 2: Verificación de Código Puro (Unitarias):</text:span> Se ejecutan los test unitarios con JUnit para certificar que las modificaciones no han corrompido las reglas operacionales del motor de tiempo ni los cálculos base del estado del temporizador. Es la base de la estabilidad del sistema.</text:p>
        </text:list-item>
        <text:list-item>
          <text:p text:style-name="P48"><text:span text:style-name="T10">Fase 3: Conectividad y Persistencia (Integración):</text:span> Una vez que la lógica interna es sólida, se levanta el entorno emulado de Firebase para validar que los datos transaccionales fluyen y se sincronizan de forma idónea en la nube sin errores de red o formato.</text:p>
        </text:list-item>
        <text:list-item>
          <text:p text:style-name="P48"><text:span text:style-name="T10">Fase 4: Flujos de Usuario (Sistema/UI):</text:span> Mediante Espresso, se comprueba la interfaz de usuario en su totalidad, simulando los recorridos del usuario real a lo largo de las vistas de la aplicación para asegurar transiciones limpias y consistentes (especialmente en el modo oscuro).</text:p>
        </text:list-item>
        <text:list-item>
          <text:p text:style-name="P48"><text:span text:style-name="T10">Fase 5: Validación de Accesibilidad y Cierre (Aceptación):</text:span> Pruebas de campo finales con las herramientas nativas de diagnóstico de Google (TalkBack) y revisiones de diseño para confirmar que el producto final cumple de forma inclusiva con los objetivos y el alcance definidos en la planificación de la tarea “Tr_09” (Apartado: Planificación del Ciclo de Vida (Gantt)).</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Arial Black" svg:font-family="'Arial Black'"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SansSerif" svg:font-family="MathJax_SansSerif" style:font-family-generic="swiss" style:font-pitch="variable"/>
    <style:font-face style:name="MathJax_Typewriter" svg:font-family="MathJax_Typewriter" style:font-family-generic="moder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Elegant.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2"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3"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4"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5"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6"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7"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8"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9"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0"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2"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3" style:family="table-cell" style:data-style-name="N1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4"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5"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6"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8.5cm" style:type="center"/>
          <style:tab-stop style:position="17.397cm" style:type="right"/>
        </style:tab-stops>
      </style:paragraph-properties>
      <style:text-properties officeooo:paragraph-rsid="003bb751"/>
    </style:style>
    <style:style style:name="MT1" style:family="text">
      <style:text-properties style:font-name="MathJax_Typewriter" fo:font-size="15pt" fo:font-weight="normal" officeooo:rsid="0294c5ee" style:font-size-asian="15pt" style:font-weight-asian="normal" style:font-size-complex="15pt" style:font-weight-complex="normal"/>
    </style:style>
    <style:style style:name="MT2" style:family="text">
      <style:text-properties style:font-name="MathJax_Typewriter" fo:font-size="15pt" fo:font-weight="normal" officeooo:rsid="021a3964" style:font-size-asian="15pt" style:font-weight-asian="normal" style:font-size-complex="15pt" style:font-weight-complex="normal"/>
    </style:style>
    <style:style style:name="MT3" style:family="text">
      <style:text-properties style:font-name="MathJax_Typewriter" fo:font-size="15pt" fo:font-weight="normal" officeooo:rsid="018c626a" style:font-size-asian="15pt" style:font-weight-asian="normal" style:font-size-complex="15pt" style:font-weight-complex="normal"/>
    </style:style>
    <style:style style:name="MT4" style:family="text">
      <style:text-properties style:font-name="MathJax_Typewriter" fo:font-size="15pt" fo:font-weight="normal" officeooo:rsid="003bb751" style:font-size-asian="15pt" style:font-weight-asian="normal" style:font-size-complex="15pt" style:font-weight-complex="normal"/>
    </style:style>
    <style:style style:name="MT5" style:family="text">
      <style:text-properties style:font-name="MathJax_Typewriter" fo:font-size="15pt" fo:font-weight="normal" officeooo:rsid="006b4a44" style:font-size-asian="15pt" style:font-weight-asian="normal" style:font-size-complex="15pt" style:font-weight-complex="normal"/>
    </style:style>
    <style:page-layout style:name="Mpm1">
      <style:page-layout-properties fo:page-width="21.001cm" fo:page-height="29.7cm" style:num-format="1" style:print-orientation="portrait" fo:margin-top="1.67cm" fo:margin-bottom="0.931cm" fo:margin-left="2cm" fo:margin-right="1.19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svg:height="1.002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lan de prueba</text:span><text:span text:style-name="MT2">s</text:span><text:span text:style-name="MT3"><text:tab/><text:tab/></text:span><text:span text:style-name="MT4">Kevin Zamora </text:span><text:span text:style-name="MT5">Amela</text:span></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7:44:15.318626987</meta:creation-date>
    <meta:generator>LibreOffice/24.2.7.2$Linux_X86_64 LibreOffice_project/420$Build-2</meta:generator>
    <dc:date>2026-05-25T00:24:28.895312066</dc:date>
    <meta:editing-duration>P1DT36M34S</meta:editing-duration>
    <meta:editing-cycles>666</meta:editing-cycles>
    <meta:print-date>2026-04-25T00:02:49.450270482</meta:print-date>
    <meta:printed-by>Archivos PDF</meta:printed-by>
    <meta:document-statistic meta:table-count="2" meta:image-count="2" meta:object-count="0" meta:page-count="5" meta:paragraph-count="93" meta:word-count="1316" meta:character-count="8784" meta:non-whitespace-character-count="7571"/>
  </office:meta>
</office:document-meta>
</file>
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E100000367051AFCF0.png" manifest:media-type="image/png"/>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806cm" fo:break-before="auto" fo:break-after="auto" table:align="margins" fo:background-color="transparent" fo:keep-with-next="auto" style:may-break-between-rows="true" style:writing-mode="page" table:border-model="collapsing">
        <style:background-image/>
      </style:table-properties>
    </style:style>
    <style:style style:name="Tabla1.A" style:family="table-column">
      <style:table-column-properties style:column-width="2.088cm" style:rel-column-width="7686*"/>
    </style:style>
    <style:style style:name="Tabla1.B" style:family="table-column">
      <style:table-column-properties style:column-width="3.815cm" style:rel-column-width="14041*"/>
    </style:style>
    <style:style style:name="Tabla1.C" style:family="table-column">
      <style:table-column-properties style:column-width="8.691cm" style:rel-column-width="31985*"/>
    </style:style>
    <style:style style:name="Tabla1.D" style:family="table-column">
      <style:table-column-properties style:column-width="3.212cm" style:rel-column-width="11823*"/>
    </style:style>
    <style:style style:name="Tabla1.1" style:family="table-row">
      <style:table-row-properties style:min-row-height="1.198cm"/>
    </style:style>
    <style:style style:name="Tabla1.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transparent" fo:padding="0cm" fo:border-left="none" fo:border-right="none" fo:border-top="2pt solid #000000" fo:border-bottom="none" style:writing-mode="page">
        <style:background-image/>
      </style:table-cell-properties>
    </style:style>
    <style:style style:name="Tabla1.B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1.3" style:family="table-row">
      <style:table-row-properties fo:background-color="transparent" fo:keep-together="auto">
        <style:background-image/>
      </style:table-row-properties>
    </style:style>
    <style:style style:name="Tabla1.A3" style:family="table-cell">
      <style:table-cell-properties style:vertical-align="middle" fo:background-color="transparent" fo:padding="0cm" fo:border="none" style:writing-mode="page">
        <style:background-image/>
      </style:table-cell-properties>
    </style:style>
    <style:style style:name="Tabla1.4" style:family="table-row">
      <style:table-row-properties fo:background-color="transparent" fo:keep-together="auto">
        <style:background-image/>
      </style:table-row-properties>
    </style:style>
    <style:style style:name="Tabla1.5" style:family="table-row">
      <style:table-row-properties fo:background-color="transparent" fo:keep-together="auto">
        <style:background-image/>
      </style:table-row-properties>
    </style:style>
    <style:style style:name="Tabla1.6" style:family="table-row">
      <style:table-row-properties fo:background-color="transparent" fo:keep-together="auto">
        <style:background-image/>
      </style:table-row-properties>
    </style:style>
    <style:style style:name="Tabla1.7" style:family="table-row">
      <style:table-row-properties fo:background-color="transparent" fo:keep-together="auto">
        <style:background-image/>
      </style:table-row-properties>
    </style:style>
    <style:style style:name="Tabla1.8" style:family="table-row">
      <style:table-row-properties fo:background-color="transparent" fo:keep-together="auto">
        <style:background-image/>
      </style:table-row-properties>
    </style:style>
    <style:style style:name="Tabla1.9" style:family="table-row">
      <style:table-row-properties fo:background-color="transparent" fo:keep-together="auto">
        <style:background-image/>
      </style:table-row-properties>
    </style:style>
    <style:style style:name="Tabla1.10" style:family="table-row">
      <style:table-row-properties fo:background-color="transparent" fo:keep-together="auto">
        <style:background-image/>
      </style:table-row-properties>
    </style:style>
    <style:style style:name="Tabla1.11" style:family="table-row">
      <style:table-row-properties fo:background-color="transparent" fo:keep-together="auto">
        <style:background-image/>
      </style:table-row-properties>
    </style:style>
    <style:style style:name="Tabla1.12" style:family="table-row">
      <style:table-row-properties fo:background-color="transparent" fo:keep-together="auto">
        <style:background-image/>
      </style:table-row-properties>
    </style:style>
    <style:style style:name="Tabla1.13" style:family="table-row">
      <style:table-row-properties fo:background-color="transparent" fo:keep-together="auto">
        <style:background-image/>
      </style:table-row-properties>
    </style:style>
    <style:style style:name="Tabla1.A1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1.B13"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a2" style:family="table">
      <style:table-properties style:width="17.806cm" table:align="left"/>
    </style:style>
    <style:style style:name="Tabla2.A" style:family="table-column">
      <style:table-column-properties style:column-width="1.203cm"/>
    </style:style>
    <style:style style:name="Tabla2.B" style:family="table-column">
      <style:table-column-properties style:column-width="1.734cm"/>
    </style:style>
    <style:style style:name="Tabla2.C" style:family="table-column">
      <style:table-column-properties style:column-width="7.449cm"/>
    </style:style>
    <style:style style:name="Tabla2.D" style:family="table-column">
      <style:table-column-properties style:column-width="3.023cm"/>
    </style:style>
    <style:style style:name="Tabla2.E" style:family="table-column">
      <style:table-column-properties style:column-width="4.397cm"/>
    </style:style>
    <style:style style:name="Tabla2.A1" style:family="table-cell">
      <style:table-cell-properties style:vertical-align="middle" fo:padding-left="0.318cm" fo:padding-right="0.318cm" fo:padding-top="0.212cm" fo:padding-bottom="0.212cm" fo:border="0.05pt solid #c4c7c5"/>
    </style:style>
    <style:style style:name="Tabla3" style:family="table">
      <style:table-properties style:width="17.806cm" table:align="left"/>
    </style:style>
    <style:style style:name="Tabla3.A" style:family="table-column">
      <style:table-column-properties style:column-width="17.806cm"/>
    </style:style>
    <style:style style:name="Tabla3.A1" style:family="table-cell">
      <style:table-cell-properties style:vertical-align="middle" fo:padding-left="0.318cm" fo:padding-right="0.318cm" fo:padding-top="0.212cm" fo:padding-bottom="0.212cm" fo:border="0.05pt solid #c4c7c5"/>
    </style:style>
    <style:style style:name="Tabla4" style:family="table">
      <style:table-properties style:width="17.806cm" table:align="left"/>
    </style:style>
    <style:style style:name="Tabla4.A" style:family="table-column">
      <style:table-column-properties style:column-width="17.806cm"/>
    </style:style>
    <style:style style:name="Tabla4.A1" style:family="table-cell">
      <style:table-cell-properties style:vertical-align="middle" fo:padding-left="0.318cm" fo:padding-right="0.318cm" fo:padding-top="0.212cm" fo:padding-bottom="0.212cm" fo:border="0.05pt solid #c4c7c5"/>
    </style:style>
    <style:style style:name="Tabla5" style:family="table">
      <style:table-properties style:width="17.806cm" table:align="left"/>
    </style:style>
    <style:style style:name="Tabla5.A" style:family="table-column">
      <style:table-column-properties style:column-width="17.806cm"/>
    </style:style>
    <style:style style:name="Tabla5.A1" style:family="table-cell">
      <style:table-cell-properties style:vertical-align="middle" fo:padding-left="0.318cm" fo:padding-right="0.318cm" fo:padding-top="0.212cm" fo:padding-bottom="0.212cm" fo:border="0.05pt solid #c4c7c5"/>
    </style:style>
    <style:style style:name="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P2"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3" style:family="paragraph" style:parent-style-name="Heading_20_2">
      <style:paragraph-properties fo:line-height="150%" fo:text-align="center" style:justify-single-word="false" fo:keep-with-next="always"/>
      <style:text-properties fo:color="#000000" loext:opacity="100%" style:font-name="MathJax_Typewriter" fo:font-size="15pt" style:text-underline-style="solid" style:text-underline-width="auto" style:text-underline-color="font-color" fo:font-weight="normal" officeooo:rsid="02086b18" officeooo:paragraph-rsid="02434674" style:font-size-asian="15pt" style:font-weight-asian="normal" style:font-size-complex="15pt" style:font-weight-complex="normal"/>
    </style:style>
    <style:style style:name="P4" style:family="paragraph" style:parent-style-name="Heading_20_2">
      <style:paragraph-properties fo:line-height="150%" fo:text-align="center" style:justify-single-word="false"/>
      <style:text-properties fo:color="#000000" loext:opacity="100%" style:font-name="MathJax_Typewriter" fo:font-size="15pt" style:text-underline-style="solid" style:text-underline-width="auto" style:text-underline-color="font-color" fo:font-weight="normal" officeooo:rsid="02086b18" officeooo:paragraph-rsid="02434674" style:font-size-asian="15pt" style:font-weight-asian="normal" style:font-size-complex="15pt" style:font-weight-complex="normal"/>
    </style:style>
    <style:style style:name="P5" style:family="paragraph" style:parent-style-name="Heading_20_2">
      <style:paragraph-properties fo:line-height="150%" fo:text-align="center" style:justify-single-word="false" fo:keep-with-next="always"/>
      <style:text-properties fo:color="#000000" loext:opacity="100%" style:font-name="MathJax_Typewriter" fo:font-size="15pt" style:text-underline-style="solid" style:text-underline-width="auto" style:text-underline-color="font-color" fo:font-weight="normal" officeooo:rsid="02a72435" officeooo:paragraph-rsid="02a72435" style:font-size-asian="15pt" style:font-weight-asian="normal" style:font-size-complex="15pt" style:font-weight-complex="normal"/>
    </style:style>
    <style:style style:name="P6" style:family="paragraph" style:parent-style-name="Heading_20_2">
      <style:paragraph-properties fo:margin-top="0.152cm" fo:margin-bottom="0.011cm" style:contextual-spacing="false" fo:line-height="150%" fo:text-align="center"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a4202e"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ext_20_body">
      <loext:graphic-properties draw:fill="none"/>
      <style:paragraph-properties fo:margin-left="0.199cm" fo:margin-right="0.199cm" fo:margin-top="0cm" fo:margin-bottom="0cm" style:contextual-spacing="false" fo:line-height="114%" fo:text-align="center" style:justify-single-word="false" fo:text-indent="0cm"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a4202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margin-left="0cm" fo:margin-right="0cm" fo:margin-top="0cm" fo:margin-bottom="0cm" style:contextual-spacing="false" fo:line-height="114%"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2a4202e"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ext_20_body">
      <style:paragraph-properties fo:margin-left="0cm" fo:margin-right="0cm" fo:line-height="114%" fo:text-align="justify" style:justify-single-word="false" fo:text-indent="0cm" style:auto-text-indent="false"/>
      <style:text-properties style:font-name="Liberation Serif"/>
    </style:style>
    <style:style style:name="P10" style:family="paragraph" style:parent-style-name="Standard">
      <style:paragraph-properties fo:margin-left="0cm" fo:margin-right="0cm" fo:line-height="114%" fo:text-align="justify" style:justify-single-word="false" fo:text-indent="0cm" style:auto-text-indent="false"/>
      <style:text-properties style:font-name="Liberation Serif" officeooo:paragraph-rsid="02a4202e"/>
    </style:style>
    <style:style style:name="P11" style:family="paragraph" style:parent-style-name="Text_20_body">
      <style:paragraph-properties fo:margin-left="0cm" fo:margin-right="0cm" fo:margin-top="0.101cm" fo:margin-bottom="0.347cm" style:contextual-spacing="false" fo:line-height="100%" fo:text-align="justify" style:justify-single-word="false" fo:text-indent="0cm" style:auto-text-indent="false"/>
      <style:text-properties style:font-name="Liberation Serif"/>
    </style:style>
    <style:style style:name="P12" style:family="paragraph" style:parent-style-name="Standard">
      <style:paragraph-properties fo:line-height="150%" fo:text-align="center" style:justify-single-word="false"/>
      <style:text-properties style:font-name="Liberation Serif" officeooo:paragraph-rsid="00cc3084"/>
    </style:style>
    <style:style style:name="P13" style:family="paragraph" style:parent-style-name="Heading_20_2">
      <style:paragraph-properties fo:line-height="150%" fo:text-align="center" style:justify-single-word="false" fo:keep-with-next="always"/>
      <style:text-properties officeooo:paragraph-rsid="02a4202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2a72435"/>
    </style:style>
    <style:style style:name="P16" style:family="paragraph" style:parent-style-name="Heading_20_2">
      <style:paragraph-properties fo:line-height="150%" fo:text-align="center" style:justify-single-word="false"/>
      <style:text-properties style:font-name="Liberation Serif" officeooo:paragraph-rsid="02434674"/>
    </style:style>
    <style:style style:name="P17"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18"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19" style:family="paragraph" style:parent-style-name="Quotations">
      <style:paragraph-properties fo:margin-left="1cm" fo:margin-right="1cm" fo:margin-top="0cm" fo:margin-bottom="0.499cm" style:contextual-spacing="false" fo:line-height="114%" fo:text-indent="0cm" style:auto-text-indent="false"/>
    </style:style>
    <style:style style:name="P20" style:family="paragraph" style:parent-style-name="Table_20_Contents">
      <style:paragraph-properties fo:margin-left="0cm" fo:margin-right="0cm" fo:margin-top="0cm" fo:margin-bottom="0.247cm" style:contextual-spacing="false" fo:line-height="114%" fo:text-indent="0cm" style:auto-text-indent="false"/>
    </style:style>
    <style:style style:name="P21" style:family="paragraph" style:parent-style-name="Table_20_Contents">
      <style:paragraph-properties fo:margin-left="0cm" fo:margin-right="0cm" fo:margin-top="0cm" fo:margin-bottom="0cm" style:contextual-spacing="false" fo:line-height="114%" fo:text-indent="0cm" style:auto-text-indent="false"/>
    </style:style>
    <style:style style:name="P22" style:family="paragraph" style:parent-style-name="Table_20_Contents">
      <style:paragraph-properties fo:margin-top="0cm" fo:margin-bottom="0.247cm" style:contextual-spacing="false" fo:line-height="114%"/>
    </style:style>
    <style:style style:name="P23"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24"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25" style:family="paragraph" style:parent-style-name="Text_20_body" style:list-style-name="L1">
      <style:paragraph-properties fo:margin-left="0cm" fo:margin-right="0cm" fo:line-height="114%" fo:text-align="justify" style:justify-single-word="false" fo:text-indent="0cm" style:auto-text-indent="false"/>
      <style:text-properties style:font-name="Liberation Serif"/>
    </style:style>
    <style:style style:name="P26" style:family="paragraph" style:parent-style-name="Text_20_body">
      <style:paragraph-properties fo:margin-left="0cm" fo:margin-right="0cm" fo:line-height="114%" fo:text-align="justify" style:justify-single-word="false" fo:text-indent="0cm" style:auto-text-indent="false"/>
      <style:text-properties style:font-name="Liberation Serif"/>
    </style:style>
    <style:style style:name="P27" style:family="paragraph" style:parent-style-name="Text_20_body" style:list-style-name="L2">
      <style:paragraph-properties fo:margin-left="0cm" fo:margin-right="0cm" fo:margin-top="0.101cm" fo:margin-bottom="0.347cm" style:contextual-spacing="false" fo:line-height="100%" fo:text-align="justify" style:justify-single-word="false" fo:text-indent="0cm" style:auto-text-indent="false"/>
      <style:text-properties style:font-name="Liberation Serif"/>
    </style:style>
    <style:style style:name="P28"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style>
    <style:style style:name="P29" style:family="paragraph" style:parent-style-name="Text_20_body">
      <style:paragraph-properties fo:margin-left="0cm" fo:margin-right="0cm" fo:margin-top="0cm" fo:margin-bottom="0.247cm" style:contextual-spacing="false" fo:line-height="114%" fo:text-indent="0cm" style:auto-text-indent="false"/>
    </style:style>
    <style:style style:name="P30"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style>
    <style:style style:name="P31"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style>
    <style:style style:name="P32"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33"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4"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5"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6"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7" style:family="paragraph" style:parent-style-name="Text_20_body">
      <style:paragraph-properties fo:margin-left="0cm" fo:margin-right="0cm" fo:line-height="114%" fo:text-align="justify" style:justify-single-word="false" fo:text-indent="0cm" style:auto-text-indent="false"/>
      <style:text-properties style:font-name="Google Sans Text"/>
    </style:style>
    <style:style style:name="P38" style:family="paragraph">
      <style:paragraph-properties fo:text-align="center"/>
    </style:style>
    <style:style style:name="P39" style:family="paragraph">
      <loext:graphic-properties draw:fill="none" draw:fill-color="#ffffff"/>
      <style:paragraph-properties fo:text-align="center"/>
      <style:text-properties style:font-name="MathJax_SansSerif" fo:font-size="40pt" style:font-size-asian="40pt" style:font-size-complex="40pt"/>
    </style:style>
    <style:style style:name="P40" style:family="paragraph">
      <loext:graphic-properties draw:fill="none" draw:fill-color="#ffffff"/>
      <style:paragraph-properties fo:text-align="center"/>
      <style:text-properties style:font-name="MathJax_Typewriter" fo:font-size="26pt" style:font-size-asian="26pt" style:font-size-complex="26pt"/>
    </style:style>
    <style:style style:name="P41" style:family="paragraph">
      <loext:graphic-properties draw:fill="none" draw:fill-color="#ffffff"/>
      <style:paragraph-properties fo:text-align="center"/>
      <style:text-properties style:font-name="MathJax_Typewriter" fo:font-size="35pt" fo:font-weight="normal" style:font-size-asian="35pt" style:font-weight-asian="normal" style:font-size-complex="35pt" style:font-weight-complex="normal"/>
    </style:style>
    <style:style style:name="P42" style:family="paragraph">
      <loext:graphic-properties draw:fill="solid" draw:fill-color="#dedce6"/>
      <style:paragraph-properties style:writing-mode="lr-tb"/>
    </style:style>
    <style:style style:name="P43" style:family="paragraph">
      <loext:graphic-properties draw:fill-color="#ffffff"/>
      <style:paragraph-properties fo:text-align="center"/>
    </style:style>
    <style:style style:name="T1" style:family="text">
      <style:text-properties style:font-name="MathJax_Typewriter" fo:font-size="15pt" fo:font-weight="normal" officeooo:rsid="0203eef7" style:font-size-asian="15pt" style:font-weight-asian="normal" style:font-size-complex="15pt" style:font-weight-complex="normal"/>
    </style:style>
    <style:style style:name="T2" style:family="text">
      <style:text-properties style:font-name="MathJax_Typewriter" fo:font-size="15pt" fo:font-weight="normal" officeooo:rsid="018c626a" style:font-size-asian="15pt" style:font-weight-asian="normal" style:font-size-complex="15pt" style:font-weight-complex="normal"/>
    </style:style>
    <style:style style:name="T3" style:family="text">
      <style:text-properties style:font-name="MathJax_Typewriter" fo:font-size="15pt" fo:font-weight="normal" officeooo:rsid="003bb751" style:font-size-asian="15pt" style:font-weight-asian="normal" style:font-size-complex="15pt" style:font-weight-complex="normal"/>
    </style:style>
    <style:style style:name="T4" style:family="text">
      <style:text-properties style:font-name="MathJax_Typewriter" fo:font-size="15pt" fo:font-weight="normal" officeooo:rsid="006b4a44" style:font-size-asian="15pt" style:font-weight-asian="normal" style:font-size-complex="15pt" style:font-weight-complex="normal"/>
    </style:style>
    <style:style style:name="T5" style:family="text">
      <style:text-properties style:font-name="MathJax_Typewriter" fo:font-size="15pt" fo:font-weight="bold" officeooo:rsid="02086b18" style:font-size-asian="15pt" style:font-weight-asian="bold" style:font-size-complex="15pt"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text-underline-style="none"/>
    </style:style>
    <style:style style:name="T9" style:family="text">
      <style:text-properties fo:color="#000000" loext:opacity="100%" style:font-name="MathJax_Typewriter" fo:font-size="13pt" style:text-underline-style="none" officeooo:rsid="02086b18" style:font-size-asian="13pt" style:font-size-complex="13pt"/>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style:font-name="Liberation Serif"/>
    </style:style>
    <style:style style:name="T13" style:family="text">
      <style:text-properties style:font-name="Liberation Serif" officeooo:rsid="02a4c4b2"/>
    </style:style>
    <style:style style:name="T14" style:family="text">
      <style:text-properties style:font-name="Liberation Serif" fo:font-style="italic" style:font-style-asian="italic" style:font-style-complex="italic"/>
    </style:style>
    <style:style style:name="T15" style:family="text">
      <style:text-properties style:font-name="Liberation Serif" fo:font-style="normal" officeooo:rsid="02a4c4b2" style:font-style-asian="normal" style:font-style-complex="normal"/>
    </style:style>
    <style:style style:name="T16" style:family="text">
      <style:text-properties style:font-name="Liberation Serif" officeooo:rsid="02a68529"/>
    </style:style>
    <style:style style:name="T17" style:family="text">
      <style:text-properties officeooo:rsid="02a19ad9"/>
    </style:style>
    <style:style style:name="T18" style:family="text">
      <style:text-properties style:font-name="Google Sans Text"/>
    </style:style>
    <style:style style:name="T19" style:family="text">
      <style:text-properties style:font-name="Google Sans Text" fo:font-weight="bold"/>
    </style:style>
    <style:style style:name="T20" style:family="text">
      <style:text-properties style:font-name="Google Sans Text" style:font-name-asian="Google Sans Text" style:font-name-complex="Google Sans Text"/>
    </style:style>
    <style:style style:name="T21" style:family="text">
      <style:text-properties style:font-name="Google Sans Text" fo:font-style="italic"/>
    </style:style>
    <style:style style:name="T22" style:family="text">
      <style:text-properties style:font-name="MathJax_SansSerif" fo:font-size="40pt" style:text-underline-style="none" fo:font-weight="bold" style:font-size-asian="40pt" style:font-weight-asian="bold" style:font-size-complex="40pt" style:font-weight-complex="bold"/>
    </style:style>
    <style:style style:name="T23" style:family="text">
      <style:text-properties style:font-name="MathJax_Typewriter" fo:font-size="26pt" style:text-underline-style="none" style:font-size-asian="26pt" style:font-size-complex="26pt"/>
    </style:style>
    <style:style style:name="T24" style:family="text">
      <style:text-properties style:font-name="MathJax_Typewriter" fo:font-size="35pt" fo:font-weight="normal" style:font-size-asian="35pt" style:font-weight-asian="normal" style:font-size-complex="35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2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Forma 1" draw:style-name="gr4" draw:text-style-name="P42" svg:width="10.699cm" svg:height="29.795cm" svg:x="-2.833cm" svg:y="-2.82cm"><text:p/><draw:enhanced-geometry svg:viewBox="0 0 21600 21600" draw:type="rectangle" draw:enhanced-path="M 0 0 L 21600 0 21600 21600 0 21600 0 0 Z N"/></draw:custom-shape><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draw:frame draw:style-name="fr2" draw:name="Imagen2" text:anchor-type="char" svg:x="-0.647cm" svg:y="0.125cm" svg:width="7.987cm" svg:height="7.987cm" draw:z-index="2"><draw:image xlink:href="Pictures/10000001000001B0000001B04AB7F566.png" xlink:type="simple" xlink:show="embed" xlink:actuate="onLoad" draw:mime-type="image/png"/></draw:frame><text:span text:style-name="T8"/></text:p>
      <text:p text:style-name="P2"><text:span text:style-name="T8"/></text:p>
      <text:p text:style-name="P2"><text:span text:style-name="T8"/></text:p>
      <text:p text:style-name="P2"><text:span text:style-name="T8"/></text:p>
      <text:p text:style-name="P2"><draw:frame text:anchor-type="paragraph" draw:z-index="3" draw:name="Marco de texto 1" draw:style-name="gr3" draw:text-style-name="P41" svg:width="9.129cm" svg:height="4.296cm" svg:x="1.757cm" svg:y="0.247cm"><draw:text-box><text:p text:style-name="P38"><text:span text:style-name="T24">Seguimiento </text:span><text:span text:style-name="T24">del Proyecto </text:span><text:span text:style-name="T24">- Scrum</text:span></text:p></draw:text-box></draw:frame><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draw:frame text:anchor-type="paragraph" draw:z-index="5" draw:name="Marco de texto 3" draw:style-name="gr1" draw:text-style-name="P39" svg:width="7.873cm" svg:height="1.414cm" svg:x="-0.6cm" svg:y="0.312cm"><draw:text-box><text:p text:style-name="P38"><text:span text:style-name="T22">Temporis:</text:span></text:p></draw:text-box></draw:frame><text:span text:style-name="T8"/></text:p>
      <text:p text:style-name="P2"><text:span text:style-name="T8"/></text:p>
      <text:p text:style-name="P2"><text:span text:style-name="T8"/></text:p>
      <text:p text:style-name="P2"><draw:frame text:anchor-type="paragraph" draw:z-index="4" draw:name="Marco de texto 2" draw:style-name="gr2" draw:text-style-name="P40" svg:width="7.839cm" svg:height="4.329cm" svg:x="-0.563cm" svg:y="0.381cm"><draw:text-box><text:p text:style-name="P38"><text:span text:style-name="T23">Una herramienta </text:span><text:span text:style-name="T23">accesible para el </text:span><text:span text:style-name="T23">control y la </text:span><text:span text:style-name="T23">optimización de </text:span><text:span text:style-name="T23">nuestro tiempo</text:span></text:p></draw:text-box></draw:frame><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draw:custom-shape text:anchor-type="paragraph" draw:z-index="0" draw:name="Forma 2" draw:style-name="gr5" draw:text-style-name="P43" svg:width="2.449cm" svg:height="2.449cm" svg:x="8.46cm" svg:y="0.646cm"><text:p/><draw:enhanced-geometry svg:viewBox="0 0 21600 21600" draw:type="rectangle" draw:enhanced-path="M 0 0 L 21600 0 21600 21600 0 21600 0 0 Z N"/></draw:custom-shape><text:span text:style-name="T8"/></text:p>
      <text:p text:style-name="P12"/>
      <text:h text:style-name="P3" text:outline-level="2"><text:soft-page-break/><text:span text:style-name="T8">1. </text:span>Indicadores de Calidad y Evaluación</text:h>
      <text:p text:style-name="P9">Para evaluar el progreso, he definido los siguientes indicadores:</text:p>
      <text:p text:style-name="P37">A continuación se presenta la tabla maestra que centraliza la totalidad de las incidencias técnicas registradas y solucionadas durante el ciclo de vida del proyecto. De acuerdo con la planificación final, el desarrollo se organizó en los Sprints 1 y 2, mientras que el Sprint 3 se reservó de forma exclusiva para la elaboración de casos de prueba y la confección de la documentación técnica asociada.</text:p>
      <table:table table:name="Tabla2" table:style-name="Tabla2">
        <table:table-column table:style-name="Tabla2.A"/>
        <table:table-column table:style-name="Tabla2.B"/>
        <table:table-column table:style-name="Tabla2.C"/>
        <table:table-column table:style-name="Tabla2.D"/>
        <table:table-column table:style-name="Tabla2.E"/>
        <table:table-header-rows>
          <table:table-row>
            <table:table-cell table:style-name="Tabla2.A1" office:value-type="string">
              <text:p text:style-name="P21"><text:span text:style-name="Strong_20_Emphasis"><text:span text:style-name="T18">ID</text:span></text:span></text:p>
            </table:table-cell>
            <table:table-cell table:style-name="Tabla2.A1" office:value-type="string">
              <text:p text:style-name="P21"><text:span text:style-name="Strong_20_Emphasis"><text:span text:style-name="T18">Sprint / Fase</text:span></text:span></text:p>
            </table:table-cell>
            <table:table-cell table:style-name="Tabla2.A1" office:value-type="string">
              <text:p text:style-name="P21"><text:span text:style-name="Strong_20_Emphasis"><text:span text:style-name="T18">Incidencia Técnica Detectada</text:span></text:span></text:p>
            </table:table-cell>
            <table:table-cell table:style-name="Tabla2.A1" office:value-type="string">
              <text:p text:style-name="P21"><text:span text:style-name="Strong_20_Emphasis"><text:span text:style-name="T18">Impacto / Severidad</text:span></text:span></text:p>
            </table:table-cell>
            <table:table-cell table:style-name="Tabla2.A1" office:value-type="string">
              <text:p text:style-name="P21"><text:span text:style-name="Strong_20_Emphasis"><text:span text:style-name="T18">Tarea Relacionada / Contexto</text:span></text:span></text:p>
            </table:table-cell>
          </table:table-row>
        </table:table-header-rows>
        <table:table-row>
          <table:table-cell table:style-name="Tabla2.A1" office:value-type="string">
            <text:p text:style-name="P23">INC-01</text:p>
          </table:table-cell>
          <table:table-cell table:style-name="Tabla2.A1" office:value-type="string">
            <text:p text:style-name="P24">Sprint 1 (Auth)</text:p>
          </table:table-cell>
          <table:table-cell table:style-name="Tabla2.A1" office:value-type="string">
            <text:p text:style-name="P24">Error de configuración inicial en los servicios de Firebase y conexión con el proyecto Android.</text:p>
          </table:table-cell>
          <table:table-cell table:style-name="Tabla2.A1" office:value-type="string">
            <text:p text:style-name="P24">Bloqueo total</text:p>
          </table:table-cell>
          <table:table-cell table:style-name="Tabla2.A1" office:value-type="string">
            <text:p text:style-name="P24">Configuración de infraestructura base</text:p>
          </table:table-cell>
        </table:table-row>
        <table:table-row>
          <table:table-cell table:style-name="Tabla2.A1" office:value-type="string">
            <text:p text:style-name="P23">INC-02</text:p>
          </table:table-cell>
          <table:table-cell table:style-name="Tabla2.A1" office:value-type="string">
            <text:p text:style-name="P24">Sprint 1 (Logic)</text:p>
          </table:table-cell>
          <table:table-cell table:style-name="Tabla2.A1" office:value-type="string">
            <text:p text:style-name="P24">Problemas de compilación por imports faltantes tras la creación de entidades Kotlin.</text:p>
          </table:table-cell>
          <table:table-cell table:style-name="Tabla2.A1" office:value-type="string">
            <text:p text:style-name="P24">Error de compilación</text:p>
          </table:table-cell>
          <table:table-cell table:style-name="Tabla2.A1" office:value-type="string">
            <text:p text:style-name="P24">Modelado de datos inicial</text:p>
          </table:table-cell>
        </table:table-row>
        <table:table-row>
          <table:table-cell table:style-name="Tabla2.A1" office:value-type="string">
            <text:p text:style-name="P23">INC-03</text:p>
          </table:table-cell>
          <table:table-cell table:style-name="Tabla2.A1" office:value-type="string">
            <text:p text:style-name="P24">Sprint 2 (Auth)</text:p>
          </table:table-cell>
          <table:table-cell table:style-name="Tabla2.A1" office:value-type="string">
            <text:p text:style-name="P24">Error "10" en la autenticación con Google Account.</text:p>
          </table:table-cell>
          <table:table-cell table:style-name="Tabla2.A1" office:value-type="string">
            <text:p text:style-name="P24">Acceso denegado</text:p>
          </table:table-cell>
          <table:table-cell table:style-name="Tabla2.A1" office:value-type="string">
            <text:p text:style-name="P24">Integración de Autenticación de Google</text:p>
          </table:table-cell>
        </table:table-row>
        <table:table-row>
          <table:table-cell table:style-name="Tabla2.A1" office:value-type="string">
            <text:p text:style-name="P23">INC-04</text:p>
          </table:table-cell>
          <table:table-cell table:style-name="Tabla2.A1" office:value-type="string">
            <text:p text:style-name="P24">Sprint 2 (UI)</text:p>
          </table:table-cell>
          <table:table-cell table:style-name="Tabla2.A1" office:value-type="string">
            <text:p text:style-name="P24">Desajuste en el título de la vista del Perfil de Usuario (User Profile View).</text:p>
          </table:table-cell>
          <table:table-cell table:style-name="Tabla2.A1" office:value-type="string">
            <text:p text:style-name="P24">Error visual</text:p>
          </table:table-cell>
          <table:table-cell table:style-name="Tabla2.A1" office:value-type="string">
            <text:p text:style-name="P24">Interfaz de usuario (Dashboard Perfil)</text:p>
          </table:table-cell>
        </table:table-row>
        <table:table-row>
          <table:table-cell table:style-name="Tabla2.A1" office:value-type="string">
            <text:p text:style-name="P23">INC-05</text:p>
          </table:table-cell>
          <table:table-cell table:style-name="Tabla2.A1" office:value-type="string">
            <text:p text:style-name="P24">Sprint 2 (Core)</text:p>
          </table:table-cell>
          <table:table-cell table:style-name="Tabla2.A1" office:value-type="string">
            <text:p text:style-name="P24">Error en la función de borrado (Delete) de los temporizadores creados.</text:p>
          </table:table-cell>
          <table:table-cell table:style-name="Tabla2.A1" office:value-type="string">
            <text:p text:style-name="P24">Pérdida de datos</text:p>
          </table:table-cell>
          <table:table-cell table:style-name="Tabla2.A1" office:value-type="string">
            <text:p text:style-name="P24">Lógica del Repositorio de Temporizadores</text:p>
          </table:table-cell>
        </table:table-row>
        <table:table-row>
          <table:table-cell table:style-name="Tabla2.A1" office:value-type="string">
            <text:p text:style-name="P23">INC-<text:soft-page-break/>06</text:p>
          </table:table-cell>
          <table:table-cell table:style-name="Tabla2.A1" office:value-type="string">
            <text:p text:style-name="P24">Sprint 2 <text:soft-page-break/>(UI)</text:p>
          </table:table-cell>
          <table:table-cell table:style-name="Tabla2.A1" office:value-type="string">
            <text:p text:style-name="P24">Persistencia de errores en el botón de cerrar sesión (Logout).</text:p>
          </table:table-cell>
          <table:table-cell table:style-name="Tabla2.A1" office:value-type="string">
            <text:p text:style-name="P24">Fallo de seguridad</text:p>
          </table:table-cell>
          <table:table-cell table:style-name="Tabla2.A1" office:value-type="string">
            <text:p text:style-name="P24">Gestión de ciclo de sesión de usuario</text:p>
          </table:table-cell>
        </table:table-row>
        <table:table-row>
          <table:table-cell table:style-name="Tabla2.A1" office:value-type="string">
            <text:p text:style-name="P23">INC-07</text:p>
          </table:table-cell>
          <table:table-cell table:style-name="Tabla2.A1" office:value-type="string">
            <text:p text:style-name="P24">Sprint 2 (Acc)</text:p>
          </table:table-cell>
          <table:table-cell table:style-name="Tabla2.A1" office:value-type="string">
            <text:p text:style-name="P24">Fatal Error (Crash) al intentar acceder a la vista de opciones de Accesibilidad.</text:p>
          </table:table-cell>
          <table:table-cell table:style-name="Tabla2.A1" office:value-type="string">
            <text:p text:style-name="P24">Bloqueo de función</text:p>
          </table:table-cell>
          <table:table-cell table:style-name="Tabla2.A1" office:value-type="string">
            <text:p text:style-name="P24">Configuración de TalkBack y redimensión</text:p>
          </table:table-cell>
        </table:table-row>
        <table:table-row>
          <table:table-cell table:style-name="Tabla2.A1" office:value-type="string">
            <text:p text:style-name="P23">INC-08</text:p>
          </table:table-cell>
          <table:table-cell table:style-name="Tabla2.A1" office:value-type="string">
            <text:p text:style-name="P24">Sprint 2 (Acc)</text:p>
          </table:table-cell>
          <table:table-cell table:style-name="Tabla2.A1" office:value-type="string">
            <text:p text:style-name="P24">Error crítico al activar el Modo Oscuro en las vistas Home, Timers e Info.</text:p>
          </table:table-cell>
          <table:table-cell table:style-name="Tabla2.A1" office:value-type="string">
            <text:p text:style-name="P20">‘<text:span text:style-name="T18">Crash’ de la ‘App’</text:span></text:p>
          </table:table-cell>
          <table:table-cell table:style-name="Tabla2.A1" office:value-type="string">
            <text:p text:style-name="P24">Estilos de Temas Dinámicos</text:p>
          </table:table-cell>
        </table:table-row>
        <table:table-row>
          <table:table-cell table:style-name="Tabla2.A1" office:value-type="string">
            <text:p text:style-name="P23">INC-09</text:p>
          </table:table-cell>
          <table:table-cell table:style-name="Tabla2.A1" office:value-type="string">
            <text:p text:style-name="P24">Sprint 2 (UI)</text:p>
          </table:table-cell>
          <table:table-cell table:style-name="Tabla2.A1" office:value-type="string">
            <text:p text:style-name="P24">Los botones de la interfaz aparecían con estilos inconsistentes (cuadrados vs redondeados) entre temas.</text:p>
          </table:table-cell>
          <table:table-cell table:style-name="Tabla2.A1" office:value-type="string">
            <text:p text:style-name="P24">Estética / UX</text:p>
          </table:table-cell>
          <table:table-cell table:style-name="Tabla2.A1" office:value-type="string">
            <text:p text:style-name="P24">Unificación estética del sistema visual</text:p>
          </table:table-cell>
        </table:table-row>
        <table:table-row>
          <table:table-cell table:style-name="Tabla2.A1" office:value-type="string">
            <text:p text:style-name="P23">INC-10</text:p>
          </table:table-cell>
          <table:table-cell table:style-name="Tabla2.A1" office:value-type="string">
            <text:p text:style-name="P24">Sprint 2 (Acc)</text:p>
          </table:table-cell>
          <table:table-cell table:style-name="Tabla2.A1" office:value-type="string">
            <text:p text:style-name="P24">Desajuste en el escalado de textos al usar unidades "dp" en lugar de "sp".</text:p>
          </table:table-cell>
          <table:table-cell table:style-name="Tabla2.A1" office:value-type="string">
            <text:p text:style-name="P24">Accesibilidad</text:p>
          </table:table-cell>
          <table:table-cell table:style-name="Tabla2.A1" office:value-type="string">
            <text:p text:style-name="P24">Adaptabilidad de fuentes accesibles</text:p>
          </table:table-cell>
        </table:table-row>
        <table:table-row>
          <table:table-cell table:style-name="Tabla2.A1" office:value-type="string">
            <text:p text:style-name="P23">INC-11</text:p>
          </table:table-cell>
          <table:table-cell table:style-name="Tabla2.A1" office:value-type="string">
            <text:p text:style-name="P24">Sprint 2 (Final)</text:p>
          </table:table-cell>
          <table:table-cell table:style-name="Tabla2.A1" office:value-type="string">
            <text:p text:style-name="P24">El teclado virtual ocultaba los formularios de entrada de datos al crear o editar temporizadores. <text:span text:style-name="T10">(Aún pendiente de parche definitivo en producción)</text:span></text:p>
          </table:table-cell>
          <table:table-cell table:style-name="Tabla2.A1" office:value-type="string">
            <text:p text:style-name="P24">Usabilidad (UX)</text:p>
          </table:table-cell>
          <table:table-cell table:style-name="Tabla2.A1" office:value-type="string">
            <text:p text:style-name="P24">Formulario de Entrada en pantallas pequeñas</text:p>
          </table:table-cell>
        </table:table-row>
        <table:table-row>
          <table:table-cell table:style-name="Tabla2.A1" office:value-type="string">
            <text:p text:style-name="P23">INC-12</text:p>
          </table:table-cell>
          <table:table-cell table:style-name="Tabla2.A1" office:value-type="string">
            <text:p text:style-name="P24">Sprint 2 (Auth)</text:p>
          </table:table-cell>
          <table:table-cell table:style-name="Tabla2.A1" office:value-type="string">
            <text:p text:style-name="P24">Redirección errónea a la pantalla de inicio justo después de aplicar cambios en la configuración de accesibilidad.</text:p>
          </table:table-cell>
          <table:table-cell table:style-name="Tabla2.A1" office:value-type="string">
            <text:p text:style-name="P24">Error de flujo</text:p>
          </table:table-cell>
          <table:table-cell table:style-name="Tabla2.A1" office:value-type="string">
            <text:p text:style-name="P24">Control de navegación y ciclo de fragmentos</text:p>
          </table:table-cell>
        </table:table-row>
      </table:table>
      <text:p text:style-name="P19"><text:span text:style-name="T19">Nota de Ajuste de Trazabilidad:</text:span><text:span text:style-name="T18"> Las incidencias </text:span><text:span text:style-name="Source_20_Text"><text:span text:style-name="T18">INC-06</text:span></text:span><text:span text:style-name="T18"> a </text:span><text:span text:style-name="Source_20_Text"><text:span text:style-name="T18">INC-12</text:span></text:span><text:span text:style-name="T18"> (originalmente listadas de forma preliminar bajo Sprints 3 y 4 de codificación) han sido reasignadas rigurosamente al </text:span><text:span text:style-name="T19">Sprint 2</text:span><text:span text:style-name="T18">, consolidando allí toda la fase final de lógica, interfaces y los esfuerzos de accesibilidad móvil antes de congelar el código para la fase de testing masivo.</text:span></text:p>
      <text:h text:style-name="P17" text:outline-level="2"><text:soft-page-break/>3. Tablas Explicativas Detalladas por Sprint</text:h>
      <text:h text:style-name="P18" text:outline-level="3">Sprint 1: Inicialización de la Arquitectura y Entidades Base</text:h>
      <text:list text:style-name="L3">
        <text:list-item>
          <text:p text:style-name="P33"><text:span text:style-name="T6">Fecha de Inicio:</text:span> 13 de febrero de 2025</text:p>
        </text:list-item>
        <text:list-item>
          <text:p text:style-name="P33"><text:span text:style-name="T6">Fecha de Fin:</text:span> 25 de marzo de 2025</text:p>
        </text:list-item>
      </text:list>
      <table:table table:name="Tabla3" table:style-name="Tabla3">
        <table:table-column table:style-name="Tabla3.A"/>
        <table:table-header-rows>
          <table:table-row>
            <table:table-cell table:style-name="Tabla3.A1" office:value-type="string">
              <text:p text:style-name="P21"><text:span text:style-name="Strong_20_Emphasis"><text:span text:style-name="T18">Detalle de Incidencias Técnicas Registradas (Sprint 1)</text:span></text:span></text:p>
            </table:table-cell>
          </table:table-row>
        </table:table-header-rows>
        <table:table-row>
          <table:table-cell table:style-name="Tabla3.A1" office:value-type="string">
            <text:p text:style-name="P20">📋 <text:span text:style-name="T19">Incidencia:</text:span><text:span text:style-name="T18"> </text:span><text:span text:style-name="Source_20_Text"><text:span text:style-name="T18">INC-01</text:span></text:span><text:span text:style-name="T18"> — Error de configuración inicial en los servicios de Firebase y conexión con el proyecto Android.</text:span></text:p>
            <text:p text:style-name="P22"/>
            <text:p text:style-name="P20">• <text:span text:style-name="T19">Tarea relacionada:</text:span><text:span text:style-name="T18"> Configuración inicial de Firebase Auth/Firestore.</text:span></text:p>
            <text:p text:style-name="P22"/>
            <text:p text:style-name="P20">• <text:span text:style-name="T19">Problemas generados:</text:span><text:span text:style-name="T18"> Bloqueo absoluto de las llamadas de red y crash de la app en el arranque al no validar el archivo </text:span><text:span text:style-name="Source_20_Text"><text:span text:style-name="T18">google-services.json</text:span></text:span><text:span text:style-name="T18">.</text:span></text:p>
            <text:p text:style-name="P22"/>
            <text:p text:style-name="P20">• <text:span text:style-name="T19">Cambios futuros / Lecciones:</text:span><text:span text:style-name="T18"> Validar credenciales de SHA-1 en la consola de Firebase antes de compilar localmente.</text:span></text:p>
          </table:table-cell>
        </table:table-row>
        <table:table-row>
          <table:table-cell table:style-name="Tabla3.A1" office:value-type="string">
            <text:p text:style-name="P20">📋 <text:span text:style-name="T19">Incidencia:</text:span><text:span text:style-name="T18"> </text:span><text:span text:style-name="Source_20_Text"><text:span text:style-name="T18">INC-02</text:span></text:span><text:span text:style-name="T18"> — Problemas de compilación por imports faltantes tras la creación de entidades Kotlin.</text:span></text:p>
            <text:p text:style-name="P22"/>
            <text:p text:style-name="P20">• <text:span text:style-name="T19">Tarea relacionada:</text:span><text:span text:style-name="T18"> Modelado e inicialización de entidades de negocio (</text:span><text:span text:style-name="Source_20_Text"><text:span text:style-name="T18">User</text:span></text:span><text:span text:style-name="T18">, </text:span><text:span text:style-name="Source_20_Text"><text:span text:style-name="T18">Timer</text:span></text:span><text:span text:style-name="T18">).</text:span></text:p>
            <text:p text:style-name="P22"/>
            <text:p text:style-name="P20">• <text:span text:style-name="T19">Problemas generados:</text:span><text:span text:style-name="T18"> Errores explícitos en el compilador de Gradle que detuvieron la integración en la rama limpia de desarrollo.</text:span></text:p>
            <text:p text:style-name="P22"/>
            <text:p text:style-name="P20">• <text:span text:style-name="T19">Cambios futuros / Lecciones:</text:span><text:span text:style-name="T18"> Configurar la auto-importación estricta en Android Studio y realizar comprobaciones pre-commit.</text:span></text:p>
          </table:table-cell>
        </table:table-row>
      </table:table>
      <text:h text:style-name="P18" text:outline-level="3">Sprint 2: Implementación de Lógica Core, UX y Capa de Accesibilidad</text:h>
      <text:list text:style-name="L4">
        <text:list-item>
          <text:p text:style-name="P34"><text:span text:style-name="T6">Fecha de Inicio:</text:span> 26 de marzo de 2026</text:p>
        </text:list-item>
        <text:list-item>
          <text:p text:style-name="P34"><text:span text:style-name="T6">Fecha de Fin:</text:span> 29 de abril de 2026</text:p>
        </text:list-item>
      </text:list>
      <table:table table:name="Tabla4" table:style-name="Tabla4">
        <table:table-column table:style-name="Tabla4.A"/>
        <table:table-header-rows>
          <table:table-row>
            <table:table-cell table:style-name="Tabla4.A1" office:value-type="string">
              <text:p text:style-name="P21"><text:span text:style-name="Strong_20_Emphasis"><text:span text:style-name="T18">Detalle de Incidencias Técnicas Registradas (Sprint 2)</text:span></text:span></text:p>
            </table:table-cell>
          </table:table-row>
        </table:table-header-rows>
        <table:table-row>
          <table:table-cell table:style-name="Tabla4.A1" office:value-type="string">
            <text:p text:style-name="P20">📋 <text:span text:style-name="T19">Incidencia:</text:span><text:span text:style-name="T18"> </text:span><text:span text:style-name="Source_20_Text"><text:span text:style-name="T18">INC-03</text:span></text:span><text:span text:style-name="T18"> — Error "10" en la autenticación con Google Account.</text:span></text:p>
            <text:p text:style-name="P22"/>
            <text:p text:style-name="P20">• <text:span text:style-name="T19">Tarea relacionada:</text:span><text:span text:style-name="T18"> Autenticación Social con Google.</text:span></text:p>
            <text:p text:style-name="P22"/>
            <text:p text:style-name="P20">• <text:span text:style-name="T19">Problemas generados:</text:span><text:span text:style-name="T18"> Flujo de Login interrumpido; denegación de acceso completa debido a un desajuste técnico con la firma SHA-1 de depuración.</text:span></text:p>
            <text:p text:style-name="P22"/>
            <text:p text:style-name="P20">• <text:span text:style-name="T19">Cambios futuros / Lecciones:</text:span><text:span text:style-name="T18"> Sincronizar las firmas de desarrollo y producción de Gradle directamente en el panel de control del proveedor de autenticación.</text:span></text:p>
          </table:table-cell>
        </table:table-row>
        <table:table-row>
          <table:table-cell table:style-name="Tabla4.A1" office:value-type="string">
            <text:p text:style-name="P20">📋 <text:span text:style-name="T19">Incidencia:</text:span><text:span text:style-name="T18"> </text:span><text:span text:style-name="Source_20_Text"><text:span text:style-name="T18">INC-04</text:span></text:span><text:span text:style-name="T18"> — Desajuste en el título de la vista del Perfil de Usuario (User Profile View).</text:span></text:p>
            <text:p text:style-name="P22"/>
            <text:p text:style-name="P20">• <text:span text:style-name="T19">Tarea relacionada:</text:span><text:span text:style-name="T18"> Maquetación del panel del usuario.</text:span></text:p>
            <text:p text:style-name="P22"/>
            <text:p text:style-name="P20">• <text:span text:style-name="T19">Problemas generados:</text:span><text:span text:style-name="T18"> Error visual menor pero que rompía la línea estética en múltiples resoluciones de pantalla.</text:span></text:p>
            <text:p text:style-name="P22"/>
            <text:p text:style-name="P20">• <text:span text:style-name="T19">Cambios futuros / Lecciones:</text:span><text:span text:style-name="T18"> Emplear restricciones flexibles en el Layout XML en lugar de márgenes fijos (</text:span><text:span text:style-name="Source_20_Text"><text:span text:style-name="T18">hardcoded</text:span></text:span><text:span text:style-name="T18">).</text:span></text:p>
          </table:table-cell>
        </table:table-row>
        <table:table-row>
          <table:table-cell table:style-name="Tabla4.A1" office:value-type="string">
            <text:p text:style-name="P20">📋 <text:span text:style-name="T19">Incidencia:</text:span><text:span text:style-name="T18"> </text:span><text:span text:style-name="Source_20_Text"><text:span text:style-name="T18">INC-05</text:span></text:span><text:span text:style-name="T18"> — Error en la función de borrado (Delete) de los temporizadores creados.</text:span></text:p>
            <text:p text:style-name="P22"/>
            <text:p text:style-name="P20">• <text:span text:style-name="T19">Tarea relacionada:</text:span><text:span text:style-name="T18"> Operaciones CRUD del Repositorio de Temporizadores.</text:span></text:p>
            <text:p text:style-name="P22"/>
            <text:p text:style-name="P20">• <text:span text:style-name="T19">Problemas generados:</text:span><text:span text:style-name="T18"> Persistencia huérfana en la base de datos local y riesgo crítico de inconsistencia o pérdida de datos visualizados.</text:span></text:p>
            <text:p text:style-name="P22"/>
            <text:p text:style-name="P20">• <text:span text:style-name="T19">Cambios futuros / Lecciones:</text:span><text:span text:style-name="T18"> Implementar borrado lógico inmediato acompañado de una confirmación asíncrona mediante callbacks de Firebase.</text:span></text:p>
          </table:table-cell>
        </table:table-row>
        <text:soft-page-break/>
        <table:table-row>
          <table:table-cell table:style-name="Tabla4.A1" office:value-type="string">
            <text:p text:style-name="P20">📋 <text:span text:style-name="T19">Incidencia:</text:span><text:span text:style-name="T18"> </text:span><text:span text:style-name="Source_20_Text"><text:span text:style-name="T18">INC-06</text:span></text:span><text:span text:style-name="T18"> — Persistencia de errores en el botón de cerrar sesión (Logout).</text:span></text:p>
            <text:p text:style-name="P22"/>
            <text:p text:style-name="P20">• <text:span text:style-name="T19">Tarea relacionada:</text:span><text:span text:style-name="T18"> Control de Ciclo de Vida de Sesión.</text:span></text:p>
            <text:p text:style-name="P22"/>
            <text:p text:style-name="P20">• <text:span text:style-name="T19">Problemas generados:</text:span><text:span text:style-name="T18"> El token quedaba en caché, permitiendo regresar a la pantalla anterior sin credenciales válidas (Fallo de seguridad).</text:span></text:p>
            <text:p text:style-name="P22"/>
            <text:p text:style-name="P20">• <text:span text:style-name="T19">Cambios futuros / Lecciones:</text:span><text:span text:style-name="T18"> Invalidar explícitamente la instancia del cliente de autenticación e invocar un borrado completo de la pila de actividades (</text:span><text:span text:style-name="Source_20_Text"><text:span text:style-name="T18">Intent.FLAG_ACTIVITY_CLEAR_TOP</text:span></text:span><text:span text:style-name="T18">).</text:span></text:p>
          </table:table-cell>
        </table:table-row>
        <table:table-row>
          <table:table-cell table:style-name="Tabla4.A1" office:value-type="string">
            <text:p text:style-name="P20">📋 <text:span text:style-name="T19">Incidencia:</text:span><text:span text:style-name="T18"> </text:span><text:span text:style-name="Source_20_Text"><text:span text:style-name="T18">INC-07</text:span></text:span><text:span text:style-name="T18"> — Fatal Error (Crash) al intentar acceder a la vista de opciones de Accesibilidad.</text:span></text:p>
            <text:p text:style-name="P22"/>
            <text:p text:style-name="P20">• <text:span text:style-name="T19">Tarea relacionada:</text:span><text:span text:style-name="T18"> Vista de Ajustes de Accesibilidad Avanzada.</text:span></text:p>
            <text:p text:style-name="P22"/>
            <text:p text:style-name="P20">• <text:span text:style-name="T19">Problemas generados:</text:span><text:span text:style-name="T18"> Caída drástica de la aplicación al presionar el botón de ajustes debido a inflado erróneo del fragmento.</text:span></text:p>
            <text:p text:style-name="P22"/>
            <text:p text:style-name="P20">• <text:span text:style-name="T19">Cambios futuros / Lecciones:</text:span><text:span text:style-name="T18"> Isolar y testear las vistas complejas mediante herramientas de UI unitaria de manera previa.</text:span></text:p>
          </table:table-cell>
        </table:table-row>
        <table:table-row>
          <table:table-cell table:style-name="Tabla4.A1" office:value-type="string">
            <text:p text:style-name="P20">📋 <text:span text:style-name="T19">Incidencia:</text:span><text:span text:style-name="T18"> </text:span><text:span text:style-name="Source_20_Text"><text:span text:style-name="T18">INC-08</text:span></text:span><text:span text:style-name="T18"> — Error crítico al activar el Modo Oscuro en las vistas Home, Timers e Info.</text:span></text:p>
            <text:p text:style-name="P22"/>
            <text:p text:style-name="P20">• <text:span text:style-name="T19">Tarea relacionada:</text:span><text:span text:style-name="T18"> Aplicación de Temas Dinámicos en la UI.</text:span></text:p>
            <text:p text:style-name="P22"/>
            <text:p text:style-name="P20">• <text:span text:style-name="T19">Problemas generados:</text:span><text:span text:style-name="T18"> Bloqueo total ('Crash') de la aplicación por falta de referencias de color en el archivo XML nocturno.</text:span></text:p>
            <text:p text:style-name="P22"/>
            <text:p text:style-name="P20">• <text:span text:style-name="T19">Cambios futuros / Lecciones:</text:span><text:span text:style-name="T18"> Validar la simetría absoluta de atributos entre el </text:span><text:soft-page-break/><text:span text:style-name="T18">archivo </text:span><text:span text:style-name="Source_20_Text"><text:span text:style-name="T18">themes.xml</text:span></text:span><text:span text:style-name="T18"> estándar y su variante </text:span><text:span text:style-name="Source_20_Text"><text:span text:style-name="T18">night</text:span></text:span><text:span text:style-name="T18">.</text:span></text:p>
          </table:table-cell>
        </table:table-row>
        <table:table-row>
          <table:table-cell table:style-name="Tabla4.A1" office:value-type="string">
            <text:p text:style-name="P20">📋 <text:span text:style-name="T19">Incidencia:</text:span><text:span text:style-name="T18"> </text:span><text:span text:style-name="Source_20_Text"><text:span text:style-name="T18">INC-09</text:span></text:span><text:span text:style-name="T18"> — Estilos inconsistentes en los botones de la interfaz (cuadrados vs redondeados) entre temas.</text:span></text:p>
            <text:p text:style-name="P22"/>
            <text:p text:style-name="P20">• <text:span text:style-name="T19">Tarea relacionada:</text:span><text:span text:style-name="T18"> Centralización estética de la interfaz de usuario.</text:span></text:p>
            <text:p text:style-name="P22"/>
            <text:p text:style-name="P20">• <text:span text:style-name="T19">Problemas generados:</text:span><text:span text:style-name="T18"> Degradación de la consistencia de marca y de la UX al saltar de modo claro a alto contraste.</text:span></text:p>
            <text:p text:style-name="P22"/>
            <text:p text:style-name="P20">• <text:span text:style-name="T19">Cambios futuros / Lecciones:</text:span><text:span text:style-name="T18"> Heredar de estilos globales unificados e inmutables del sistema de diseño base de la aplicación.</text:span></text:p>
          </table:table-cell>
        </table:table-row>
        <table:table-row>
          <table:table-cell table:style-name="Tabla4.A1" office:value-type="string">
            <text:p text:style-name="P20">📋 <text:span text:style-name="T19">Incidencia:</text:span><text:span text:style-name="T18"> </text:span><text:span text:style-name="Source_20_Text"><text:span text:style-name="T18">INC-10</text:span></text:span><text:span text:style-name="T18"> — Desajuste en el escalado de textos al usar unidades "dp" en lugar de "sp".</text:span></text:p>
            <text:p text:style-name="P22"/>
            <text:p text:style-name="P20">• <text:span text:style-name="T19">Tarea relacionada:</text:span><text:span text:style-name="T18"> Adaptabilidad de textos según normativas WCAG.</text:span></text:p>
            <text:p text:style-name="P22"/>
            <text:p text:style-name="P20">• <text:span text:style-name="T19">Problemas generados:</text:span><text:span text:style-name="T18"> Bloqueo en la accesibilidad para usuarios que dependen del zoom de texto del sistema operativo móvil.</text:span></text:p>
            <text:p text:style-name="P22"/>
            <text:p text:style-name="P20">• <text:span text:style-name="T19">Cambios futuros / Lecciones:</text:span><text:span text:style-name="T18"> Prohibir el uso de "dp" para fuentes en el linter estático de código del proyecto Android.</text:span></text:p>
          </table:table-cell>
        </table:table-row>
        <table:table-row>
          <table:table-cell table:style-name="Tabla4.A1" office:value-type="string">
            <text:p text:style-name="P20">📋 <text:span text:style-name="T19">Incidencia:</text:span><text:span text:style-name="T18"> </text:span><text:span text:style-name="Source_20_Text"><text:span text:style-name="T18">INC-11</text:span></text:span><text:span text:style-name="T18"> — El teclado virtual ocultaba los formularios de entrada de datos al crear o editar temporizadores.</text:span></text:p>
            <text:p text:style-name="P22"/>
            <text:p text:style-name="P20">• <text:span text:style-name="T19">Tarea relacionada:</text:span><text:span text:style-name="T18"> Usabilidad en vistas de entrada de datos.</text:span></text:p>
            <text:p text:style-name="P22"/>
            <text:p text:style-name="P20">• <text:span text:style-name="T19">Problemas generados:</text:span><text:span text:style-name="T18"> Interrupción severa de la UX en pantallas pequeñas al tapar el botón de guardado (Queda pendiente de rediseño de interfaz).</text:span></text:p>
            <text:p text:style-name="P22"><text:soft-page-break/></text:p>
            <text:p text:style-name="P20">• <text:span text:style-name="T19">Cambios futuros / Lecciones:</text:span><text:span text:style-name="T18"> Envolver siempre los formularios extensos dentro de un componente contenedor de tipo </text:span><text:span text:style-name="Source_20_Text"><text:span text:style-name="T18">ScrollView</text:span></text:span><text:span text:style-name="T18">.</text:span></text:p>
          </table:table-cell>
        </table:table-row>
        <table:table-row>
          <table:table-cell table:style-name="Tabla4.A1" office:value-type="string">
            <text:p text:style-name="P20">📋 <text:span text:style-name="T19">Incidencia:</text:span><text:span text:style-name="T18"> </text:span><text:span text:style-name="Source_20_Text"><text:span text:style-name="T18">INC-12</text:span></text:span><text:span text:style-name="T18"> — Redirección errónea a la pantalla de inicio tras aplicar cambios en accesibilidad.</text:span></text:p>
            <text:p text:style-name="P22"/>
            <text:p text:style-name="P20">• <text:span text:style-name="T19">Tarea relacionada:</text:span><text:span text:style-name="T18"> Gestión de navegación y persistencia de configuraciones.</text:span></text:p>
            <text:p text:style-name="P22"/>
            <text:p text:style-name="P20">• <text:span text:style-name="T19">Problemas generados:</text:span><text:span text:style-name="T18"> Error de flujo molesto que obligaba al usuario a re-navegar las opciones de nuevo.</text:span></text:p>
            <text:p text:style-name="P22"/>
            <text:p text:style-name="P20">• <text:span text:style-name="T19">Cambios futuros / Lecciones:</text:span><text:span text:style-name="T18"> Guardar el estado exacto del fragmento previo en la memoria persistente local antes de forzar la recreación del tema gráfico de la actividad.</text:span></text:p>
          </table:table-cell>
        </table:table-row>
      </table:table>
      <text:h text:style-name="P18" text:outline-level="3">Sprint 3: Control de Calidad (Testing Automatizado), Cobertura e Integración de Documentación</text:h>
      <text:list text:style-name="L5">
        <text:list-item>
          <text:p text:style-name="P35"><text:span text:style-name="T6">Fecha de Inicio:</text:span> 30 de abril de 2026</text:p>
        </text:list-item>
        <text:list-item>
          <text:p text:style-name="P35"><text:span text:style-name="T6">Fecha de Fin:</text:span> 23 de mayo de 2026</text:p>
        </text:list-item>
        <text:list-item>
          <text:p text:style-name="P28"><text:span text:style-name="T19">Tablero Kanban:</text:span><text:span text:style-name="T18"> Como se ilustra visualmente en el panel del repositorio (</text:span><text:span text:style-name="Source_20_Text"><text:span text:style-name="T18">image_6c7bc6.png</text:span></text:span><text:span text:style-name="T18">), la tarjeta clave “</text:span><text:span text:style-name="T21">Temporis-Final_Project-DAM #17: Documentacion y Pruebas (Tests)”</text:span><text:span text:style-name="T18"> se mantuvo de forma activa en la columna </text:span><text:span text:style-name="T19">"In progress"</text:span><text:span text:style-name="T18">, centralizando las actividades de aseguramiento de calidad antes del cierre técnico.</text:span></text:p>
        </text:list-item>
      </text:list>
      <table:table table:name="Tabla5" table:style-name="Tabla5">
        <table:table-column table:style-name="Tabla5.A"/>
        <table:table-header-rows>
          <table:table-row>
            <table:table-cell table:style-name="Tabla5.A1" office:value-type="string">
              <text:p text:style-name="P21"><text:span text:style-name="Strong_20_Emphasis"><text:span text:style-name="T18">Detalle de Incidencias Técnicas Registradas (Sprint 3)</text:span></text:span></text:p>
            </table:table-cell>
          </table:table-row>
        </table:table-header-rows>
        <table:table-row>
          <table:table-cell table:style-name="Tabla5.A1" office:value-type="string">
            <text:p text:style-name="P20">📋 <text:span text:style-name="T19">Incidencia:</text:span><text:span text:style-name="T18"> </text:span><text:span text:style-name="Source_20_Text"><text:span text:style-name="T18">INC-QA-01</text:span></text:span><text:span text:style-name="T18"> — Conflictos e incompatibilidades de Gradle al ejecutar la suite completa de pruebas unitarias con herramientas de cobertura (JaCoCo).</text:span></text:p>
            <text:p text:style-name="P22"/>
            <text:p text:style-name="P20">• <text:span text:style-name="T19">Tarea relacionada:</text:span><text:span text:style-name="T18"> Implementación de pruebas unitarias masivas (</text:span><text:span text:style-name="Source_20_Text"><text:span text:style-name="T18">MainActivityTest</text:span></text:span><text:span text:style-name="T18">, </text:span><text:span text:style-name="Source_20_Text"><text:span text:style-name="T18">TimerRepositoryTest</text:span></text:span><text:span text:style-name="T18">, </text:span><text:span text:style-name="Source_20_Text"><text:span text:style-name="T18">PostRepositoryTest</text:span></text:span><text:span text:style-name="T18">).</text:span></text:p>
            <text:p text:style-name="P22"><text:soft-page-break/></text:p>
            <text:p text:style-name="P20">• <text:span text:style-name="T19">Problemas generados:</text:span><text:span text:style-name="T18"> Las pruebas se ejecutaban correctamente de forma aislada, pero fallaban en bloque o causaban desbordamientos de memoria al lanzarse en el entorno CI/CD remoto.</text:span></text:p>
            <text:p text:style-name="P22"/>
            <text:p text:style-name="P20">• <text:span text:style-name="T19">Cambios futuros / Lecciones:</text:span><text:span text:style-name="T18"> Aislar las llamadas de base de datos simuladas de Robolectric (</text:span><text:span text:style-name="Source_20_Text"><text:span text:style-name="T18">Robolectric SQLite modes</text:span></text:span><text:span text:style-name="T18">) por cada clase individual de prueba y estructurar la inyección estática de propiedades.</text:span></text:p>
          </table:table-cell>
        </table:table-row>
        <table:table-row>
          <table:table-cell table:style-name="Tabla5.A1" office:value-type="string">
            <text:p text:style-name="P20">📋 <text:span text:style-name="T19">Incidencia:</text:span><text:span text:style-name="T18"> </text:span><text:span text:style-name="Source_20_Text"><text:span text:style-name="T18">INC-QA-02</text:span></text:span><text:span text:style-name="T18"> — Caídas por hilos de ejecución en segundo plano (</text:span><text:span text:style-name="Source_20_Text"><text:span text:style-name="T18">background threading crash</text:span></text:span><text:span text:style-name="T18">) durante el mockeo de Firestore en </text:span><text:span text:style-name="Source_20_Text"><text:span text:style-name="T18">PostRepositoryTest</text:span></text:span><text:span text:style-name="T18">.</text:span></text:p>
            <text:p text:style-name="P22"/>
            <text:p text:style-name="P20">• <text:span text:style-name="T19">Tarea relacionada:</text:span><text:span text:style-name="T18"> Cobertura de la capa de datos de Firebase.</text:span></text:p>
            <text:p text:style-name="P22"/>
            <text:p text:style-name="P20">• <text:span text:style-name="T19">Problemas generados:</text:span><text:span text:style-name="T18"> Interrupción abrupta de la integración continua (GitHub Actions) debido a respuestas asíncronas no controladas.</text:span></text:p>
            <text:p text:style-name="P22"/>
            <text:p text:style-name="P20">• <text:span text:style-name="T19">Cambios futuros / Lecciones:</text:span><text:span text:style-name="T18"> Implementar mocks estrictos de las tareas asíncronas de Firebase y forzar despachadores síncronos de prueba en Kotlin Coroutines (</text:span><text:span text:style-name="Source_20_Text"><text:span text:style-name="T18">TestDispatcher</text:span></text:span><text:span text:style-name="T18">).</text:span></text:p>
          </table:table-cell>
        </table:table-row>
        <table:table-row>
          <table:table-cell table:style-name="Tabla5.A1" office:value-type="string">
            <text:p text:style-name="P20">📋 <text:span text:style-name="T19">Incidencia:</text:span><text:span text:style-name="T18"> </text:span><text:span text:style-name="Source_20_Text"><text:span text:style-name="T18">INC-QA-03</text:span></text:span><text:span text:style-name="T18"> — Fallos recurrentes en el motor de análisis estático SonarCloud debidos a la inyección de Beans incompatibles con la versión 8.13 de Gradle.</text:span></text:p>
            <text:p text:style-name="P22"/>
            <text:p text:style-name="P20">• <text:span text:style-name="T19">Tarea relacionada:</text:span><text:span text:style-name="T18"> Pipeline automatizado de calidad de software en la nube.</text:span></text:p>
            <text:p text:style-name="P22"/>
            <text:p text:style-name="P20">• <text:span text:style-name="T19">Problemas generados:</text:span><text:span text:style-name="T18"> Bloqueo de las Pull Requests en GitHub al arrojar excepciones de conversión de cadenas (</text:span><text:span text:style-name="Source_20_Text"><text:span text:style-name="T18">String cast exceptions</text:span></text:span><text:span text:style-name="T18">).</text:span></text:p>
            <text:p text:style-name="P22"/>
            <text:p text:style-name="P20">• <text:span text:style-name="T19">Cambios futuros / Lecciones:</text:span><text:span text:style-name="T18"> Centralizar y unificar el plugin clásico de SonarQube directamente en el directorio raíz (</text:span><text:span text:style-name="Source_20_Text"><text:span text:style-name="T18">root</text:span></text:span><text:span text:style-name="T18">), abstrayendo las rutas mediante colecciones </text:span><text:soft-page-break/><text:span text:style-name="T18">nativas de tipo </text:span><text:span text:style-name="Source_20_Text"><text:span text:style-name="T18">files()</text:span></text:span><text:span text:style-name="T18"> en lugar de rutas absolutas cableadas.</text:span></text:p>
          </table:table-cell>
        </table:table-row>
      </table:table>
      <text:h text:style-name="P17" text:outline-level="2">Tablero Kanban</text:h>
      <text:p text:style-name="P29"><text:span text:style-name="T21">(El estado y avance detallado de las actividades de cierre se puede contrastar directamente en la interfaz del tablero Scrum, disponible como recurso de validación adjunto bajo el archivo de imagen </text:span><text:span text:style-name="Source_20_Text"><text:span text:style-name="T21">image_6c7bc6.png</text:span></text:span><text:span text:style-name="T21">)</text:span><text:span text:style-name="T18">.</text:span></text:p>
      <text:h text:style-name="P17" text:outline-level="2">Análisis de Retrospectiva y Comentarios Posteriores</text:h>
      <text:list text:style-name="L6">
        <text:list-item>
          <text:p text:style-name="P30"><text:span text:style-name="T19">Sobre la Gestión de Errores Críticos (Crashes):</text:span><text:span text:style-name="T18"> La mayoría de los errores fatales (</text:span><text:span text:style-name="Source_20_Text"><text:span text:style-name="T18">INC-07</text:span></text:span><text:span text:style-name="T18"> y </text:span><text:span text:style-name="Source_20_Text"><text:span text:style-name="T18">INC-08</text:span></text:span><text:span text:style-name="T18">) ocurrieron durante la implementación de las opciones de accesibilidad. Esto nos enseñó la importancia de probar cada vista de “forma aislada” (Implementando una especie de Unit Testing de UI) antes de integrarlas en el flujo/rama de desarrollo principal.</text:span></text:p>
        </text:list-item>
        <text:list-item>
          <text:p text:style-name="P30"><text:span text:style-name="T19">Sobre la Experiencia de Usuario (UX):</text:span><text:span text:style-name="T18"> La </text:span><text:span text:style-name="Source_20_Text"><text:span text:style-name="T18">INC-11</text:span></text:span><text:span text:style-name="T18"> fue una de las más complejas de detectar, ya que solo ocurría en dispositivos con pantallas pequeñas. La solución no solo fue técnica, sino de diseño, obligándonos a repensar cómo se presentan los formularios en móviles.</text:span></text:p>
        </text:list-item>
        <text:list-item>
          <text:p text:style-name="P30"><text:span text:style-name="T19">Sobre la Consistencia Visual:</text:span><text:span text:style-name="T18"> Gracias a la resolución de la </text:span><text:span text:style-name="Source_20_Text"><text:span text:style-name="T18">INC-09</text:span></text:span><text:span text:style-name="T18">, logramos que Temporis mantenga una identidad de marca sólida (botones redondeados, tipografía legible) independientemente de si el usuario utiliza el modo de alto contraste o el oscuro.</text:span></text:p>
        </text:list-item>
      </text:list>
      <text:h text:style-name="P17" text:outline-level="2">4. Procedimiento de Gestión de Cambios</text:h>
      <text:p text:style-name="P32">Ante cualquier desviación (como las mejoras de accesibilidad solicitadas), he aplicado un protocolo de:</text:p>
      <text:list text:style-name="L7">
        <text:list-item>
          <text:p text:style-name="P36"><text:span text:style-name="T6">Identificación:</text:span> Detectar el cambio necesario.</text:p>
        </text:list-item>
        <text:list-item>
          <text:p text:style-name="P31"><text:span text:style-name="T19">Análisis de Impacto:</text:span><text:span text:style-name="T18"> Evaluar si afecta a la fecha de entrega del Gantt (</text:span><text:span text:style-name="Source_20_Text"><text:span text:style-name="T18">Tr_09</text:span></text:span><text:span text:style-name="T18">).</text:span></text:p>
        </text:list-item>
        <text:list-item>
          <text:p text:style-name="P36"><text:span text:style-name="T6">Repriorización:</text:span> Mover tareas menos críticas (ej. animaciones extra) al siguiente Sprint para dar cabida a la corrección.</text:p>
        </text:list-item>
      </text:list>
      <text:h text:style-name="P17" text:outline-level="2">5. Retrospectiva del Proyecto</text:h>
      <text:p text:style-name="P32">Al finalizar los Sprints, he concluido que la centralización de estilos en el archivo de temas base ahorra tiempo y evita errores de contraste. La integración temprana con Firebase facilitó detectar problemas de latencia desde el primer momento. Asimismo, la decisión <text:soft-page-break/>estratégica de dedicar el <text:span text:style-name="T6">Sprint 3</text:span> exclusivamente al aseguramiento y refactorización de código mediante SonarCloud garantizó que la versión final de la aplicación mantuviera los estándares técnicos exigidos con una suite robusta de pruebas automatizadas funcionales.</text:p>
      <text:p text:style-name="P9"/>
      <text:p text:style-name="P9"/>
      <text:p text:style-name="P9"/>
      <text:p text:style-name="P9"/>
      <text:p text:style-name="P9"/>
      <table:table table:name="Tabla1" table:style-name="Tabla1" table:template-name="Elegant">
        <table:table-column table:style-name="Tabla1.A"/>
        <table:table-column table:style-name="Tabla1.B"/>
        <table:table-column table:style-name="Tabla1.C"/>
        <table:table-column table:style-name="Tabla1.D"/>
        <text:soft-page-break/>
        <table:table-row table:style-name="Tabla1.1">
          <table:table-cell table:style-name="Tabla1.A1" office:value-type="string">
            <text:h text:style-name="P6" text:outline-level="2"><text:span text:style-name="Strong_20_Emphasis"><text:span text:style-name="T5">ID</text:span></text:span></text:h>
          </table:table-cell>
          <table:table-cell table:style-name="Tabla1.A1" office:value-type="string">
            <text:h text:style-name="P6" text:outline-level="2"><text:span text:style-name="Strong_20_Emphasis"><text:span text:style-name="T5">Sprint / Fase</text:span></text:span></text:h>
          </table:table-cell>
          <table:table-cell table:style-name="Tabla1.A1" office:value-type="string">
            <text:h text:style-name="P6" text:outline-level="2"><text:span text:style-name="Strong_20_Emphasis"><text:span text:style-name="T5">Incidencia Técnica Detectada</text:span></text:span></text:h>
          </table:table-cell>
          <table:table-cell table:style-name="Tabla1.A1" office:value-type="string">
            <text:h text:style-name="P6" text:outline-level="2"><text:span text:style-name="Strong_20_Emphasis"><text:span text:style-name="T5">Impacto</text:span></text:span></text:h>
          </table:table-cell>
        </table:table-row>
        <table:table-row table:style-name="Tabla1.2">
          <table:table-cell table:style-name="Tabla1.A2" office:value-type="string">
            <text:h text:style-name="P13" text:outline-level="2"><text:span text:style-name="Strong_20_Emphasis"><text:span text:style-name="T9">INC-01</text:span></text:span></text:h>
          </table:table-cell>
          <table:table-cell table:style-name="Tabla1.B2" office:value-type="string">
            <text:p text:style-name="P8">Sprint 1 (Auth)</text:p>
          </table:table-cell>
          <table:table-cell table:style-name="Tabla1.B2" office:value-type="string">
            <text:p text:style-name="P7">Error de configuración inicial en los servicios de <text:span text:style-name="T11">Firebase</text:span> y conexión con el proyecto Android.</text:p>
          </table:table-cell>
          <table:table-cell table:style-name="Tabla1.B2" office:value-type="string">
            <text:p text:style-name="P8">Bloqueo total</text:p>
          </table:table-cell>
        </table:table-row>
        <table:table-row table:style-name="Tabla1.3">
          <table:table-cell table:style-name="Tabla1.A3" office:value-type="string">
            <text:h text:style-name="P13" text:outline-level="2"><text:span text:style-name="Strong_20_Emphasis"><text:span text:style-name="T9">INC-02</text:span></text:span></text:h>
          </table:table-cell>
          <table:table-cell table:style-name="Tabla1.B2" office:value-type="string">
            <text:p text:style-name="P8">Sprint 1 (Logic)</text:p>
          </table:table-cell>
          <table:table-cell table:style-name="Tabla1.B2" office:value-type="string">
            <text:p text:style-name="P7">Problemas de compilación por <text:span text:style-name="T11">imports</text:span> faltantes tras la creación de entidades <text:span text:style-name="T11">Kotlin</text:span>.</text:p>
          </table:table-cell>
          <table:table-cell table:style-name="Tabla1.B2" office:value-type="string">
            <text:p text:style-name="P8">Error de compilación</text:p>
          </table:table-cell>
        </table:table-row>
        <table:table-row table:style-name="Tabla1.4">
          <table:table-cell table:style-name="Tabla1.A3" office:value-type="string">
            <text:h text:style-name="P13" text:outline-level="2"><text:span text:style-name="Strong_20_Emphasis"><text:span text:style-name="T9">INC-03</text:span></text:span></text:h>
          </table:table-cell>
          <table:table-cell table:style-name="Tabla1.B2" office:value-type="string">
            <text:p text:style-name="P8">Sprint 2 (Auth)</text:p>
          </table:table-cell>
          <table:table-cell table:style-name="Tabla1.B2" office:value-type="string">
            <text:p text:style-name="P7">Error "10" en la autenticación con <text:span text:style-name="T11">Google Account</text:span>.</text:p>
          </table:table-cell>
          <table:table-cell table:style-name="Tabla1.B2" office:value-type="string">
            <text:p text:style-name="P8">Acceso denegado</text:p>
          </table:table-cell>
        </table:table-row>
        <table:table-row table:style-name="Tabla1.5">
          <table:table-cell table:style-name="Tabla1.A3" office:value-type="string">
            <text:h text:style-name="P13" text:outline-level="2"><text:span text:style-name="Strong_20_Emphasis"><text:span text:style-name="T9">INC-04</text:span></text:span></text:h>
          </table:table-cell>
          <table:table-cell table:style-name="Tabla1.B2" office:value-type="string">
            <text:p text:style-name="P8">Sprint 2 (UI)</text:p>
          </table:table-cell>
          <table:table-cell table:style-name="Tabla1.B2" office:value-type="string">
            <text:p text:style-name="P7">Desajuste en el título de la vista del Perfil de Usuario (<text:span text:style-name="T11">User Profile View</text:span>).</text:p>
          </table:table-cell>
          <table:table-cell table:style-name="Tabla1.B2" office:value-type="string">
            <text:p text:style-name="P8">Error visual</text:p>
          </table:table-cell>
        </table:table-row>
        <table:table-row table:style-name="Tabla1.6">
          <table:table-cell table:style-name="Tabla1.A3" office:value-type="string">
            <text:h text:style-name="P13" text:outline-level="2"><text:span text:style-name="Strong_20_Emphasis"><text:span text:style-name="T9">INC-05</text:span></text:span></text:h>
          </table:table-cell>
          <table:table-cell table:style-name="Tabla1.B2" office:value-type="string">
            <text:p text:style-name="P8">Sprint 2 (Core)</text:p>
          </table:table-cell>
          <table:table-cell table:style-name="Tabla1.B2" office:value-type="string">
            <text:p text:style-name="P7">Error en la función de borrado (<text:span text:style-name="T11">Delete</text:span>) de los temporizadores creados.</text:p>
          </table:table-cell>
          <table:table-cell table:style-name="Tabla1.B2" office:value-type="string">
            <text:p text:style-name="P8">Pérdida de datos</text:p>
          </table:table-cell>
        </table:table-row>
        <table:table-row table:style-name="Tabla1.7">
          <table:table-cell table:style-name="Tabla1.A3" office:value-type="string">
            <text:h text:style-name="P13" text:outline-level="2"><text:span text:style-name="Strong_20_Emphasis"><text:span text:style-name="T9">INC-06</text:span></text:span></text:h>
          </table:table-cell>
          <table:table-cell table:style-name="Tabla1.B2" office:value-type="string">
            <text:p text:style-name="P8">Sprint 3 (UI)</text:p>
          </table:table-cell>
          <table:table-cell table:style-name="Tabla1.B2" office:value-type="string">
            <text:p text:style-name="P7">Persistencia de errores en el botón de cerrar sesión (<text:span text:style-name="T11">Logout</text:span>).</text:p>
          </table:table-cell>
          <table:table-cell table:style-name="Tabla1.B2" office:value-type="string">
            <text:p text:style-name="P8">Fallo de seguridad</text:p>
          </table:table-cell>
        </table:table-row>
        <table:table-row table:style-name="Tabla1.8">
          <table:table-cell table:style-name="Tabla1.A3" office:value-type="string">
            <text:h text:style-name="P13" text:outline-level="2"><text:span text:style-name="Strong_20_Emphasis"><text:span text:style-name="T9">INC-07</text:span></text:span></text:h>
          </table:table-cell>
          <table:table-cell table:style-name="Tabla1.B2" office:value-type="string">
            <text:p text:style-name="P8">Sprint 3 (Acc)</text:p>
          </table:table-cell>
          <table:table-cell table:style-name="Tabla1.B2" office:value-type="string">
            <text:p text:style-name="P7">Fatal Error (<text:span text:style-name="T11">Crash</text:span>) al intentar acceder a la vista de opciones de Accesibilidad.</text:p>
          </table:table-cell>
          <table:table-cell table:style-name="Tabla1.B2" office:value-type="string">
            <text:p text:style-name="P8">Bloqueo de función</text:p>
          </table:table-cell>
        </table:table-row>
        <table:table-row table:style-name="Tabla1.9">
          <table:table-cell table:style-name="Tabla1.A3" office:value-type="string">
            <text:h text:style-name="P13" text:outline-level="2"><text:span text:style-name="Strong_20_Emphasis"><text:span text:style-name="T9">INC-08</text:span></text:span></text:h>
          </table:table-cell>
          <table:table-cell table:style-name="Tabla1.B2" office:value-type="string">
            <text:p text:style-name="P8">Sprint 3 (Acc)</text:p>
          </table:table-cell>
          <table:table-cell table:style-name="Tabla1.B2" office:value-type="string">
            <text:p text:style-name="P7">Error crítico al activar el Modo Oscuro en las vistas <text:span text:style-name="T11">Home, Timers e Info</text:span>.</text:p>
          </table:table-cell>
          <table:table-cell table:style-name="Tabla1.B2" office:value-type="string">
            <text:p text:style-name="P8">‘Crash’ de la ‘App’</text:p>
          </table:table-cell>
        </table:table-row>
        <table:table-row table:style-name="Tabla1.10">
          <table:table-cell table:style-name="Tabla1.A3" office:value-type="string">
            <text:h text:style-name="P13" text:outline-level="2"><text:span text:style-name="Strong_20_Emphasis"><text:span text:style-name="T9">INC-09</text:span></text:span></text:h>
          </table:table-cell>
          <table:table-cell table:style-name="Tabla1.B2" office:value-type="string">
            <text:p text:style-name="P8">Sprint 3 (UI)</text:p>
          </table:table-cell>
          <table:table-cell table:style-name="Tabla1.B2" office:value-type="string">
            <text:p text:style-name="P7">Los botones de la interfaz aparecían con estilos inconsistentes (cuadrados vs redondeados) entre temas.</text:p>
          </table:table-cell>
          <table:table-cell table:style-name="Tabla1.B2" office:value-type="string">
            <text:p text:style-name="P8">Estética/UX</text:p>
          </table:table-cell>
        </table:table-row>
        <table:table-row table:style-name="Tabla1.11">
          <table:table-cell table:style-name="Tabla1.A3" office:value-type="string">
            <text:h text:style-name="P13" text:outline-level="2"><text:span text:style-name="Strong_20_Emphasis"><text:span text:style-name="T9">INC-10</text:span></text:span></text:h>
          </table:table-cell>
          <table:table-cell table:style-name="Tabla1.B2" office:value-type="string">
            <text:p text:style-name="P8">Sprint 3 (Acc)</text:p>
          </table:table-cell>
          <table:table-cell table:style-name="Tabla1.B2" office:value-type="string">
            <text:p text:style-name="P7">Desajuste en el escalado de textos al usar unidades "<text:span text:style-name="T11">dp</text:span>" en lugar de "<text:span text:style-name="T11">sp</text:span>".</text:p>
          </table:table-cell>
          <table:table-cell table:style-name="Tabla1.B2" office:value-type="string">
            <text:p text:style-name="P8">Accesibilidad</text:p>
          </table:table-cell>
        </table:table-row>
        <table:table-row table:style-name="Tabla1.12">
          <table:table-cell table:style-name="Tabla1.A3" office:value-type="string">
            <text:h text:style-name="P13" text:outline-level="2"><text:span text:style-name="Strong_20_Emphasis"><text:span text:style-name="T9">INC-11</text:span></text:span></text:h>
          </table:table-cell>
          <table:table-cell table:style-name="Tabla1.B2" office:value-type="string">
            <text:p text:style-name="P8">Sprint 4 (Final)</text:p>
          </table:table-cell>
          <table:table-cell table:style-name="Tabla1.B2" office:value-type="string">
            <text:p text:style-name="P7">El teclado virtual ocultaba los formularios de entrada de datos al crear o editar temporizadores. <text:span text:style-name="T17">(Aún está pendiente)</text:span></text:p>
          </table:table-cell>
          <table:table-cell table:style-name="Tabla1.B2" office:value-type="string">
            <text:p text:style-name="P8">Usabilidad (UX)</text:p>
          </table:table-cell>
        </table:table-row>
        <table:table-row table:style-name="Tabla1.13">
          <table:table-cell table:style-name="Tabla1.A13" office:value-type="string">
            <text:h text:style-name="P13" text:outline-level="2"><text:span text:style-name="Strong_20_Emphasis"><text:span text:style-name="T9">INC-12</text:span></text:span></text:h>
          </table:table-cell>
          <table:table-cell table:style-name="Tabla1.B13" office:value-type="string">
            <text:p text:style-name="P8">Sprint 4 (Auth)</text:p>
          </table:table-cell>
          <table:table-cell table:style-name="Tabla1.B13" office:value-type="string">
            <text:p text:style-name="P7">Redirección errónea a la pantalla de inicio justo después de aplicar cambios en la configuración de accesibilidad.</text:p>
          </table:table-cell>
          <table:table-cell table:style-name="Tabla1.B13" office:value-type="string">
            <text:p text:style-name="P8">Error de flujo</text:p>
          </table:table-cell>
        </table:table-row>
      </table:table>
      <text:p text:style-name="P10"><text:soft-page-break/></text:p>
      <text:h text:style-name="P5" text:outline-level="2">Tablero Kanban</text:h>
      <text:p text:style-name="P15"><draw:frame draw:style-name="fr1" draw:name="Imagen1" text:anchor-type="char" svg:width="17.806cm" svg:height="8.807cm" draw:z-index="6"><draw:image xlink:href="Pictures/10000000000006E100000367051AFCF0.png" xlink:type="simple" xlink:show="embed" xlink:actuate="onLoad" draw:mime-type="image/png"/></draw:frame><text:span text:style-name="T12"/></text:p>
      <text:h text:style-name="P16"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MT1" style:family="text">
      <style:text-properties style:font-name="MathJax_Typewriter" fo:font-size="15pt" fo:font-weight="normal" officeooo:rsid="0203eef7" style:font-size-asian="15pt" style:font-weight-asian="normal" style:font-size-complex="15pt" style:font-weight-complex="normal"/>
    </style:style>
    <style:style style:name="MT2" style:family="text">
      <style:text-properties style:font-name="MathJax_Typewriter" fo:font-size="15pt" fo:font-weight="normal" officeooo:rsid="018c626a" style:font-size-asian="15pt" style:font-weight-asian="normal" style:font-size-complex="15pt" style:font-weight-complex="normal"/>
    </style:style>
    <style:style style:name="MT3" style:family="text">
      <style:text-properties style:font-name="MathJax_Typewriter" fo:font-size="15pt" fo:font-weight="normal" officeooo:rsid="003bb751" style:font-size-asian="15pt" style:font-weight-asian="normal" style:font-size-complex="15pt" style:font-weight-complex="normal"/>
    </style:style>
    <style:style style:name="MT4" style:family="text">
      <style:text-properties style:font-name="MathJax_Typewriter" fo:font-size="15pt" fo:font-weight="normal" officeooo:rsid="006b4a44" style:font-size-asian="15pt" style:font-weight-asian="normal" style:font-size-complex="15pt" style:font-weight-complex="normal"/>
    </style:style>
    <style:page-layout style:name="Mpm1">
      <style:page-layout-properties fo:page-width="21.001cm" fo:page-height="29.7cm" style:num-format="1" style:print-orientation="portrait" fo:margin-top="1.67cm" fo:margin-bottom="1.321cm" fo:margin-left="2cm" fo:margin-right="1.1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03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guimiento del Proyecto - Scrum</text:span><text:span text:style-name="MT2"><text:tab/><text:tab/></text:span><text:span text:style-name="MT3">Kevin Zamora </text:span><text:span text:style-name="MT4">Amela</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6-01T00:12:56.228055838</dc:date>
    <meta:editing-duration>P1DT1H58M5S</meta:editing-duration>
    <meta:editing-cycles>602</meta:editing-cycles>
    <meta:print-date>2026-04-27T21:15:43.111986968</meta:print-date>
    <meta:printed-by>Archivos PDF</meta:printed-by>
    <meta:document-statistic meta:table-count="5" meta:image-count="2" meta:object-count="0" meta:page-count="13" meta:paragraph-count="210" meta:word-count="2225" meta:character-count="14472" meta:non-whitespace-character-count="12454"/>
  </office:meta>
</office:document-meta>
</file>